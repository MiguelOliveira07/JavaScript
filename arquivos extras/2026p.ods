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7.105cm"/>
    </style:style>
    <style:style style:name="co4" style:family="table-column">
      <style:table-column-properties fo:break-before="auto" style:column-width="6.572cm"/>
    </style:style>
    <style:style style:name="co5" style:family="table-column">
      <style:table-column-properties fo:break-before="auto" style:column-width="1.819cm"/>
    </style:style>
    <style:style style:name="co6" style:family="table-column">
      <style:table-column-properties fo:break-before="auto" style:column-width="2.685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3.496cm"/>
    </style:style>
    <style:style style:name="co9" style:family="table-column">
      <style:table-column-properties fo:break-before="auto" style:column-width="3.385cm"/>
    </style:style>
    <style:style style:name="co10" style:family="table-column">
      <style:table-column-properties fo:break-before="auto" style:column-width="2.321cm"/>
    </style:style>
    <style:style style:name="co11" style:family="table-column">
      <style:table-column-properties fo:break-before="auto" style:column-width="6.74cm"/>
    </style:style>
    <style:style style:name="co12" style:family="table-column">
      <style:table-column-properties fo:break-before="auto" style:column-width="2.237cm"/>
    </style:style>
    <style:style style:name="co13" style:family="table-column">
      <style:table-column-properties fo:break-before="auto" style:column-width="2.35cm"/>
    </style:style>
    <style:style style:name="co14" style:family="table-column">
      <style:table-column-properties fo:break-before="auto" style:column-width="3.72cm"/>
    </style:style>
    <style:style style:name="co15" style:family="table-column">
      <style:table-column-properties fo:break-before="auto" style:column-width="1.699cm"/>
    </style:style>
    <style:style style:name="co16" style:family="table-column">
      <style:table-column-properties fo:break-before="auto" style:column-width="8.139cm"/>
    </style:style>
    <style:style style:name="co17" style:family="table-column">
      <style:table-column-properties fo:break-before="auto" style:column-width="7.301cm"/>
    </style:style>
    <style:style style:name="co18" style:family="table-column">
      <style:table-column-properties fo:break-before="auto" style:column-width="6.348cm"/>
    </style:style>
    <style:style style:name="co19" style:family="table-column">
      <style:table-column-properties fo:break-before="auto" style:column-width="3.216cm"/>
    </style:style>
    <style:style style:name="co20" style:family="table-column">
      <style:table-column-properties fo:break-before="auto" style:column-width="2.574cm"/>
    </style:style>
    <style:style style:name="co21" style:family="table-column">
      <style:table-column-properties fo:break-before="auto" style:column-width="3.3cm"/>
    </style:style>
    <style:style style:name="co22" style:family="table-column">
      <style:table-column-properties fo:break-before="auto" style:column-width="2.713cm"/>
    </style:style>
    <style:style style:name="co23" style:family="table-column">
      <style:table-column-properties fo:break-before="auto" style:column-width="1.649cm"/>
    </style:style>
    <style:style style:name="co24" style:family="table-column">
      <style:table-column-properties fo:break-before="auto" style:column-width="5.315cm"/>
    </style:style>
    <style:style style:name="co25" style:family="table-column">
      <style:table-column-properties fo:break-before="auto" style:column-width="3.803cm"/>
    </style:style>
    <style:style style:name="co26" style:family="table-column">
      <style:table-column-properties fo:break-before="auto" style:column-width="2.88cm"/>
    </style:style>
    <style:style style:name="co27" style:family="table-column">
      <style:table-column-properties fo:break-before="auto" style:column-width="2.545cm"/>
    </style:style>
    <style:style style:name="co28" style:family="table-column">
      <style:table-column-properties fo:break-before="auto" style:column-width="5.173cm"/>
    </style:style>
    <style:style style:name="co29" style:family="table-column">
      <style:table-column-properties fo:break-before="auto" style:column-width="6.209cm"/>
    </style:style>
    <style:style style:name="co30" style:family="table-column">
      <style:table-column-properties fo:break-before="auto" style:column-width="3.607cm"/>
    </style:style>
    <style:style style:name="co31" style:family="table-column">
      <style:table-column-properties fo:break-before="auto" style:column-width="4.307cm"/>
    </style:style>
    <style:style style:name="co32" style:family="table-column">
      <style:table-column-properties fo:break-before="auto" style:column-width="2.909cm"/>
    </style:style>
    <style:style style:name="co33" style:family="table-column">
      <style:table-column-properties fo:break-before="auto" style:column-width="2.517cm"/>
    </style:style>
    <style:style style:name="co34" style:family="table-column">
      <style:table-column-properties fo:break-before="auto" style:column-width="3.831cm"/>
    </style:style>
    <style:style style:name="co35" style:family="table-column">
      <style:table-column-properties fo:break-before="auto" style:column-width="2.293cm"/>
    </style:style>
    <style:style style:name="co36" style:family="table-column">
      <style:table-column-properties fo:break-before="auto" style:column-width="2.937cm"/>
    </style:style>
    <style:style style:name="co37" style:family="table-column">
      <style:table-column-properties fo:break-before="auto" style:column-width="3.272cm"/>
    </style:style>
    <style:style style:name="co38" style:family="table-column">
      <style:table-column-properties fo:break-before="auto" style:column-width="3.076cm"/>
    </style:style>
    <style:style style:name="co39" style:family="table-column">
      <style:table-column-properties fo:break-before="auto" style:column-width="2.798cm"/>
    </style:style>
    <style:style style:name="co40" style:family="table-column">
      <style:table-column-properties fo:break-before="auto" style:column-width="6.853cm"/>
    </style:style>
    <style:style style:name="co41" style:family="table-column">
      <style:table-column-properties fo:break-before="auto" style:column-width="5.343cm"/>
    </style:style>
    <style:style style:name="co42" style:family="table-column">
      <style:table-column-properties fo:break-before="auto" style:column-width="7.327cm"/>
    </style:style>
    <style:style style:name="co43" style:family="table-column">
      <style:table-column-properties fo:break-before="auto" style:column-width="4.671cm"/>
    </style:style>
    <style:style style:name="co44" style:family="table-column">
      <style:table-column-properties fo:break-before="auto" style:column-width="3.664cm"/>
    </style:style>
    <style:style style:name="co45" style:family="table-column">
      <style:table-column-properties fo:break-before="auto" style:column-width="6.461cm"/>
    </style:style>
    <style:style style:name="co46" style:family="table-column">
      <style:table-column-properties fo:break-before="auto" style:column-width="7.608cm"/>
    </style:style>
    <style:style style:name="co47" style:family="table-column">
      <style:table-column-properties fo:break-before="auto" style:column-width="8.53cm"/>
    </style:style>
    <style:style style:name="co48" style:family="table-column">
      <style:table-column-properties fo:break-before="auto" style:column-width="4.867cm"/>
    </style:style>
    <style:style style:name="co49" style:family="table-column">
      <style:table-column-properties fo:break-before="auto" style:column-width="2.097cm"/>
    </style:style>
    <style:style style:name="co50" style:family="table-column">
      <style:table-column-properties fo:break-before="auto" style:column-width="3.104cm"/>
    </style:style>
    <style:style style:name="co51" style:family="table-column">
      <style:table-column-properties fo:break-before="auto" style:column-width="0.616cm"/>
    </style:style>
    <style:style style:name="co52" style:family="table-column">
      <style:table-column-properties fo:break-before="auto" style:column-width="4.168cm"/>
    </style:style>
    <style:style style:name="co53" style:family="table-column">
      <style:table-column-properties fo:break-before="auto" style:column-width="3.048cm"/>
    </style:style>
    <style:style style:name="co54" style:family="table-column">
      <style:table-column-properties fo:break-before="auto" style:column-width="2.769cm"/>
    </style:style>
    <style:style style:name="co55" style:family="table-column">
      <style:table-column-properties fo:break-before="auto" style:column-width="2.852cm"/>
    </style:style>
    <style:style style:name="co56" style:family="table-column">
      <style:table-column-properties fo:break-before="auto" style:column-width="3.133cm"/>
    </style:style>
    <style:style style:name="co57" style:family="table-column">
      <style:table-column-properties fo:break-before="auto" style:column-width="3.944cm"/>
    </style:style>
    <style:style style:name="co58" style:family="table-column">
      <style:table-column-properties fo:break-before="auto" style:column-width="2.993cm"/>
    </style:style>
    <style:style style:name="co59" style:family="table-column">
      <style:table-column-properties fo:break-before="auto" style:column-width="1.665cm"/>
    </style:style>
    <style:style style:name="co60" style:family="table-column">
      <style:table-column-properties fo:break-before="auto" style:column-width="2.489cm"/>
    </style:style>
    <style:style style:name="co61" style:family="table-column">
      <style:table-column-properties fo:break-before="auto" style:column-width="6.824cm"/>
    </style:style>
    <style:style style:name="co62" style:family="table-column">
      <style:table-column-properties fo:break-before="auto" style:column-width="3.411cm"/>
    </style:style>
    <style:style style:name="co63" style:family="table-column">
      <style:table-column-properties fo:break-before="auto" style:column-width="9.957cm"/>
    </style:style>
    <style:style style:name="co64" style:family="table-column">
      <style:table-column-properties fo:break-before="auto" style:column-width="5.39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212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Jan">
      <style:table-properties table:display="true" style:writing-mode="lr-tb" table:tab-color="#bdd7ee"/>
    </style:style>
    <style:style style:name="ta2" style:family="table" style:master-page-name="PageStyle_5f_Fev">
      <style:table-properties table:display="true" style:writing-mode="lr-tb" table:tab-color="#bdd7ee"/>
    </style:style>
    <style:style style:name="ta3" style:family="table" style:master-page-name="PageStyle_5f_Mar">
      <style:table-properties table:display="true" style:writing-mode="lr-tb" table:tab-color="#bdd7ee"/>
    </style:style>
    <style:style style:name="ta4" style:family="table" style:master-page-name="PageStyle_5f_Abr">
      <style:table-properties table:display="true" style:writing-mode="lr-tb" table:tab-color="#bdd7ee"/>
    </style:style>
    <style:style style:name="ta5" style:family="table" style:master-page-name="PageStyle_5f_Mai">
      <style:table-properties table:display="true" style:writing-mode="lr-tb" table:tab-color="#bdd7ee"/>
    </style:style>
    <style:style style:name="ta6" style:family="table" style:master-page-name="PageStyle_5f_Jun">
      <style:table-properties table:display="true" style:writing-mode="lr-tb" table:tab-color="#bdd7ee"/>
    </style:style>
    <style:style style:name="ta7" style:family="table" style:master-page-name="PageStyle_5f_Jul">
      <style:table-properties table:display="true" style:writing-mode="lr-tb" table:tab-color="#bdd7ee"/>
    </style:style>
    <style:style style:name="ta8" style:family="table" style:master-page-name="PageStyle_5f_Ago">
      <style:table-properties table:display="true" style:writing-mode="lr-tb" table:tab-color="#bdd7ee"/>
    </style:style>
    <style:style style:name="ta9" style:family="table" style:master-page-name="PageStyle_5f_Set">
      <style:table-properties table:display="true" style:writing-mode="lr-tb" table:tab-color="#bdd7ee"/>
    </style:style>
    <style:style style:name="ta10" style:family="table" style:master-page-name="PageStyle_5f_Out">
      <style:table-properties table:display="true" style:writing-mode="lr-tb" table:tab-color="#bdd7ee"/>
    </style:style>
    <style:style style:name="ta11" style:family="table" style:master-page-name="PageStyle_5f_Nov">
      <style:table-properties table:display="true" style:writing-mode="lr-tb" table:tab-color="#bdd7ee"/>
    </style:style>
    <style:style style:name="ta12" style:family="table" style:master-page-name="PageStyle_5f_Dez">
      <style:table-properties table:display="true" style:writing-mode="lr-tb" table:tab-color="#bdd7ee"/>
    </style:style>
    <style:style style:name="ta13" style:family="table" style:master-page-name="PageStyle_5f_Anual">
      <style:table-properties table:display="true" style:writing-mode="lr-tb" table:tab-color="#8497b0"/>
    </style:style>
    <style:style style:name="ta14" style:family="table" style:master-page-name="PageStyle_5f_Gastos_20_Fixos_20_anual">
      <style:table-properties table:display="true" style:writing-mode="lr-tb" table:tab-color="#ffd966"/>
    </style:style>
    <style:style style:name="ta15" style:family="table" style:master-page-name="PageStyle_5f_Modelo">
      <style:table-properties table:display="false" style:writing-mode="lr-tb"/>
    </style:style>
    <style:style style:name="ce1" style:family="table-cell" style:parent-style-name="Default">
      <style:table-cell-properties fo:background-color="#c5e0b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none" fo:background-color="#c5e0b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1.76pt solid #000000" fo:background-color="#c5e0b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ffe6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8" style:family="table-cell" style:parent-style-name="Default" style:data-style-name="N118">
      <style:table-cell-properties fo:border-bottom="0.74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9" style:family="table-cell" style:parent-style-name="Default" style:data-style-name="N118">
      <style:table-cell-properties fo:border-bottom="0.74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10" style:family="table-cell" style:parent-style-name="Default" style:data-style-name="N118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0.74pt solid #000000" fo:background-color="#e2f0d9" style:diagonal-bl-tr="none" style:diagonal-tl-br="none" fo:border-left="1.76pt solid #000000" fo:border-right="1.76pt solid #000000" style:rotation-align="none" fo:border-top="1.76pt solid #000000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2" style:family="table-cell" style:parent-style-name="Excel_20_Built-in_20_Currency" style:data-style-name="N132">
      <style:table-cell-properties fo:border-bottom="1.76pt solid #000000" fo:background-color="#d0cec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0.74pt solid #000000" fo:background-color="#ffe6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.265cm" style:writing-mode="page"/>
    </style:style>
    <style:style style:name="ce21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.265cm" style:writing-mode="page"/>
    </style:style>
    <style:style style:name="ce22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.265cm" style:writing-mode="page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265cm" style:writing-mode="page"/>
    </style:style>
    <style:style style:name="ce24" style:family="table-cell" style:parent-style-name="Default">
      <style:table-cell-properties fo:border-bottom="none" fo:background-color="#deebf7" style:diagonal-bl-tr="none" style:diagonal-tl-br="none" fo:border-left="1.76pt solid #000000" fo:border-right="0.74pt solid #000000" style:rotation-align="none" fo:border-top="0.74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25" style:family="table-cell" style:parent-style-name="Default">
      <style:table-cell-properties fo:border-bottom="1.76pt solid #000000" fo:background-color="#deebf7" style:diagonal-bl-tr="none" style:diagonal-tl-br="none" fo:border-left="1.76pt solid #000000" fo:border-right="0.74pt solid #000000" style:rotation-align="none" fo:border-top="0.74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26" style:family="table-cell" style:parent-style-name="Default">
      <style:table-cell-properties fo:border-bottom="0.74pt solid #000000" fo:background-color="#ffe6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27" style:family="table-cell" style:parent-style-name="Excel_20_Built-in_20_Currency" style:data-style-name="N132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Excel_20_Built-in_20_Currency" style:data-style-name="N132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Excel_20_Built-in_20_Currency" style:data-style-name="N13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Excel_20_Built-in_20_Currency" style:data-style-name="N132">
      <style:table-cell-properties fo:border-bottom="1.76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Excel_20_Built-in_20_Currency" style:data-style-name="N132">
      <style:table-cell-properties fo:border-bottom="0.74pt solid #000000" fo:background-color="#fff2c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Excel_20_Built-in_20_Currency" style:data-style-name="N132">
      <style:table-cell-properties fo:border-bottom="0.74pt solid #000000" fo:background-color="#fff2c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Excel_20_Built-in_20_Currency" style:data-style-name="N132">
      <style:table-cell-properties fo:border-bottom="1.76pt solid #000000" fo:background-color="#fff2c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Excel_20_Built-in_20_Currency" style:data-style-name="N132">
      <style:table-cell-properties fo:border-bottom="none" fo:background-color="#fff2c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Excel_20_Built-in_20_Currency" style:data-style-name="N132">
      <style:table-cell-properties fo:border-bottom="0.74pt solid #000000" fo:background-color="#add296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Excel_20_Built-in_20_Currency" style:data-style-name="N132">
      <style:table-cell-properties fo:border-bottom="0.74pt solid #000000" fo:background-color="#ffe28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Excel_20_Built-in_20_Currency" style:data-style-name="N132">
      <style:table-cell-properties fo:border-bottom="0.74pt solid #000000" fo:background-color="#bdd7e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Excel_20_Built-in_20_Currency" style:data-style-name="N132">
      <style:table-cell-properties fo:border-bottom="none" fo:background-color="#f9c8ad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Excel_20_Built-in_20_Currency" style:data-style-name="N132">
      <style:table-cell-properties fo:border-bottom="1.76pt solid #000000" fo:background-color="#b8b8b8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Excel_20_Built-in_20_Currency" style:data-style-name="N132">
      <style:table-cell-properties fo:border-bottom="0.74pt solid #000000" fo:background-color="#add296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Excel_20_Built-in_20_Currency" style:data-style-name="N132">
      <style:table-cell-properties fo:border-bottom="0.74pt solid #000000" fo:background-color="#ffe28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Excel_20_Built-in_20_Currency" style:data-style-name="N132">
      <style:table-cell-properties fo:border-bottom="0.74pt solid #000000" fo:background-color="#bdd7e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Excel_20_Built-in_20_Currency" style:data-style-name="N132">
      <style:table-cell-properties fo:border-bottom="none" fo:background-color="#f9c8ad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Excel_20_Built-in_20_Currency" style:data-style-name="N132">
      <style:table-cell-properties fo:border-bottom="1.76pt solid #000000" fo:background-color="#b8b8b8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Excel_20_Built-in_20_Currency" style:data-style-name="N132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Excel_20_Built-in_20_Currency" style:data-style-name="N132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Excel_20_Built-in_20_Currency" style:data-style-name="N132">
      <style:table-cell-properties fo:border-bottom="1.76pt solid #000000" fo:background-color="#e2f0d9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51" style:family="table-cell" style:parent-style-name="Default" style:data-style-name="N132">
      <style:table-cell-properties style:rotation-align="none"/>
    </style:style>
    <style:style style:name="ce52" style:family="table-cell" style:parent-style-name="Default">
      <style:table-cell-properties fo:background-color="#f4b18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 style:data-style-name="N118">
      <style:table-cell-properties fo:border-bottom="0.74pt solid #000000" fo:background-color="#deebf7" style:diagonal-bl-tr="none" style:diagonal-tl-br="none" fo:border-left="1.76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54" style:family="table-cell" style:parent-style-name="Default" style:data-style-name="N118">
      <style:table-cell-properties fo:border-bottom="0.74pt solid #000000" fo:background-color="#deebf7" style:diagonal-bl-tr="none" style:diagonal-tl-br="none" fo:border-left="1.76pt solid #000000" fo:border-right="0.74pt solid #000000" style:rotation-align="none" fo:border-top="0.74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55" style:family="table-cell" style:parent-style-name="Default" style:data-style-name="N118">
      <style:table-cell-properties fo:border-bottom="1.76pt solid #000000" fo:background-color="#deebf7" style:diagonal-bl-tr="none" style:diagonal-tl-br="none" fo:border-left="1.76pt solid #000000" fo:border-right="0.74pt solid #000000" style:rotation-align="none" fo:border-top="0.74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56" style:family="table-cell" style:parent-style-name="Default">
      <style:table-cell-properties fo:border-bottom="0.74pt solid #000000" fo:background-color="#f8cbad" style:diagonal-bl-tr="none" style:diagonal-tl-br="none" fo:border-left="1.76pt solid #000000" fo:border-right="0.74pt solid #000000" style:rotation-align="none" fo:border-top="1.76pt solid #000000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57" style:family="table-cell" style:parent-style-name="Default">
      <style:table-cell-properties fo:border-bottom="0.74pt solid #000000" fo:background-color="#f8cbad" style:diagonal-bl-tr="none" style:diagonal-tl-br="none" fo:border-left="1.76pt solid #000000" fo:border-right="0.74pt solid #000000" style:rotation-align="none" fo:border-top="0.74pt solid #000000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58" style:family="table-cell" style:parent-style-name="Default">
      <style:table-cell-properties fo:border-bottom="1.76pt solid #000000" fo:background-color="#f8cbad" style:diagonal-bl-tr="none" style:diagonal-tl-br="none" fo:border-left="1.76pt solid #000000" fo:border-right="0.74pt solid #000000" style:rotation-align="none" fo:border-top="0.74pt solid #000000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60" style:family="table-cell" style:parent-style-name="Default" style:data-style-name="N118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fo:background-color="#c5e0b4" style:diagonal-bl-tr="none" style:diagonal-tl-br="none" fo:border="1.76pt solid #000000" style:rotation-align="none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118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fo:border-bottom="0.74pt solid #000000" fo:background-color="#f2f2f2" style:diagonal-bl-tr="none" style:diagonal-tl-br="none" fo:border-left="0.74pt solid #000000" fo:border-right="0.74pt solid #000000" style:rotation-align="none" fo:border-top="none">
        <loext:background-complex-color loext:theme-type="light1" loext:color-type="theme">
          <loext:transformation loext:type="lummod" loext:value="9500"/>
        </loext:background-complex-color>
      </style:table-cell-properties>
    </style:style>
    <style:style style:name="ce64" style:family="table-cell" style:parent-style-name="Default">
      <style:table-cell-properties fo:border-bottom="1.76pt solid #000000" fo:background-color="#f2f2f2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9500"/>
        </loext:background-complex-color>
      </style:table-cell-properties>
    </style:style>
    <style:style style:name="ce65" style:family="table-cell" style:parent-style-name="Default">
      <style:table-cell-properties fo:background-color="#f2f2f2" style:diagonal-bl-tr="none" style:diagonal-tl-br="none" fo:border="0.74pt solid #000000" style:rotation-align="none">
        <loext:background-complex-color loext:theme-type="light1" loext:color-type="theme">
          <loext:transformation loext:type="lummod" loext:value="9500"/>
        </loext:background-complex-color>
      </style:table-cell-properties>
    </style:style>
    <style:style style:name="ce66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</style:style>
    <style:style style:name="ce67" style:family="table-cell" style:parent-style-name="Default">
      <style:table-cell-properties fo:background-color="#ffff00" style:rotation-align="none"/>
    </style:style>
    <style:style style:name="ce68" style:family="table-cell" style:parent-style-name="Excel_20_Built-in_20_Currency" style:data-style-name="N132">
      <style:table-cell-properties fo:border-bottom="0.74pt solid #000000" fo:background-color="#e2f0d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Excel_20_Built-in_20_Currency" style:data-style-name="N132">
      <style:table-cell-properties fo:border-bottom="0.74pt solid #000000" fo:background-color="#e2f0d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Excel_20_Built-in_20_Currency" style:data-style-name="N132">
      <style:table-cell-properties fo:border-bottom="1.76pt solid #000000" fo:background-color="#e2f0d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Excel_20_Built-in_20_Currency" style:data-style-name="N132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fo:background-color="#ffff00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74" style:family="table-cell" style:parent-style-name="Default">
      <style:table-cell-properties fo:border-bottom="0.74pt solid #000000" fo:background-color="#deebf7" style:diagonal-bl-tr="none" style:diagonal-tl-br="none" fo:border-left="1.76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75" style:family="table-cell" style:parent-style-name="Default">
      <style:table-cell-properties fo:border-bottom="0.74pt solid #000000" fo:background-color="#deebf7" style:diagonal-bl-tr="none" style:diagonal-tl-br="none" fo:border-left="1.76pt solid #000000" fo:border-right="0.74pt solid #000000" style:rotation-align="none" fo:border-top="0.74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76" style:family="table-cell" style:parent-style-name="Default">
      <style:table-cell-properties fo:border-bottom="1.76pt solid #000000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fo:text-align="center" css3t:text-justify="auto" fo:margin-left="0cm" style:writing-mode="page"/>
    </style:style>
    <style:style style:name="ce77" style:family="table-cell" style:parent-style-name="Default" style:data-style-name="N137">
      <style:table-cell-properties fo:border-bottom="0.74pt solid #000000" fo:background-color="#d0cece" style:diagonal-bl-tr="none" style:diagonal-tl-br="none" fo:border-left="0.74pt solid #000000" fo:border-right="0.74pt solid #000000" style:rotation-align="none" fo:border-top="none">
        <loext:background-complex-color loext:theme-type="light2" loext:color-type="theme">
          <loext:transformation loext:type="lummod" loext:value="9000"/>
        </loext:background-complex-color>
      </style:table-cell-properties>
    </style:style>
    <style:style style:name="ce78" style:family="table-cell" style:parent-style-name="Default" style:data-style-name="N137">
      <style:table-cell-properties fo:background-color="#d0cece" style:diagonal-bl-tr="none" style:diagonal-tl-br="none" fo:border="0.74pt solid #000000" style:rotation-align="none">
        <loext:background-complex-color loext:theme-type="light2" loext:color-type="theme">
          <loext:transformation loext:type="lummod" loext:value="9000"/>
        </loext:background-complex-color>
      </style:table-cell-properties>
    </style:style>
    <style:style style:name="ce79" style:family="table-cell" style:parent-style-name="Default" style:data-style-name="N137">
      <style:table-cell-properties fo:border-bottom="1.76pt solid #000000" fo:background-color="#d0cece" style:diagonal-bl-tr="none" style:diagonal-tl-br="none" fo:border-left="0.74pt solid #000000" fo:border-right="0.74pt solid #000000" style:rotation-align="none" fo:border-top="0.74pt solid #000000">
        <loext:background-complex-color loext:theme-type="light2" loext:color-type="theme">
          <loext:transformation loext:type="lummod" loext:value="9000"/>
        </loext:background-complex-color>
      </style:table-cell-properties>
    </style:style>
    <style:style style:name="ce80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fo:border-bottom="0.74pt solid #000000" fo:background-color="#fff2cc" style:diagonal-bl-tr="none" style:diagonal-tl-br="none" fo:border-left="0.74pt solid #000000" fo:border-right="0.74pt solid #000000" style:rotation-align="none" fo:border-top="none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82" style:family="table-cell" style:parent-style-name="Default">
      <style:table-cell-properties fo:background-color="#fff2cc" style:diagonal-bl-tr="none" style:diagonal-tl-br="none" fo:border="0.74pt solid #000000" style:rotation-align="none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83" style:family="table-cell" style:parent-style-name="Default">
      <style:table-cell-properties fo:border-bottom="1.76pt solid #000000" fo:background-color="#fff2cc" style:diagonal-bl-tr="none" style:diagonal-tl-br="none" fo:border-left="0.74pt solid #000000" fo:border-right="0.74pt solid #000000" style:rotation-align="none" fo:border-top="0.74pt solid #000000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84" style:family="table-cell" style:parent-style-name="Default">
      <style:table-cell-properties fo:border-bottom="1.76pt solid #000000" fo:background-color="#e2f0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85" style:family="table-cell" style:parent-style-name="Default" style:data-style-name="N132">
      <style:table-cell-properties fo:background-color="#ffff00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20_Built-in_20_Currency" style:data-style-name="N132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 style:data-style-name="N120">
      <style:table-cell-properties fo:border-bottom="0.74pt solid #000000" fo:background-color="#deebf7" style:diagonal-bl-tr="none" style:diagonal-tl-br="none" fo:border-left="1.76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88" style:family="table-cell" style:parent-style-name="Default" style:data-style-name="N132">
      <style:table-cell-properties fo:background-color="#ffff00" style:rotation-align="none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" style:family="table-cell" style:parent-style-name="Excel_20_Built-in_20_Currency" style:data-style-name="N132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Excel_20_Built-in_20_Currency" style:data-style-name="N132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 style:data-style-name="N118">
      <style:table-cell-properties style:rotation-align="none"/>
    </style:style>
    <style:style style:name="ce93" style:family="table-cell" style:parent-style-name="Default" style:data-style-name="N118">
      <style:table-cell-properties fo:border-bottom="0.74pt solid #000000" fo:background-color="#d0cece" style:diagonal-bl-tr="none" style:diagonal-tl-br="none" fo:border-left="0.74pt solid #000000" fo:border-right="0.74pt solid #000000" style:rotation-align="none" fo:border-top="none">
        <loext:background-complex-color loext:theme-type="light2" loext:color-type="theme">
          <loext:transformation loext:type="lummod" loext:value="9000"/>
        </loext:background-complex-color>
      </style:table-cell-properties>
    </style:style>
    <style:style style:name="ce94" style:family="table-cell" style:parent-style-name="Default" style:data-style-name="N118">
      <style:table-cell-properties fo:background-color="#d0cece" style:diagonal-bl-tr="none" style:diagonal-tl-br="none" fo:border="0.74pt solid #000000" style:rotation-align="none">
        <loext:background-complex-color loext:theme-type="light2" loext:color-type="theme">
          <loext:transformation loext:type="lummod" loext:value="9000"/>
        </loext:background-complex-color>
      </style:table-cell-properties>
    </style:style>
    <style:style style:name="ce95" style:family="table-cell" style:parent-style-name="Default" style:data-style-name="N118">
      <style:table-cell-properties fo:border-bottom="1.76pt solid #000000" fo:background-color="#d0cece" style:diagonal-bl-tr="none" style:diagonal-tl-br="none" fo:border-left="0.74pt solid #000000" fo:border-right="0.74pt solid #000000" style:rotation-align="none" fo:border-top="0.74pt solid #000000">
        <loext:background-complex-color loext:theme-type="light2" loext:color-type="theme">
          <loext:transformation loext:type="lummod" loext:value="9000"/>
        </loext:background-complex-color>
      </style:table-cell-properties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97" style:family="table-cell" style:parent-style-name="Default">
      <style:table-cell-properties fo:background-color="#e7e6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</style:style>
    <style:style style:name="ce98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</style:style>
    <style:style style:name="ce99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</style:style>
    <style:style style:name="ce100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</style:style>
    <style:style style:name="ce101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</style:style>
    <style:style style:name="ce102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</style:style>
    <style:style style:name="ce103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</style:style>
    <style:style style:name="ce104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</style:style>
    <style:style style:name="ce105" style:family="table-cell" style:parent-style-name="Excel_20_Built-in_20_Currency" style:data-style-name="N13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Excel_20_Built-in_20_Currency" style:data-style-name="N132">
      <style:table-cell-properties fo:border-bottom="1.76pt solid #000000" fo:background-color="#adb9ca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Excel_20_Built-in_20_Currency" style:data-style-name="N132">
      <style:table-cell-properties fo:border-bottom="0.74pt solid #000000" fo:background-color="#add29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Excel_20_Built-in_20_Currency" style:data-style-name="N132">
      <style:table-cell-properties fo:border-bottom="0.74pt solid #000000" fo:background-color="#ffe28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Excel_20_Built-in_20_Currency" style:data-style-name="N132">
      <style:table-cell-properties fo:border-bottom="0.74pt solid #000000" fo:background-color="#f9c8a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Excel_20_Built-in_20_Currency" style:data-style-name="N132">
      <style:table-cell-properties fo:border-bottom="0.74pt solid #000000" fo:background-color="#ffe699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Excel_20_Built-in_20_Currency" style:data-style-name="N132">
      <style:table-cell-properties fo:border-bottom="0.74pt solid #000000" fo:background-color="#bdd7e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Excel_20_Built-in_20_Currency" style:data-style-name="N13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Excel_20_Built-in_20_Currency" style:data-style-name="N132">
      <style:table-cell-properties fo:border-bottom="0.74pt solid #000000" fo:background-color="#b8b8b8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Excel_20_Built-in_20_Currency" style:data-style-name="N132">
      <style:table-cell-properties fo:border-bottom="1.76pt solid #000000" fo:background-color="#bdd7e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Excel_20_Built-in_20_Currency" style:data-style-name="N132">
      <style:table-cell-properties fo:border-bottom="0.74pt solid #000000" fo:background-color="#edede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Excel_20_Built-in_20_Currency" style:data-style-name="N132">
      <style:table-cell-properties fo:background-color="#edede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Excel_20_Built-in_20_Currency" style:data-style-name="N132">
      <style:table-cell-properties fo:border-bottom="1.76pt solid #000000" fo:background-color="#edede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Excel_20_Built-in_20_Currency" style:data-style-name="N132">
      <style:table-cell-properties fo:border-bottom="1.76pt solid #000000" fo:background-color="#adb9ca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Excel_20_Built-in_20_Currency" style:data-style-name="N132">
      <style:table-cell-properties fo:border-bottom="0.74pt solid #000000" fo:background-color="#add29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Excel_20_Built-in_20_Currency" style:data-style-name="N13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Excel_20_Built-in_20_Currency" style:data-style-name="N132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Excel_20_Built-in_20_Currency" style:data-style-name="N132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125" style:family="table-cell" style:parent-style-name="Excel_20_Built-in_20_Currency" style:data-style-name="N132">
      <style:table-cell-properties fo:border-bottom="0.74pt solid #000000" fo:background-color="#9dc3e6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6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127" style:family="table-cell" style:parent-style-name="Excel_20_Built-in_20_Currency" style:data-style-name="N132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Excel_20_Built-in_20_Currency" style:data-style-name="N132">
      <style:table-cell-properties fo:border-bottom="0.74pt solid #000000" fo:background-color="#d6dce5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9" style:family="table-cell" style:parent-style-name="Excel_20_Built-in_20_Currency" style:data-style-name="N132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Excel_20_Built-in_20_Currency" style:data-style-name="N132">
      <style:table-cell-properties fo:border-bottom="1.76pt solid #000000" fo:background-color="#c5e0b4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Excel_20_Built-in_20_Currency" style:data-style-name="N132">
      <style:table-cell-properties fo:border-bottom="1.76pt solid #000000" fo:background-color="#ffff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2" style:family="table-cell" style:parent-style-name="Excel_20_Built-in_20_Currency" style:data-style-name="N132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133" style:family="table-cell" style:parent-style-name="Excel_20_Built-in_20_Currency" style:data-style-name="N132">
      <style:table-cell-properties fo:background-color="#9dc3e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4" style:family="table-cell" style:parent-style-name="Excel_20_Built-in_20_Currency" style:data-style-name="N132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Excel_20_Built-in_20_Currency" style:data-style-name="N132">
      <style:table-cell-properties fo:border-bottom="1.76pt solid #000000" fo:background-color="#c5e0b4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6" style:family="table-cell" style:parent-style-name="Excel_20_Built-in_20_Currency" style:data-style-name="N132">
      <style:table-cell-properties fo:border-bottom="1.76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7" style:family="table-cell" style:parent-style-name="Excel_20_Built-in_20_Currency" style:data-style-name="N132">
      <style:table-cell-properties fo:background-color="#dae3f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Excel_20_Built-in_20_Currency" style:data-style-name="N132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139" style:family="table-cell" style:parent-style-name="Excel_20_Built-in_20_Currency" style:data-style-name="N132">
      <style:table-cell-properties fo:background-color="#d6dc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Excel_20_Built-in_20_Currency" style:data-style-name="N132">
      <style:table-cell-properties fo:border-bottom="1.76pt solid #000000" fo:background-color="#2e75b6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ce141" style:family="table-cell" style:parent-style-name="Excel_20_Built-in_20_Currency" style:data-style-name="N132">
      <style:table-cell-properties fo:border-bottom="0.74pt solid #000000" fo:background-color="#1f4e79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42" style:family="table-cell" style:parent-style-name="Excel_20_Built-in_20_Currency" style:data-style-name="N132">
      <style:table-cell-properties fo:border-bottom="0.74pt solid #000000" fo:background-color="#9dc3e6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3" style:family="table-cell" style:parent-style-name="Excel_20_Built-in_20_Currency" style:data-style-name="N132">
      <style:table-cell-properties fo:border-bottom="0.74pt solid #000000" fo:background-color="#fff2cc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Excel_20_Built-in_20_Currency" style:data-style-name="N132">
      <style:table-cell-properties fo:border-bottom="1.76pt solid #000000" fo:background-color="#fff2cc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Excel_20_Built-in_20_Currency" style:data-style-name="N132">
      <style:table-cell-properties fo:border-bottom="1.76pt solid #000000" fo:background-color="#adb9ca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Excel_20_Built-in_20_Currency" style:data-style-name="N132">
      <style:table-cell-properties fo:border-bottom="0.74pt solid #000000" fo:background-color="#add296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Excel_20_Built-in_20_Currency" style:data-style-name="N132">
      <style:table-cell-properties fo:border-bottom="0.74pt solid #000000" fo:background-color="#ffe28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Excel_20_Built-in_20_Currency" style:data-style-name="N132">
      <style:table-cell-properties fo:border-bottom="0.74pt solid #000000" fo:background-color="#f9c8ad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Excel_20_Built-in_20_Currency" style:data-style-name="N132">
      <style:table-cell-properties fo:border-bottom="0.74pt solid #000000" fo:background-color="#ffe6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Excel_20_Built-in_20_Currency" style:data-style-name="N132">
      <style:table-cell-properties fo:border-bottom="0.74pt solid #000000" fo:background-color="#bdd7e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Excel_20_Built-in_20_Currency" style:data-style-name="N13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Excel_20_Built-in_20_Currency" style:data-style-name="N132">
      <style:table-cell-properties fo:border-bottom="0.74pt solid #000000" fo:background-color="#b8b8b8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Excel_20_Built-in_20_Currency" style:data-style-name="N132">
      <style:table-cell-properties fo:border-bottom="1.76pt solid #000000" fo:background-color="#bdd7e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Excel_20_Built-in_20_Currency" style:data-style-name="N13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Excel_20_Built-in_20_Currency" style:data-style-name="N13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Excel_20_Built-in_20_Currency" style:data-style-name="N132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8" style:family="table-cell" style:parent-style-name="Excel_20_Built-in_20_Currency" style:data-style-name="N132">
      <style:table-cell-properties fo:border-bottom="0.74pt solid #000000" fo:background-color="#ffe699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Excel_20_Built-in_20_Currency" style:data-style-name="N132">
      <style:table-cell-properties fo:border-bottom="0.74pt solid #000000" fo:background-color="#bdd7e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Excel_20_Built-in_20_Currency" style:data-style-name="N132">
      <style:table-cell-properties fo:border-bottom="0.74pt solid #000000" fo:background-color="#fbe5d6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1" style:family="table-cell" style:parent-style-name="Excel_20_Built-in_20_Currency" style:data-style-name="N132">
      <style:table-cell-properties fo:border-bottom="0.74pt solid #000000" fo:background-color="#fbe5d6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Excel_20_Built-in_20_Currency" style:data-style-name="N132">
      <style:table-cell-properties fo:border-bottom="none" fo:background-color="#fbe5d6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Excel_20_Built-in_20_Currency" style:data-style-name="N132">
      <style:table-cell-properties fo:border-bottom="1.76pt solid #000000" fo:background-color="#fbe5d6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Default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65" style:family="table-cell" style:parent-style-name="Excel_20_Built-in_20_Currency" style:data-style-name="N132">
      <style:table-cell-properties fo:background-color="#d0ce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fo:border-bottom="0.74pt solid #000000" fo:background-color="#ffe6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</style:style>
    <style:style style:name="ce167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css3t:text-justify="auto" fo:margin-left="0cm" style:writing-mode="page"/>
    </style:style>
    <style:style style:name="ce168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.265cm" style:writing-mode="page"/>
    </style:style>
    <style:style style:name="ce169" style:family="table-cell" style:parent-style-name="Default">
      <style:table-cell-properties fo:background-color="#deebf7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70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.265cm" style:writing-mode="page"/>
    </style:style>
    <style:style style:name="ce171" style:family="table-cell" style:parent-style-name="Default">
      <style:table-cell-properties fo:background-color="#dae3f3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72" style:family="table-cell" style:parent-style-name="Excel_20_Built-in_20_Currency" style:data-style-name="N132">
      <style:table-cell-properties fo:background-color="#fff2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7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176" style:family="table-cell" style:parent-style-name="Default">
      <style:table-cell-properties fo:border-bottom="0.74pt solid #000000" fo:background-color="#e2f0d9" style:diagonal-bl-tr="none" style:diagonal-tl-br="none" fo:border-left="0.74pt solid #000000" fo:border-right="1.76pt solid #000000" style:rotation-align="none" fo:border-top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77" style:family="table-cell" style:parent-style-name="Default">
      <style:table-cell-properties fo:border-bottom="0.74pt solid #000000" fo:background-color="#e2f0d9" style:diagonal-bl-tr="none" style:diagonal-tl-br="none" fo:border-left="0.74pt solid #000000" fo:border-right="1.76pt solid #000000" style:rotation-align="none" fo:border-top="0.74pt solid #000000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78" style:family="table-cell" style:parent-style-name="Default">
      <style:table-cell-properties fo:border-bottom="1.76pt solid #000000" fo:background-color="#e2f0d9" style:diagonal-bl-tr="none" style:diagonal-tl-br="none" fo:border-left="0.74pt solid #000000" fo:border-right="1.76pt solid #000000" style:rotation-align="none" fo:border-top="0.74pt solid #000000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7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180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</style:style>
    <style:style style:name="gr1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'Segoe UI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left"/>
      <style:text-properties fo:font-size="18pt"/>
    </style:style>
    <style:style style:name="P1" style:family="paragraph">
      <loext:graphic-properties draw:fill="solid" draw:fill-color="#ffffe1"/>
      <style:paragraph-properties fo:text-align="left"/>
      <style:text-properties fo:color="#000000" loext:opacity="100%" style:text-outline="false" style:text-line-through-style="none" style:text-line-through-type="none" style:text-position="0% 100%" fo:font-family="'Segoe UI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2" style:family="paragraph">
      <loext:graphic-properties draw:fill="none"/>
      <style:paragraph-properties fo:text-align="lef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content-validations>
        <table:content-validation table:name="val1" table:condition="of:cell-content-is-in-list([$Modelo.$P$3:.$P$10])" table:allow-empty-cell="true" table:display-list="unsorted" table:base-cell-address="Modelo.C11">
          <table:help-message table:display="true"/>
          <table:error-message table:message-type="stop" table:display="true"/>
        </table:content-validation>
        <table:content-validation table:name="val2" table:condition="of:cell-content-is-in-list(INDIRECT([.C11]))" table:allow-empty-cell="true" table:display-list="unsorted" table:base-cell-address="Modelo.D11">
          <table:help-message table:display="true"/>
          <table:error-message table:message-type="stop" table:display="true"/>
        </table:content-validation>
        <table:content-validation table:name="val3" table:condition="of:cell-content-is-in-list([$Modelo.$R$3:.$R$14])" table:allow-empty-cell="true" table:display-list="unsorted" table:base-cell-address="Modelo.I11">
          <table:help-message table:display="true"/>
          <table:error-message table:message-type="stop" table:display="true"/>
        </table:content-validation>
        <table:content-validation table:name="val4" table:condition="of:cell-content-is-in-list([$Modelo.$P$3:.$P$10])" table:allow-empty-cell="true" table:display-list="unsorted" table:base-cell-address="Anual.C11">
          <table:help-message table:display="true"/>
          <table:error-message table:message-type="stop" table:display="true"/>
        </table:content-validation>
        <table:content-validation table:name="val5" table:condition="of:cell-content-is-in-list(INDIRECT([.C11]))" table:allow-empty-cell="true" table:display-list="unsorted" table:base-cell-address="Anual.D11">
          <table:help-message table:display="true"/>
          <table:error-message table:message-type="stop" table:display="true"/>
        </table:content-validation>
        <table:content-validation table:name="val6" table:condition="of:cell-content-is-in-list([$Modelo.$R$3:.$R$14])" table:allow-empty-cell="true" table:display-list="unsorted" table:base-cell-address="Anual.I11">
          <table:help-message table:display="true"/>
          <table:error-message table:message-type="stop" table:display="true"/>
        </table:content-validation>
        <table:content-validation table:name="val7" table:condition="of:cell-content-is-in-list([$Modelo.$P$3:.$P$11])" table:allow-empty-cell="true" table:display-list="unsorted" table:base-cell-address="Modelo.C11">
          <table:help-message table:display="true"/>
          <table:error-message table:message-type="stop" table:display="true"/>
        </table:content-validation>
        <table:content-validation table:name="val8" table:condition="of:cell-content-is-in-list([$Modelo.$P$3:.$P$10])" table:allow-empty-cell="true" table:display-list="unsorted" table:base-cell-address="Modelo.C12">
          <table:help-message table:display="true"/>
          <table:error-message table:message-type="stop" table:display="true"/>
        </table:content-validation>
        <table:content-validation table:name="val9" table:condition="of:cell-content-is-in-list([$Modelo.$P$3:.$P$11])" table:allow-empty-cell="true" table:display-list="unsorted" table:base-cell-address="Dez.C11">
          <table:help-message table:display="true"/>
          <table:error-message table:message-type="stop" table:display="true"/>
        </table:content-validation>
        <table:content-validation table:name="val10" table:condition="of:cell-content-is-in-list(INDIRECT([.C11]))" table:allow-empty-cell="true" table:display-list="unsorted" table:base-cell-address="Dez.D11">
          <table:help-message table:display="true"/>
          <table:error-message table:message-type="stop" table:display="true"/>
        </table:content-validation>
        <table:content-validation table:name="val11" table:condition="of:cell-content-is-in-list([$Modelo.$R$3:.$R$14])" table:allow-empty-cell="true" table:display-list="unsorted" table:base-cell-address="Dez.I11">
          <table:help-message table:display="true"/>
          <table:error-message table:message-type="stop" table:display="true"/>
        </table:content-validation>
      </table:content-validations>
      <table:table table:name="J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4" table:default-cell-style-name="ce3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number-columns-repeated="16368"/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" office:value-type="string" calcext:value-type="string">
            <text:p>JAN</text:p>
          </table:table-cell>
          <table:table-cell table:style-name="ce13" office:value-type="string" calcext:value-type="string">
            <text:p>entradas</text:p>
          </table:table-cell>
          <table:table-cell table:style-name="ce26" office:value-type="string" calcext:value-type="string">
            <text:p>valor</text:p>
          </table:table-cell>
          <table:table-cell table:style-name="ce13"/>
          <table:table-cell table:style-name="ce7" office:value-type="string" calcext:value-type="string">
            <text:p>Saldo mensal</text:p>
          </table:table-cell>
          <table:table-cell/>
          <table:table-cell table:style-name="ce50" table:number-columns-spanned="4" table:number-rows-spanned="1"/>
          <table:covered-table-cell table:number-columns-repeated="3" table:style-name="ce59"/>
          <table:table-cell table:number-columns-repeated="5"/>
          <table:table-cell table:style-name="Default" table:number-columns-repeated="16368"/>
        </table:table-row>
        <table:table-row table:style-name="ro1">
          <table:table-cell/>
          <table:table-cell table:style-name="ce2" office:value-type="string" calcext:value-type="string">
            <text:p>salário</text:p>
          </table:table-cell>
          <table:table-cell table:style-name="ce14" office:value-type="string" calcext:value-type="string">
            <text:p>entrada total - tudo que tenho</text:p>
          </table:table-cell>
          <table:table-cell table:style-name="ce27" office:value-type="float" office:value="1443.24" calcext:value-type="float">
            <text:p><text:s/>R$ 1.443,24 </text:p>
          </table:table-cell>
          <table:table-cell table:style-name="ce36" office:value-type="string" office:string-value="entradas" calcext:value-type="string">
            <text:p><text:s/>entradas </text:p>
          </table:table-cell>
          <table:table-cell table:style-name="ce41" table:formula="of:=SUM([.D3];[.D5];[.D6];[.D7];[.D4])" office:value-type="float" office:value="2246.57" calcext:value-type="float">
            <text:p><text:s/>R$ 2.246,57 </text:p>
          </table:table-cell>
          <table:table-cell/>
          <table:table-cell table:style-name="ce51"/>
          <table:table-cell table:style-name="ce1" office:value-type="string" calcext:value-type="string">
            <text:p>data</text:p>
          </table:table-cell>
          <table:table-cell/>
          <table:table-cell table:style-name="ce66" office:value-type="string" calcext:value-type="string">
            <text:p>dinheiro guardado</text:p>
          </table:table-cell>
          <table:table-cell table:style-name="ce71"/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3" office:value-type="string" calcext:value-type="string">
            <text:p>Fotografia</text:p>
          </table:table-cell>
          <table:table-cell table:style-name="ce15"/>
          <table:table-cell table:style-name="ce28" table:formula="of:=SUM([.P10:.P25])" office:value-type="float" office:value="103.33" calcext:value-type="float">
            <text:p><text:s/>R$ 103,33 </text:p>
          </table:table-cell>
          <table:table-cell table:style-name="ce37" office:value-type="string" office:string-value="gastos variados" calcext:value-type="string">
            <text:p><text:s/>gastos variados </text:p>
          </table:table-cell>
          <table:table-cell table:style-name="ce42" table:formula="of:=SUM([.F11:.F32])" office:value-type="float" office:value="568.02" calcext:value-type="float">
            <text:p><text:s/>R$ 568,02 </text:p>
          </table:table-cell>
          <table:table-cell/>
          <table:table-cell office:value-type="string" calcext:value-type="string">
            <text:p><text:s/></text:p>
          </table:table-cell>
          <table:table-cell table:style-name="ce60" table:formula="of:=TODAY()" office:value-type="date" office:date-value="2026-06-21" calcext:value-type="date">
            <text:p>21/6/2026</text:p>
          </table:table-cell>
          <table:table-cell/>
          <table:table-cell table:style-name="ce66" office:value-type="string" calcext:value-type="string">
            <text:p>dinheiro para inestimento futuro</text:p>
          </table:table-cell>
          <table:table-cell table:style-name="ce71"/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4" office:value-type="string" calcext:value-type="string">
            <text:p>extra 2</text:p>
          </table:table-cell>
          <table:table-cell table:style-name="ce16"/>
          <table:table-cell table:style-name="ce29" office:value-type="float" office:value="700" calcext:value-type="float">
            <text:p><text:s/>R$ 700,00 </text:p>
          </table:table-cell>
          <table:table-cell table:style-name="ce38" office:value-type="string" office:string-value="entradas fotografia" calcext:value-type="string">
            <text:p><text:s/>entradas fotografia </text:p>
          </table:table-cell>
          <table:table-cell table:style-name="ce43" table:formula="of:=[.D4]" office:value-type="float" office:value="103.33" calcext:value-type="float">
            <text:p><text:s/>R$ 103,33 </text:p>
          </table:table-cell>
          <table:table-cell table:number-columns-repeated="2"/>
          <table:table-cell table:style-name="ce61" office:value-type="string" calcext:value-type="string">
            <text:p>ultimo update</text:p>
          </table:table-cell>
          <table:table-cell/>
          <table:table-cell table:style-name="ce66" office:value-type="string" calcext:value-type="string">
            <text:p>dinheiro para lente</text:p>
          </table:table-cell>
          <table:table-cell table:style-name="ce71" table:formula="of:=SUM([.P10:.P25])" office:value-type="float" office:value="103.33" calcext:value-type="float">
            <text:p><text:s/>R$ 103,33 </text:p>
          </table:table-cell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4" office:value-type="string" calcext:value-type="string">
            <text:p>extra 3</text:p>
          </table:table-cell>
          <table:table-cell table:style-name="ce16"/>
          <table:table-cell table:style-name="ce29"/>
          <table:table-cell table:style-name="ce39" office:value-type="string" office:string-value="saidas fixas" calcext:value-type="string">
            <text:p><text:s/>saidas fixas </text:p>
          </table:table-cell>
          <table:table-cell table:style-name="ce44" table:formula="of:=SUM([.K11:.K22])" office:value-type="float" office:value="337" calcext:value-type="float">
            <text:p><text:s/>R$ 337,00 </text:p>
          </table:table-cell>
          <table:table-cell table:number-columns-repeated="2"/>
          <table:table-cell table:style-name="ce62" office:value-type="date" office:date-value="2026-01-04" calcext:value-type="date">
            <text:p>4/1/2026</text:p>
          </table:table-cell>
          <table:table-cell/>
          <table:table-cell table:style-name="ce67" office:value-type="string" calcext:value-type="string">
            <text:p>para passar o mês, tenho =&gt;</text:p>
          </table:table-cell>
          <table:table-cell table:style-name="ce72"/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5"/>
          <table:table-cell table:style-name="ce17"/>
          <table:table-cell table:style-name="ce30"/>
          <table:table-cell table:style-name="ce40" office:value-type="string" office:string-value="saldo" calcext:value-type="string">
            <text:p><text:s/>saldo </text:p>
          </table:table-cell>
          <table:table-cell table:style-name="ce45" table:formula="of:=[.F3]-[.F4]-[.F6]" office:value-type="float" office:value="1341.55" calcext:value-type="float">
            <text:p><text:s/>R$ 1.341,55 </text:p>
          </table:table-cell>
          <table:table-cell table:number-columns-repeated="10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Variados</text:p>
          </table:table-cell>
          <table:covered-table-cell table:number-columns-repeated="3" table:style-name="ce18"/>
          <table:covered-table-cell table:style-name="ce46"/>
          <table:table-cell/>
          <table:table-cell table:style-name="ce52" office:value-type="string" calcext:value-type="string" table:number-columns-spanned="4" table:number-rows-spanned="1">
            <text:p>Fixos</text:p>
          </table:table-cell>
          <table:covered-table-cell table:number-columns-repeated="3" table:style-name="ce52"/>
          <table:table-cell/>
          <table:table-cell table:style-name="ce73" office:value-type="string" calcext:value-type="string">
            <text:p>Trabalho</text:p>
          </table:table-cell>
          <table:table-cell table:style-name="ce76" office:value-type="string" calcext:value-type="string">
            <text:p>Data</text:p>
          </table:table-cell>
          <table:table-cell table:style-name="ce80" office:value-type="string" calcext:value-type="string">
            <text:p>Descrição</text:p>
          </table:table-cell>
          <table:table-cell table:style-name="ce84" office:value-type="string" calcext:value-type="string">
            <text:p>Entradas</text:p>
          </table:table-cell>
          <table:table-cell table:style-name="Default" table:number-columns-repeated="16368"/>
        </table:table-row>
        <table:table-row table:style-name="ro1">
          <table:table-cell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topico</text:p>
          </table:table-cell>
          <table:table-cell table:style-name="ce7" office:value-type="string" calcext:value-type="string">
            <text:p>sub-tópico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valor</text:p>
          </table:table-cell>
          <table:table-cell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Topico</text:p>
          </table:table-cell>
          <table:table-cell table:style-name="ce7" office:value-type="string" calcext:value-type="string">
            <text:p>sub-tópico</text:p>
          </table:table-cell>
          <table:table-cell table:style-name="ce7" office:value-type="string" calcext:value-type="string">
            <text:p>valor</text:p>
          </table:table-cell>
          <table:table-cell/>
          <table:table-cell table:style-name="ce74" office:value-type="string" calcext:value-type="string">
            <text:p>Astra</text:p>
          </table:table-cell>
          <table:table-cell table:style-name="ce77" office:value-type="date" office:date-value="2026-01-22" calcext:value-type="date">
            <text:p>quinta-feira, 22 de janeiro de 2026</text:p>
          </table:table-cell>
          <table:table-cell table:style-name="ce81" office:value-type="string" calcext:value-type="string">
            <text:p>fotos de carro, Astra</text:p>
          </table:table-cell>
          <table:table-cell table:style-name="ce68" office:value-type="float" office:value="50" calcext:value-type="float">
            <text:p><text:s/>R$ 50,00 </text:p>
          </table:table-cell>
          <table:table-cell table:style-name="Default" table:number-columns-repeated="16368"/>
        </table:table-row>
        <table:table-row table:style-name="ro1">
          <table:table-cell/>
          <table:table-cell table:style-name="ce8" office:value-type="date" office:date-value="2026-01-04" calcext:value-type="date">
            <text:p>4/1/2026</text:p>
          </table:table-cell>
          <table:table-cell table:style-name="ce19" table:content-validation-name="val1" office:value-type="string" calcext:value-type="string">
            <text:p>Despesas</text:p>
          </table:table-cell>
          <table:table-cell table:style-name="ce19" table:content-validation-name="val2" office:value-type="string" calcext:value-type="string">
            <text:p>Compras online aleatórias</text:p>
          </table:table-cell>
          <table:table-cell table:style-name="ce19" office:value-type="string" calcext:value-type="string">
            <text:p>presente da marcelles</text:p>
          </table:table-cell>
          <table:table-cell table:style-name="ce47" office:value-type="float" office:value="63" calcext:value-type="float">
            <text:p><text:s/>R$ 63,00 </text:p>
          </table:table-cell>
          <table:table-cell/>
          <table:table-cell table:style-name="ce53" office:value-type="date" office:date-value="2026-01-04" calcext:value-type="date">
            <text:p>4/1/2026</text:p>
          </table:table-cell>
          <table:table-cell table:style-name="ce63" table:content-validation-name="val3" office:value-type="string" calcext:value-type="string">
            <text:p>Planos/assinaturas</text:p>
          </table:table-cell>
          <table:table-cell table:style-name="ce63" office:value-type="string" calcext:value-type="string">
            <text:p>internet 5G</text:p>
          </table:table-cell>
          <table:table-cell table:style-name="ce68" office:value-type="float" office:value="30" calcext:value-type="float">
            <text:p><text:s/>R$ 30,00 </text:p>
          </table:table-cell>
          <table:table-cell/>
          <table:table-cell table:style-name="ce75" office:value-type="string" calcext:value-type="string">
            <text:p>fotos do volei <text:s/>+ banlek acumulado</text:p>
          </table:table-cell>
          <table:table-cell table:style-name="ce78" office:value-type="date" office:date-value="2026-01-26" calcext:value-type="date">
            <text:p>segunda-feira, 26 de janeiro de 2026</text:p>
          </table:table-cell>
          <table:table-cell table:style-name="ce82" office:value-type="string" calcext:value-type="string">
            <text:p>fotos do volei</text:p>
          </table:table-cell>
          <table:table-cell table:style-name="ce69" office:value-type="float" office:value="53.33" calcext:value-type="float">
            <text:p><text:s/>R$ 53,33 </text:p>
          </table:table-cell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1-06" calcext:value-type="date">
            <text:p>6/1/2026</text:p>
          </table:table-cell>
          <table:table-cell table:style-name="ce15" table:content-validation-name="val1" office:value-type="string" calcext:value-type="string">
            <text:p>Transporte</text:p>
          </table:table-cell>
          <table:table-cell table:style-name="ce15" table:content-validation-name="val2" office:value-type="string" calcext:value-type="string">
            <text:p>Uber / Táxi</text:p>
          </table:table-cell>
          <table:table-cell table:style-name="ce15" office:value-type="string" calcext:value-type="string">
            <text:p>gasolina pro coroa</text:p>
          </table:table-cell>
          <table:table-cell table:style-name="ce48" office:value-type="float" office:value="30" calcext:value-type="float">
            <text:p><text:s/>R$ 30,00 </text:p>
          </table:table-cell>
          <table:table-cell/>
          <table:table-cell table:style-name="ce54" office:value-type="date" office:date-value="2026-01-05" calcext:value-type="date">
            <text:p>5/1/2026</text:p>
          </table:table-cell>
          <table:table-cell table:style-name="ce63" table:content-validation-name="val3" office:value-type="string" calcext:value-type="string">
            <text:p>Parcelas</text:p>
          </table:table-cell>
          <table:table-cell table:style-name="ce65" office:value-type="string" calcext:value-type="string">
            <text:p>camera</text:p>
          </table:table-cell>
          <table:table-cell table:style-name="ce69" office:value-type="float" office:value="147" calcext:value-type="float">
            <text:p><text:s/>R$ 147,0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1-07" calcext:value-type="date">
            <text:p>7/1/2026</text:p>
          </table:table-cell>
          <table:table-cell table:style-name="ce15" table:content-validation-name="val1" office:value-type="string" calcext:value-type="string">
            <text:p>Despesas</text:p>
          </table:table-cell>
          <table:table-cell table:style-name="ce15" table:content-validation-name="val2" office:value-type="string" calcext:value-type="string">
            <text:p>Fotografia (equipamentos e cursos)</text:p>
          </table:table-cell>
          <table:table-cell table:style-name="ce15" office:value-type="string" calcext:value-type="string">
            <text:p>flash</text:p>
          </table:table-cell>
          <table:table-cell table:style-name="ce48" office:value-type="float" office:value="349" calcext:value-type="float">
            <text:p><text:s/>R$ 349,00 </text:p>
          </table:table-cell>
          <table:table-cell/>
          <table:table-cell table:style-name="ce54" office:value-type="date" office:date-value="2026-01-12" calcext:value-type="date">
            <text:p>12/1/2026</text:p>
          </table:table-cell>
          <table:table-cell table:style-name="ce63" table:content-validation-name="val3" office:value-type="string" calcext:value-type="string">
            <text:p>Planos/assinaturas</text:p>
          </table:table-cell>
          <table:table-cell table:style-name="ce65" office:value-type="string" calcext:value-type="string">
            <text:p>volei</text:p>
          </table:table-cell>
          <table:table-cell table:style-name="ce69" office:value-type="float" office:value="30" calcext:value-type="float">
            <text:p><text:s/>R$ 30,0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1-07" calcext:value-type="date">
            <text:p>7/1/2026</text:p>
          </table:table-cell>
          <table:table-cell table:style-name="ce15" table:content-validation-name="val1" office:value-type="string" calcext:value-type="string">
            <text:p>Transporte</text:p>
          </table:table-cell>
          <table:table-cell table:style-name="ce15" table:content-validation-name="val2" office:value-type="string" calcext:value-type="string">
            <text:p>Manutenção (óleo, pneu, etc)</text:p>
          </table:table-cell>
          <table:table-cell table:style-name="ce15" office:value-type="string" calcext:value-type="string">
            <text:p>oléo</text:p>
          </table:table-cell>
          <table:table-cell table:style-name="ce48" office:value-type="float" office:value="42" calcext:value-type="float">
            <text:p><text:s/>R$ 42,00 </text:p>
          </table:table-cell>
          <table:table-cell/>
          <table:table-cell table:style-name="ce54" office:value-type="date" office:date-value="2026-01-10" calcext:value-type="date">
            <text:p>10/1/2026</text:p>
          </table:table-cell>
          <table:table-cell table:style-name="ce63" table:content-validation-name="val3" office:value-type="string" calcext:value-type="string">
            <text:p>Gasolina</text:p>
          </table:table-cell>
          <table:table-cell table:style-name="ce65"/>
          <table:table-cell table:style-name="ce69" office:value-type="float" office:value="30" calcext:value-type="float">
            <text:p><text:s/>R$ 30,0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1-09" calcext:value-type="date">
            <text:p>9/1/2026</text:p>
          </table:table-cell>
          <table:table-cell table:style-name="ce15" table:content-validation-name="val1" office:value-type="string" calcext:value-type="string">
            <text:p>Lazer</text:p>
          </table:table-cell>
          <table:table-cell table:style-name="ce15" table:content-validation-name="val2" office:value-type="string" calcext:value-type="string">
            <text:p>Saídas com amigos</text:p>
          </table:table-cell>
          <table:table-cell table:style-name="ce15" office:value-type="string" calcext:value-type="string">
            <text:p>açaí</text:p>
          </table:table-cell>
          <table:table-cell table:style-name="ce48" office:value-type="float" office:value="23.69" calcext:value-type="float">
            <text:p><text:s/>R$ 23,69 </text:p>
          </table:table-cell>
          <table:table-cell/>
          <table:table-cell table:style-name="ce54" office:value-type="date" office:date-value="2026-01-13" calcext:value-type="date">
            <text:p>13/1/2026</text:p>
          </table:table-cell>
          <table:table-cell table:style-name="ce63" table:content-validation-name="val3" office:value-type="string" calcext:value-type="string">
            <text:p>Parcelas</text:p>
          </table:table-cell>
          <table:table-cell table:style-name="ce65" office:value-type="string" calcext:value-type="string">
            <text:p>acampamento</text:p>
          </table:table-cell>
          <table:table-cell table:style-name="ce69" office:value-type="float" office:value="70" calcext:value-type="float">
            <text:p><text:s/>R$ 70,0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1-14" calcext:value-type="date">
            <text:p>14/1/2026</text:p>
          </table:table-cell>
          <table:table-cell table:style-name="ce15" table:content-validation-name="val1" office:value-type="string" calcext:value-type="string">
            <text:p>lazer</text:p>
          </table:table-cell>
          <table:table-cell table:style-name="ce15" table:content-validation-name="val2" office:value-type="string" calcext:value-type="string">
            <text:p>Esportes / saidas</text:p>
          </table:table-cell>
          <table:table-cell table:style-name="ce15" office:value-type="string" calcext:value-type="string">
            <text:p>volei</text:p>
          </table:table-cell>
          <table:table-cell table:style-name="ce48" office:value-type="float" office:value="24" calcext:value-type="float">
            <text:p><text:s/>R$ 24,00 </text:p>
          </table:table-cell>
          <table:table-cell/>
          <table:table-cell table:style-name="ce54" office:value-type="date" office:date-value="2026-01-16" calcext:value-type="date">
            <text:p>16/1/2026</text:p>
          </table:table-cell>
          <table:table-cell table:style-name="ce63" table:content-validation-name="val3" office:value-type="string" calcext:value-type="string">
            <text:p>Planos/assinaturas</text:p>
          </table:table-cell>
          <table:table-cell table:style-name="ce65" office:value-type="string" calcext:value-type="string">
            <text:p>babeiro</text:p>
          </table:table-cell>
          <table:table-cell table:style-name="ce69" office:value-type="float" office:value="30" calcext:value-type="float">
            <text:p><text:s/>R$ 30,0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1-18" calcext:value-type="date">
            <text:p>18/1/2026</text:p>
          </table:table-cell>
          <table:table-cell table:style-name="ce15" table:content-validation-name="val1" office:value-type="string" calcext:value-type="string">
            <text:p>Despesas</text:p>
          </table:table-cell>
          <table:table-cell table:style-name="ce15" table:content-validation-name="val2" office:value-type="string" calcext:value-type="string">
            <text:p>Doações / Contribuições</text:p>
          </table:table-cell>
          <table:table-cell table:style-name="ce15" office:value-type="string" calcext:value-type="string">
            <text:p>oferta</text:p>
          </table:table-cell>
          <table:table-cell table:style-name="ce48" office:value-type="float" office:value="10" calcext:value-type="float">
            <text:p><text:s/>R$ 10,00 </text:p>
          </table:table-cell>
          <table:table-cell/>
          <table:table-cell table:style-name="ce54"/>
          <table:table-cell table:style-name="ce63" table:content-validation-name="val3"/>
          <table:table-cell table:style-name="ce65"/>
          <table:table-cell table:style-name="ce69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1-23" calcext:value-type="date">
            <text:p>23/1/2026</text:p>
          </table:table-cell>
          <table:table-cell table:style-name="ce15" table:content-validation-name="val1" office:value-type="string" calcext:value-type="string">
            <text:p>Despesas</text:p>
          </table:table-cell>
          <table:table-cell table:style-name="ce15" table:content-validation-name="val2" office:value-type="string" calcext:value-type="string">
            <text:p>Gastos pessoais (roupas, acessórios)</text:p>
          </table:table-cell>
          <table:table-cell table:style-name="ce15" office:value-type="string" calcext:value-type="string">
            <text:p>padaria e armazem (trena)</text:p>
          </table:table-cell>
          <table:table-cell table:style-name="ce48" office:value-type="float" office:value="20.95" calcext:value-type="float">
            <text:p><text:s/>R$ 20,95 </text:p>
          </table:table-cell>
          <table:table-cell/>
          <table:table-cell table:style-name="ce54"/>
          <table:table-cell table:style-name="ce63" table:content-validation-name="val3"/>
          <table:table-cell table:style-name="ce65"/>
          <table:table-cell table:style-name="ce69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1-25" calcext:value-type="date">
            <text:p>25/1/2026</text:p>
          </table:table-cell>
          <table:table-cell table:style-name="ce15" table:content-validation-name="val1" office:value-type="string" calcext:value-type="string">
            <text:p>alimentação</text:p>
          </table:table-cell>
          <table:table-cell table:style-name="ce15" table:content-validation-name="val2" office:value-type="string" calcext:value-type="string">
            <text:p>Supermercado</text:p>
          </table:table-cell>
          <table:table-cell table:style-name="ce15" office:value-type="string" calcext:value-type="string">
            <text:p>supermecado brasil</text:p>
          </table:table-cell>
          <table:table-cell table:style-name="ce48" office:value-type="float" office:value="5.38" calcext:value-type="float">
            <text:p><text:s/>R$ 5,38 </text:p>
          </table:table-cell>
          <table:table-cell/>
          <table:table-cell table:style-name="ce54"/>
          <table:table-cell table:style-name="ce63" table:content-validation-name="val3"/>
          <table:table-cell table:style-name="ce65"/>
          <table:table-cell table:style-name="ce69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1"/>
          <table:table-cell table:style-name="ce15" table:content-validation-name="val2"/>
          <table:table-cell table:style-name="ce15"/>
          <table:table-cell table:style-name="ce48"/>
          <table:table-cell/>
          <table:table-cell table:style-name="ce54"/>
          <table:table-cell table:style-name="ce63" table:content-validation-name="val3"/>
          <table:table-cell table:style-name="ce65"/>
          <table:table-cell table:style-name="ce69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4-29" calcext:value-type="date">
            <text:p>29/4/2026</text:p>
          </table:table-cell>
          <table:table-cell table:style-name="ce15" table:content-validation-name="val1"/>
          <table:table-cell table:style-name="ce15" table:content-validation-name="val2"/>
          <table:table-cell table:style-name="ce15"/>
          <table:table-cell table:style-name="ce48"/>
          <table:table-cell/>
          <table:table-cell table:style-name="ce54"/>
          <table:table-cell table:style-name="ce63" table:content-validation-name="val3"/>
          <table:table-cell table:style-name="ce65"/>
          <table:table-cell table:style-name="ce69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1"/>
          <table:table-cell table:style-name="ce15" table:content-validation-name="val2"/>
          <table:table-cell table:style-name="ce15"/>
          <table:table-cell table:style-name="ce48"/>
          <table:table-cell/>
          <table:table-cell table:style-name="ce55"/>
          <table:table-cell table:style-name="ce64" table:content-validation-name="val3"/>
          <table:table-cell table:style-name="ce64"/>
          <table:table-cell table:style-name="ce70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1"/>
          <table:table-cell table:style-name="ce15" table:content-validation-name="val2"/>
          <table:table-cell table:style-name="ce15"/>
          <table:table-cell table:style-name="ce48"/>
          <table:table-cell table:number-columns-repeated="4"/>
          <table:table-cell table:style-name="ce51" table:formula="of:=SUM([.K11:.K22])" office:value-type="float" office:value="337" calcext:value-type="float">
            <text:p><text:s/>R$ 337,0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1"/>
          <table:table-cell table:style-name="ce15" table:content-validation-name="val2"/>
          <table:table-cell table:style-name="ce15"/>
          <table:table-cell table:style-name="ce48"/>
          <table:table-cell table:number-columns-repeated="6"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1"/>
          <table:table-cell table:style-name="ce15" table:content-validation-name="val2"/>
          <table:table-cell table:style-name="ce15"/>
          <table:table-cell table:style-name="ce48"/>
          <table:table-cell table:number-columns-repeated="6"/>
          <table:table-cell table:style-name="ce25"/>
          <table:table-cell table:style-name="ce79"/>
          <table:table-cell table:style-name="ce83"/>
          <table:table-cell table:style-name="ce70"/>
          <table:table-cell table:style-name="Default" table:number-columns-repeated="16368"/>
        </table:table-row>
        <table:table-row table:style-name="ro1" table:number-rows-repeated="6">
          <table:table-cell/>
          <table:table-cell table:style-name="ce9"/>
          <table:table-cell table:style-name="ce15" table:content-validation-name="val1"/>
          <table:table-cell table:style-name="ce15" table:content-validation-name="val2"/>
          <table:table-cell table:style-name="ce15"/>
          <table:table-cell table:style-name="ce48"/>
          <table:table-cell table:number-columns-repeated="10"/>
          <table:table-cell table:style-name="Default" table:number-columns-repeated="16368"/>
        </table:table-row>
        <table:table-row table:style-name="ro1">
          <table:table-cell/>
          <table:table-cell table:style-name="ce10"/>
          <table:table-cell table:style-name="ce17" table:content-validation-name="val1"/>
          <table:table-cell table:style-name="ce17" table:content-validation-name="val2"/>
          <table:table-cell table:style-name="ce17"/>
          <table:table-cell table:style-name="ce49"/>
          <table:table-cell table:number-columns-repeated="10"/>
          <table:table-cell table:style-name="Default" table:number-columns-repeated="16368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Alimentação</text:p>
          </table:table-cell>
          <table:table-cell table:style-name="ce20" office:value-type="string" calcext:value-type="string">
            <text:p>Doces</text:p>
          </table:table-cell>
          <table:table-cell table:style-name="ce31" table:formula="of:=SUMIF([.$D$11:.$D$32];[.C35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6" office:value-type="string" calcext:value-type="string">
            <text:p>Internet</text:p>
          </table:table-cell>
          <table:table-cell table:style-name="ce31" table:formula="of:=SUMIF([.$I$11:.$I$22];[.H35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35:.D39])" office:value-type="float" office:value="0" calcext:value-type="float">
            <text:p><text:s/>R$ -   </text:p>
          </table:table-cell>
          <table:table-cell office:value-type="string" calcext:value-type="string">
            <text:p>Padaria </text:p>
          </table:table-cell>
          <table:table-cell table:formula="of:=SUMIF([.$D$11:.$D$32];[.C36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Planos/assinaturas</text:p>
          </table:table-cell>
          <table:table-cell table:style-name="ce32" table:formula="of:=SUMIF([.$I$11:.$I$22];[.H36];[.$K$11:.$K$22])" office:value-type="float" office:value="90" calcext:value-type="float">
            <text:p><text:s/>R$ 90,00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<text:s/>Almoço fora</text:p>
          </table:table-cell>
          <table:table-cell table:formula="of:=SUMIF([.$D$11:.$D$32];[.C37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Agua</text:p>
          </table:table-cell>
          <table:table-cell table:style-name="ce32" table:formula="of:=SUMIF([.$I$11:.$I$22];[.H37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Lanches / Snacks</text:p>
          </table:table-cell>
          <table:table-cell table:formula="of:=SUMIF([.$D$11:.$D$32];[.C38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Luz</text:p>
          </table:table-cell>
          <table:table-cell table:style-name="ce32" table:formula="of:=SUMIF([.$I$11:.$I$22];[.H38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2"/>
          <table:table-cell table:style-name="ce33" table:formula="of:=SUMIF([.$D$11:.$D$32];[.C39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Gasolina</text:p>
          </table:table-cell>
          <table:table-cell table:style-name="ce32" table:formula="of:=SUMIF([.$I$11:.$I$22];[.H39];[.$K$11:.$K$22])" office:value-type="float" office:value="30" calcext:value-type="float">
            <text:p><text:s/>R$ 30,00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3"/>
          <table:table-cell table:style-name="ce34"/>
          <table:table-cell table:number-columns-repeated="3"/>
          <table:table-cell table:style-name="ce57" office:value-type="string" calcext:value-type="string">
            <text:p>Dizimos</text:p>
          </table:table-cell>
          <table:table-cell table:style-name="ce32" table:formula="of:=SUMIF([.$I$11:.$I$22];[.H40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Lazer</text:p>
          </table:table-cell>
          <table:table-cell table:style-name="ce20" office:value-type="string" calcext:value-type="string">
            <text:p>Delivery (iFood, etc)</text:p>
          </table:table-cell>
          <table:table-cell table:style-name="ce31" table:formula="of:=SUMIF([.$D$11:.$D$32];[.C41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Ofertas</text:p>
          </table:table-cell>
          <table:table-cell table:style-name="ce32" table:formula="of:=SUMIF([.$I$11:.$I$22];[.H41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2" table:formula="of:=SUBTOTAL(9;[.D41:.D48])" office:value-type="float" office:value="23.69" calcext:value-type="float">
            <text:p><text:s/>R$ 23,69 </text:p>
          </table:table-cell>
          <table:table-cell office:value-type="string" calcext:value-type="string">
            <text:p>Cinema / Shows</text:p>
          </table:table-cell>
          <table:table-cell table:formula="of:=SUMIF([.$D$11:.$D$32];[.C42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Parcelas</text:p>
          </table:table-cell>
          <table:table-cell table:style-name="ce32" table:formula="of:=SUMIF([.$I$11:.$I$22];[.H42];[.$K$11:.$K$22])" office:value-type="float" office:value="217" calcext:value-type="float">
            <text:p><text:s/>R$ 217,00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asseios / Viagens</text:p>
          </table:table-cell>
          <table:table-cell table:formula="of:=SUMIF([.$D$11:.$D$32];[.C43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Saúde</text:p>
          </table:table-cell>
          <table:table-cell table:style-name="ce32" table:formula="of:=SUMIF([.$I$11:.$I$22];[.H43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Compras por impulso (não essenciais)</text:p>
          </table:table-cell>
          <table:table-cell table:formula="of:=SUMIF([.$D$11:.$D$32];[.C44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Investimento</text:p>
          </table:table-cell>
          <table:table-cell table:style-name="ce32" table:formula="of:=SUMIF([.$I$11:.$I$22];[.H44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<text:s/>Jogos / Games / Aplicativos pagos</text:p>
          </table:table-cell>
          <table:table-cell table:formula="of:=SUMIF([.$D$11:.$D$32];[.C45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8"/>
          <table:table-cell table:style-name="ce33" table:formula="of:=SUMIF([.$I$11:.$I$22];[.H45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Saídas com amigos</text:p>
          </table:table-cell>
          <table:table-cell table:formula="of:=SUMIF([.$D$11:.$D$32];[.C46];[.$F$11:.$F$32])" office:value-type="float" office:value="23.69" calcext:value-type="float">
            <text:p><text:s/>R$ 23,69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4"/>
          <table:table-cell table:style-name="ce35" table:formula="of:=SUMIF([.$D$11:.$D$32];[.C4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2"/>
          <table:table-cell table:style-name="ce33" table:formula="of:=SUMIF([.$D$11:.$D$32];[.C4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Despesas</text:p>
          </table:table-cell>
          <table:table-cell table:style-name="ce20" office:value-type="string" calcext:value-type="string">
            <text:p>Presentes e datas comemorativas</text:p>
          </table:table-cell>
          <table:table-cell table:style-name="ce31" table:formula="of:=SUMIF([.$D$11:.$D$32];[.C5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50:.D56])" office:value-type="float" office:value="93.95" calcext:value-type="float">
            <text:p><text:s/>R$ 93,95 </text:p>
          </table:table-cell>
          <table:table-cell office:value-type="string" calcext:value-type="string">
            <text:p>Doações / Contribuições</text:p>
          </table:table-cell>
          <table:table-cell table:formula="of:=SUMIF([.$D$11:.$D$32];[.C51];[.$F$11:.$F$32])" office:value-type="float" office:value="10" calcext:value-type="float">
            <text:p><text:s/>R$ 10,00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Taxas bancárias / Pix por engano</text:p>
          </table:table-cell>
          <table:table-cell table:formula="of:=SUMIF([.$D$11:.$D$32];[.C5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Compras online aleatórias</text:p>
          </table:table-cell>
          <table:table-cell table:formula="of:=SUMIF([.$D$11:.$D$32];[.C53];[.$F$11:.$F$32])" office:value-type="float" office:value="63" calcext:value-type="float">
            <text:p><text:s/>R$ 63,00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anutenção da casa (lâmpada, pilha, etc)</text:p>
          </table:table-cell>
          <table:table-cell table:formula="of:=SUMIF([.$D$11:.$D$32];[.C5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Gastos pessoais (roupas, acessórios)</text:p>
          </table:table-cell>
          <table:table-cell table:formula="of:=SUMIF([.$D$11:.$D$32];[.C55];[.$F$11:.$F$32])" office:value-type="float" office:value="20.95" calcext:value-type="float">
            <text:p><text:s/>R$ 20,95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5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Transporte</text:p>
          </table:table-cell>
          <table:table-cell table:style-name="ce20" office:value-type="string" calcext:value-type="string">
            <text:p>Acessório</text:p>
          </table:table-cell>
          <table:table-cell table:style-name="ce31" table:formula="of:=SUMIF([.$D$11:.$D$32];[.C5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58:.D64])" office:value-type="float" office:value="72" calcext:value-type="float">
            <text:p><text:s/>R$ 72,00 </text:p>
          </table:table-cell>
          <table:table-cell office:value-type="string" calcext:value-type="string">
            <text:p>Uber / Táxi</text:p>
          </table:table-cell>
          <table:table-cell table:formula="of:=SUMIF([.$D$11:.$D$32];[.C59];[.$F$11:.$F$32])" office:value-type="float" office:value="30" calcext:value-type="float">
            <text:p><text:s/>R$ 30,00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Ônibus / Metrô</text:p>
          </table:table-cell>
          <table:table-cell table:formula="of:=SUMIF([.$D$11:.$D$32];[.C6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Estacionamento</text:p>
          </table:table-cell>
          <table:table-cell table:formula="of:=SUMIF([.$D$11:.$D$32];[.C61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anutenção (óleo, pneu, etc)</text:p>
          </table:table-cell>
          <table:table-cell table:formula="of:=SUMIF([.$D$11:.$D$32];[.C62];[.$F$11:.$F$32])" office:value-type="float" office:value="42" calcext:value-type="float">
            <text:p><text:s/>R$ 42,00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ultas / Documentação</text:p>
          </table:table-cell>
          <table:table-cell table:formula="of:=SUMIF([.$D$11:.$D$32];[.C63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6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Educação</text:p>
          </table:table-cell>
          <table:table-cell table:style-name="ce20" office:value-type="string" calcext:value-type="string">
            <text:p>Livros </text:p>
          </table:table-cell>
          <table:table-cell table:style-name="ce31" table:formula="of:=SUMIF([.$D$11:.$D$32];[.C6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66:.D72])" office:value-type="float" office:value="0" calcext:value-type="float">
            <text:p><text:s/>R$ -   </text:p>
          </table:table-cell>
          <table:table-cell office:value-type="string" calcext:value-type="string">
            <text:p>Cursos online (Udemy, Alura, etc)</text:p>
          </table:table-cell>
          <table:table-cell table:formula="of:=SUMIF([.$D$11:.$D$32];[.C6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aterial escolar / didático</text:p>
          </table:table-cell>
          <table:table-cell table:formula="of:=SUMIF([.$D$11:.$D$32];[.C6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Apostilas</text:p>
          </table:table-cell>
          <table:table-cell table:formula="of:=SUMIF([.$D$11:.$D$32];[.C69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Internet dedicada para estudos</text:p>
          </table:table-cell>
          <table:table-cell table:formula="of:=SUMIF([.$D$11:.$D$32];[.C7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lataformas de aprendizado </text:p>
          </table:table-cell>
          <table:table-cell table:formula="of:=SUMIF([.$D$11:.$D$32];[.C71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7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Saúde</text:p>
          </table:table-cell>
          <table:table-cell table:style-name="ce20" office:value-type="string" calcext:value-type="string">
            <text:p>Medicamentos</text:p>
          </table:table-cell>
          <table:table-cell table:style-name="ce31" table:formula="of:=SUMIF([.$D$11:.$D$32];[.C7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74:.D80])" office:value-type="float" office:value="0" calcext:value-type="float">
            <text:p><text:s/>R$ -   </text:p>
          </table:table-cell>
          <table:table-cell office:value-type="string" calcext:value-type="string">
            <text:p>Consultas médicas / exames</text:p>
          </table:table-cell>
          <table:table-cell table:formula="of:=SUMIF([.$D$11:.$D$32];[.C75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Óculos / lentes</text:p>
          </table:table-cell>
          <table:table-cell table:formula="of:=SUMIF([.$D$11:.$D$32];[.C7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rodutos de higiene e cuidados pessoais</text:p>
          </table:table-cell>
          <table:table-cell table:formula="of:=SUMIF([.$D$11:.$D$32];[.C7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3"/>
          <table:table-cell table:formula="of:=SUMIF([.$D$11:.$D$32];[.C7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3"/>
          <table:table-cell table:formula="of:=SUMIF([.$D$11:.$D$32];[.C79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8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Imprevistos</text:p>
          </table:table-cell>
          <table:table-cell table:style-name="ce20" office:value-type="string" calcext:value-type="string">
            <text:p>Emergência médica ou odontológica</text:p>
          </table:table-cell>
          <table:table-cell table:style-name="ce31" table:formula="of:=SUMIF([.$D$11:.$D$32];[.C8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82:.D88])" office:value-type="float" office:value="0" calcext:value-type="float">
            <text:p><text:s/>R$ -   </text:p>
          </table:table-cell>
          <table:table-cell office:value-type="string" calcext:value-type="string">
            <text:p>Equipamento quebrado (celular, notebook)</text:p>
          </table:table-cell>
          <table:table-cell table:formula="of:=SUMIF([.$D$11:.$D$32];[.C83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erda de documentos / taxas</text:p>
          </table:table-cell>
          <table:table-cell table:formula="of:=SUMIF([.$D$11:.$D$32];[.C8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Atrasos em contas com juros</text:p>
          </table:table-cell>
          <table:table-cell table:formula="of:=SUMIF([.$D$11:.$D$32];[.C85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Conserto urgente (casa, carro, etc)</text:p>
          </table:table-cell>
          <table:table-cell table:formula="of:=SUMIF([.$D$11:.$D$32];[.C8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Ajuda financeira a alguém (urgente)</text:p>
          </table:table-cell>
          <table:table-cell table:formula="of:=SUMIF([.$D$11:.$D$32];[.C8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8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Investimento</text:p>
          </table:table-cell>
          <table:table-cell table:style-name="ce20"/>
          <table:table-cell table:style-name="ce31" table:formula="of:=SUMIF([.C11:.C32];[.B90];[.F11:.F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</table:table>
      <table:table table:name="Fev" table:style-name="ta2">
        <table:table-column table:style-name="co1" table:default-cell-style-name="Default"/>
        <table:table-column table:style-name="co2" table:default-cell-style-name="Default"/>
        <table:table-column table:style-name="co16" table:default-cell-style-name="ce21"/>
        <table:table-column table:style-name="co17" table:default-cell-style-name="ce3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number-columns-repeated="16368"/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" office:value-type="string" calcext:value-type="string">
            <text:p>Fev</text:p>
          </table:table-cell>
          <table:table-cell table:style-name="ce13" office:value-type="string" calcext:value-type="string">
            <text:p>entradas</text:p>
          </table:table-cell>
          <table:table-cell table:style-name="ce26" office:value-type="string" calcext:value-type="string">
            <text:p>valor</text:p>
          </table:table-cell>
          <table:table-cell table:style-name="ce13"/>
          <table:table-cell table:style-name="ce7" office:value-type="string" calcext:value-type="string">
            <text:p>Saldo mensal</text:p>
          </table:table-cell>
          <table:table-cell/>
          <table:table-cell table:style-name="ce50" table:number-columns-spanned="4" table:number-rows-spanned="1"/>
          <table:covered-table-cell table:number-columns-repeated="3" table:style-name="ce59"/>
          <table:table-cell table:number-columns-repeated="5"/>
          <table:table-cell table:style-name="Default" table:number-columns-repeated="16368"/>
        </table:table-row>
        <table:table-row table:style-name="ro1">
          <table:table-cell/>
          <table:table-cell table:style-name="ce2" office:value-type="string" calcext:value-type="string">
            <text:p>salário</text:p>
          </table:table-cell>
          <table:table-cell table:style-name="ce14"/>
          <table:table-cell table:style-name="ce27" office:value-type="float" office:value="740" calcext:value-type="float">
            <text:p><text:s/>R$ 740,00 </text:p>
          </table:table-cell>
          <table:table-cell table:style-name="ce36" office:value-type="string" office:string-value="entradas" calcext:value-type="string">
            <text:p><text:s/>entradas </text:p>
          </table:table-cell>
          <table:table-cell table:style-name="ce41" table:formula="of:=SUM([.D3];[.D5];[.D6];[.D7];[.D4])" office:value-type="float" office:value="2281.55" calcext:value-type="float">
            <text:p><text:s/>R$ 2.281,55 </text:p>
          </table:table-cell>
          <table:table-cell table:number-columns-repeated="2"/>
          <table:table-cell table:style-name="ce1" office:value-type="string" calcext:value-type="string">
            <text:p>data</text:p>
          </table:table-cell>
          <table:table-cell/>
          <table:table-cell table:style-name="ce66" office:value-type="string" calcext:value-type="string">
            <text:p>dinheiro guardado</text:p>
          </table:table-cell>
          <table:table-cell table:style-name="ce71"/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3" office:value-type="string" calcext:value-type="string">
            <text:p>Fotografia</text:p>
          </table:table-cell>
          <table:table-cell table:style-name="ce15"/>
          <table:table-cell table:style-name="ce28" table:formula="of:=SUM([.P10:.P25])" office:value-type="float" office:value="200" calcext:value-type="float">
            <text:p><text:s/>R$ 200,00 </text:p>
          </table:table-cell>
          <table:table-cell table:style-name="ce37" office:value-type="string" office:string-value="gastos variados" calcext:value-type="string">
            <text:p><text:s/>gastos variados </text:p>
          </table:table-cell>
          <table:table-cell table:style-name="ce42" table:formula="of:=SUM([.F11:.F32])" office:value-type="float" office:value="561.58" calcext:value-type="float">
            <text:p><text:s/>R$ 561,58 </text:p>
          </table:table-cell>
          <table:table-cell table:number-columns-repeated="2"/>
          <table:table-cell table:style-name="ce60" table:formula="of:=TODAY()" office:value-type="date" office:date-value="2026-06-21" calcext:value-type="date">
            <text:p>21/6/2026</text:p>
          </table:table-cell>
          <table:table-cell/>
          <table:table-cell table:style-name="ce66" office:value-type="string" calcext:value-type="string">
            <text:p>dinheiro para inestimento futuro</text:p>
          </table:table-cell>
          <table:table-cell table:style-name="ce71"/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4" office:value-type="string" calcext:value-type="string">
            <text:p>extra 2</text:p>
          </table:table-cell>
          <table:table-cell table:style-name="ce16"/>
          <table:table-cell table:style-name="ce29"/>
          <table:table-cell table:style-name="ce38" office:value-type="string" office:string-value="entradas fotografia" calcext:value-type="string">
            <text:p><text:s/>entradas fotografia </text:p>
          </table:table-cell>
          <table:table-cell table:style-name="ce43" table:formula="of:=[.D4]" office:value-type="float" office:value="200" calcext:value-type="float">
            <text:p><text:s/>R$ 200,00 </text:p>
          </table:table-cell>
          <table:table-cell table:number-columns-repeated="2"/>
          <table:table-cell table:style-name="ce61" office:value-type="string" calcext:value-type="string">
            <text:p>ultimo update</text:p>
          </table:table-cell>
          <table:table-cell/>
          <table:table-cell table:style-name="ce66" office:value-type="string" calcext:value-type="string">
            <text:p>dinheiro para lente</text:p>
          </table:table-cell>
          <table:table-cell table:style-name="ce71" table:formula="of:=SUM([.P10:.P25])" office:value-type="float" office:value="200" calcext:value-type="float">
            <text:p><text:s/>R$ 200,00 </text:p>
          </table:table-cell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4" office:value-type="string" calcext:value-type="string">
            <text:p>extra 3</text:p>
          </table:table-cell>
          <table:table-cell table:style-name="ce16"/>
          <table:table-cell table:style-name="ce29"/>
          <table:table-cell table:style-name="ce39" office:value-type="string" office:string-value="saidas fixas" calcext:value-type="string">
            <text:p><text:s/>saidas fixas </text:p>
          </table:table-cell>
          <table:table-cell table:style-name="ce44" table:formula="of:=SUM([.K11:.K22])" office:value-type="float" office:value="362.2" calcext:value-type="float">
            <text:p><text:s/>R$ 362,20 </text:p>
          </table:table-cell>
          <table:table-cell table:number-columns-repeated="2"/>
          <table:table-cell table:style-name="ce62" office:value-type="date" office:date-value="2025-07-09" calcext:value-type="date">
            <text:p>9/7/2025</text:p>
          </table:table-cell>
          <table:table-cell/>
          <table:table-cell table:style-name="ce67" office:value-type="string" calcext:value-type="string">
            <text:p>para passar o mês, tenho =&gt;</text:p>
          </table:table-cell>
          <table:table-cell table:style-name="ce72"/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5" office:value-type="string" calcext:value-type="string">
            <text:p>Saldo</text:p>
          </table:table-cell>
          <table:table-cell table:style-name="ce17"/>
          <table:table-cell table:style-name="ce30" table:formula="of:=[$Jan.F7]" office:value-type="float" office:value="1341.55" calcext:value-type="float">
            <text:p><text:s/>R$ 1.341,55 </text:p>
          </table:table-cell>
          <table:table-cell table:style-name="ce40" office:value-type="string" office:string-value="saldo" calcext:value-type="string">
            <text:p><text:s/>saldo </text:p>
          </table:table-cell>
          <table:table-cell table:style-name="ce45" table:formula="of:=[.F3]-[.F4]-[.F6]" office:value-type="float" office:value="1357.77" calcext:value-type="float">
            <text:p><text:s/>R$ 1.357,77 </text:p>
          </table:table-cell>
          <table:table-cell table:number-columns-repeated="10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Variados</text:p>
          </table:table-cell>
          <table:covered-table-cell table:number-columns-repeated="3" table:style-name="ce18"/>
          <table:covered-table-cell table:style-name="ce46"/>
          <table:table-cell/>
          <table:table-cell table:style-name="ce52" office:value-type="string" calcext:value-type="string" table:number-columns-spanned="4" table:number-rows-spanned="1">
            <text:p>Fixos</text:p>
          </table:table-cell>
          <table:covered-table-cell table:number-columns-repeated="3" table:style-name="ce52"/>
          <table:table-cell/>
          <table:table-cell table:style-name="ce73" office:value-type="string" calcext:value-type="string">
            <text:p>Eventos</text:p>
          </table:table-cell>
          <table:table-cell table:style-name="ce76" office:value-type="string" calcext:value-type="string">
            <text:p>Data</text:p>
          </table:table-cell>
          <table:table-cell table:style-name="ce80" office:value-type="string" calcext:value-type="string">
            <text:p>Descrição</text:p>
          </table:table-cell>
          <table:table-cell table:style-name="ce84" office:value-type="string" calcext:value-type="string">
            <text:p>Entradas</text:p>
          </table:table-cell>
          <table:table-cell table:style-name="Default" table:number-columns-repeated="16368"/>
        </table:table-row>
        <table:table-row table:style-name="ro1">
          <table:table-cell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topico</text:p>
          </table:table-cell>
          <table:table-cell table:style-name="ce7" office:value-type="string" calcext:value-type="string">
            <text:p>sub-tópico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valor</text:p>
          </table:table-cell>
          <table:table-cell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Topico</text:p>
          </table:table-cell>
          <table:table-cell table:style-name="ce7" office:value-type="string" calcext:value-type="string">
            <text:p>sub-tópico</text:p>
          </table:table-cell>
          <table:table-cell table:style-name="ce7" office:value-type="string" calcext:value-type="string">
            <text:p>valor</text:p>
          </table:table-cell>
          <table:table-cell/>
          <table:table-cell table:style-name="ce74" office:value-type="string" calcext:value-type="string">
            <text:p>Bernardo</text:p>
          </table:table-cell>
          <table:table-cell table:style-name="ce77" office:value-type="date" office:date-value="2026-02-28" calcext:value-type="date">
            <text:p>sábado, 28 de fevereiro de 2026</text:p>
          </table:table-cell>
          <table:table-cell table:style-name="ce81" office:value-type="string" calcext:value-type="string">
            <text:p>aiversario do Be</text:p>
          </table:table-cell>
          <table:table-cell table:style-name="ce68" office:value-type="float" office:value="200" calcext:value-type="float">
            <text:p><text:s/>R$ 200,00 </text:p>
          </table:table-cell>
          <table:table-cell table:style-name="Default" table:number-columns-repeated="16368"/>
        </table:table-row>
        <table:table-row table:style-name="ro1">
          <table:table-cell/>
          <table:table-cell table:style-name="ce8" office:value-type="date" office:date-value="2026-02-11" calcext:value-type="date">
            <text:p>11/2/2026</text:p>
          </table:table-cell>
          <table:table-cell table:style-name="ce19" table:content-validation-name="val1" office:value-type="string" calcext:value-type="string">
            <text:p>Despesas</text:p>
          </table:table-cell>
          <table:table-cell table:style-name="ce19" table:content-validation-name="val2" office:value-type="string" calcext:value-type="string">
            <text:p>Gastos pessoais (roupas, acessórios)</text:p>
          </table:table-cell>
          <table:table-cell table:style-name="ce19" office:value-type="string" calcext:value-type="string">
            <text:p>tenis</text:p>
          </table:table-cell>
          <table:table-cell table:style-name="ce47" table:formula="of:=39+135" office:value-type="float" office:value="174" calcext:value-type="float">
            <text:p><text:s/>R$ 174,00 </text:p>
          </table:table-cell>
          <table:table-cell/>
          <table:table-cell table:style-name="ce53" office:value-type="date" office:date-value="2026-02-01" calcext:value-type="date">
            <text:p>1/2/2026</text:p>
          </table:table-cell>
          <table:table-cell table:style-name="ce63" table:content-validation-name="val3" office:value-type="string" calcext:value-type="string">
            <text:p>Ofertas</text:p>
          </table:table-cell>
          <table:table-cell table:style-name="ce63" office:value-type="string" calcext:value-type="string">
            <text:p>betel</text:p>
          </table:table-cell>
          <table:table-cell table:style-name="ce68" office:value-type="float" office:value="40" calcext:value-type="float">
            <text:p><text:s/>R$ 40,0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2-13" calcext:value-type="date">
            <text:p>13/2/2026</text:p>
          </table:table-cell>
          <table:table-cell table:style-name="ce15" table:content-validation-name="val1" office:value-type="string" calcext:value-type="string">
            <text:p>Transporte</text:p>
          </table:table-cell>
          <table:table-cell table:style-name="ce15" table:content-validation-name="val2" office:value-type="string" calcext:value-type="string">
            <text:p>Multas / Documentação</text:p>
          </table:table-cell>
          <table:table-cell table:style-name="ce15" office:value-type="string" calcext:value-type="string">
            <text:p>ipva</text:p>
          </table:table-cell>
          <table:table-cell table:style-name="ce48" office:value-type="float" office:value="238.42" calcext:value-type="float">
            <text:p><text:s/>R$ 238,42 </text:p>
          </table:table-cell>
          <table:table-cell/>
          <table:table-cell table:style-name="ce54" office:value-type="date" office:date-value="2026-02-02" calcext:value-type="date">
            <text:p>2/2/2026</text:p>
          </table:table-cell>
          <table:table-cell table:style-name="ce63" table:content-validation-name="val3" office:value-type="string" calcext:value-type="string">
            <text:p>Gasolina</text:p>
          </table:table-cell>
          <table:table-cell table:style-name="ce65" office:value-type="string" calcext:value-type="string">
            <text:p>mensal</text:p>
          </table:table-cell>
          <table:table-cell table:style-name="ce69" table:formula="of:=25.1+31.6" office:value-type="float" office:value="56.7" calcext:value-type="float">
            <text:p><text:s/>R$ 56,7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2-13" calcext:value-type="date">
            <text:p>13/2/2026</text:p>
          </table:table-cell>
          <table:table-cell table:style-name="ce15" table:content-validation-name="val1" office:value-type="string" calcext:value-type="string">
            <text:p>Transporte</text:p>
          </table:table-cell>
          <table:table-cell table:style-name="ce15" table:content-validation-name="val2" office:value-type="string" calcext:value-type="string">
            <text:p>Manutenção (óleo, pneu, etc)</text:p>
          </table:table-cell>
          <table:table-cell table:style-name="ce15" office:value-type="string" calcext:value-type="string">
            <text:p>gasolina pra manu</text:p>
          </table:table-cell>
          <table:table-cell table:style-name="ce48" office:value-type="float" office:value="57.92" calcext:value-type="float">
            <text:p><text:s/>R$ 57,92 </text:p>
          </table:table-cell>
          <table:table-cell/>
          <table:table-cell table:style-name="ce54" office:value-type="date" office:date-value="2026-02-09" calcext:value-type="date">
            <text:p>9/2/2026</text:p>
          </table:table-cell>
          <table:table-cell table:style-name="ce63" table:content-validation-name="val3" office:value-type="string" calcext:value-type="string">
            <text:p>Parcelas</text:p>
          </table:table-cell>
          <table:table-cell table:style-name="ce65" office:value-type="string" calcext:value-type="string">
            <text:p>cannon</text:p>
          </table:table-cell>
          <table:table-cell table:style-name="ce69" office:value-type="float" office:value="143.5" calcext:value-type="float">
            <text:p><text:s/>R$ 143,5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2-15" calcext:value-type="date">
            <text:p>15/2/2026</text:p>
          </table:table-cell>
          <table:table-cell table:style-name="ce15" table:content-validation-name="val1" office:value-type="string" calcext:value-type="string">
            <text:p>Despesas</text:p>
          </table:table-cell>
          <table:table-cell table:style-name="ce15" table:content-validation-name="val2" office:value-type="string" calcext:value-type="string">
            <text:p>Gastos pessoais (roupas, acessórios)</text:p>
          </table:table-cell>
          <table:table-cell table:style-name="ce15" office:value-type="string" calcext:value-type="string">
            <text:p>brasil</text:p>
          </table:table-cell>
          <table:table-cell table:style-name="ce48" table:formula="of:=37.14+15.1" office:value-type="float" office:value="52.24" calcext:value-type="float">
            <text:p><text:s/>R$ 52,24 </text:p>
          </table:table-cell>
          <table:table-cell/>
          <table:table-cell table:style-name="ce54" office:value-type="date" office:date-value="2026-02-09" calcext:value-type="date">
            <text:p>9/2/2026</text:p>
          </table:table-cell>
          <table:table-cell table:style-name="ce63" table:content-validation-name="val3" office:value-type="string" calcext:value-type="string">
            <text:p>Parcelas</text:p>
          </table:table-cell>
          <table:table-cell table:style-name="ce65" office:value-type="string" calcext:value-type="string">
            <text:p>sitio</text:p>
          </table:table-cell>
          <table:table-cell table:style-name="ce69" office:value-type="float" office:value="70" calcext:value-type="float">
            <text:p><text:s/>R$ 70,0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2-28" calcext:value-type="date">
            <text:p>28/2/2026</text:p>
          </table:table-cell>
          <table:table-cell table:style-name="ce15" table:content-validation-name="val1" office:value-type="string" calcext:value-type="string">
            <text:p>Lazer</text:p>
          </table:table-cell>
          <table:table-cell table:style-name="ce15" table:content-validation-name="val2" office:value-type="string" calcext:value-type="string">
            <text:p>Saídas com amigos</text:p>
          </table:table-cell>
          <table:table-cell table:style-name="ce15" office:value-type="string" calcext:value-type="string">
            <text:p>churrasco</text:p>
          </table:table-cell>
          <table:table-cell table:style-name="ce48" office:value-type="float" office:value="39" calcext:value-type="float">
            <text:p><text:s/>R$ 39,00 </text:p>
          </table:table-cell>
          <table:table-cell/>
          <table:table-cell table:style-name="ce54" office:value-type="date" office:date-value="2026-02-10" calcext:value-type="date">
            <text:p>10/2/2026</text:p>
          </table:table-cell>
          <table:table-cell table:style-name="ce63" table:content-validation-name="val3" office:value-type="string" calcext:value-type="string">
            <text:p>Planos/assinaturas</text:p>
          </table:table-cell>
          <table:table-cell table:style-name="ce65" office:value-type="string" calcext:value-type="string">
            <text:p>spotify</text:p>
          </table:table-cell>
          <table:table-cell table:style-name="ce69" office:value-type="float" office:value="7" calcext:value-type="float">
            <text:p><text:s/>R$ 7,0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1"/>
          <table:table-cell table:style-name="ce15" table:content-validation-name="val2"/>
          <table:table-cell table:style-name="ce15"/>
          <table:table-cell table:style-name="ce48"/>
          <table:table-cell/>
          <table:table-cell table:style-name="ce54" office:value-type="date" office:date-value="2026-02-11" calcext:value-type="date">
            <text:p>11/2/2026</text:p>
          </table:table-cell>
          <table:table-cell table:style-name="ce63" table:content-validation-name="val3" office:value-type="string" calcext:value-type="string">
            <text:p>Planos/assinaturas</text:p>
          </table:table-cell>
          <table:table-cell table:style-name="ce65" office:value-type="string" calcext:value-type="string">
            <text:p>claro</text:p>
          </table:table-cell>
          <table:table-cell table:style-name="ce69" office:value-type="float" office:value="30" calcext:value-type="float">
            <text:p><text:s/>R$ 30,0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1"/>
          <table:table-cell table:style-name="ce15" table:content-validation-name="val2"/>
          <table:table-cell table:style-name="ce15"/>
          <table:table-cell table:style-name="ce48"/>
          <table:table-cell/>
          <table:table-cell table:style-name="ce54" office:value-type="date" office:date-value="2026-02-12" calcext:value-type="date">
            <text:p>12/2/2026</text:p>
          </table:table-cell>
          <table:table-cell table:style-name="ce63" table:content-validation-name="val3" office:value-type="string" calcext:value-type="string">
            <text:p>Planos/assinaturas</text:p>
          </table:table-cell>
          <table:table-cell table:style-name="ce65" office:value-type="string" calcext:value-type="string">
            <text:p>volei</text:p>
          </table:table-cell>
          <table:table-cell table:style-name="ce69" office:value-type="float" office:value="15" calcext:value-type="float">
            <text:p><text:s/>R$ 15,0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 table:number-rows-repeated="3">
          <table:table-cell/>
          <table:table-cell table:style-name="ce9"/>
          <table:table-cell table:style-name="ce15" table:content-validation-name="val1"/>
          <table:table-cell table:style-name="ce15" table:content-validation-name="val2"/>
          <table:table-cell table:style-name="ce15"/>
          <table:table-cell table:style-name="ce48"/>
          <table:table-cell/>
          <table:table-cell table:style-name="ce54"/>
          <table:table-cell table:style-name="ce63" table:content-validation-name="val3"/>
          <table:table-cell table:style-name="ce65"/>
          <table:table-cell table:style-name="ce69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4-29" calcext:value-type="date">
            <text:p>29/4/2026</text:p>
          </table:table-cell>
          <table:table-cell table:style-name="ce15" table:content-validation-name="val1"/>
          <table:table-cell table:style-name="ce15" table:content-validation-name="val2"/>
          <table:table-cell table:style-name="ce15"/>
          <table:table-cell table:style-name="ce48"/>
          <table:table-cell/>
          <table:table-cell table:style-name="ce54"/>
          <table:table-cell table:style-name="ce63" table:content-validation-name="val3"/>
          <table:table-cell table:style-name="ce65"/>
          <table:table-cell table:style-name="ce69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1"/>
          <table:table-cell table:style-name="ce15" table:content-validation-name="val2"/>
          <table:table-cell table:style-name="ce15"/>
          <table:table-cell table:style-name="ce48"/>
          <table:table-cell/>
          <table:table-cell table:style-name="ce55"/>
          <table:table-cell table:style-name="ce64" table:content-validation-name="val3"/>
          <table:table-cell table:style-name="ce64"/>
          <table:table-cell table:style-name="ce70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1"/>
          <table:table-cell table:style-name="ce15" table:content-validation-name="val2"/>
          <table:table-cell table:style-name="ce15"/>
          <table:table-cell table:style-name="ce48"/>
          <table:table-cell table:number-columns-repeated="4"/>
          <table:table-cell table:style-name="ce51" table:formula="of:=SUM([.K11:.K22])" office:value-type="float" office:value="362.2" calcext:value-type="float">
            <text:p><text:s/>R$ 362,2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1"/>
          <table:table-cell table:style-name="ce15" table:content-validation-name="val2"/>
          <table:table-cell table:style-name="ce15"/>
          <table:table-cell table:style-name="ce48"/>
          <table:table-cell table:number-columns-repeated="6"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1"/>
          <table:table-cell table:style-name="ce15" table:content-validation-name="val2"/>
          <table:table-cell table:style-name="ce15"/>
          <table:table-cell table:style-name="ce48"/>
          <table:table-cell table:number-columns-repeated="6"/>
          <table:table-cell table:style-name="ce25"/>
          <table:table-cell table:style-name="ce79"/>
          <table:table-cell table:style-name="ce83"/>
          <table:table-cell table:style-name="ce70"/>
          <table:table-cell table:style-name="Default" table:number-columns-repeated="16368"/>
        </table:table-row>
        <table:table-row table:style-name="ro1" table:number-rows-repeated="6">
          <table:table-cell/>
          <table:table-cell table:style-name="ce9"/>
          <table:table-cell table:style-name="ce15" table:content-validation-name="val1"/>
          <table:table-cell table:style-name="ce15" table:content-validation-name="val2"/>
          <table:table-cell table:style-name="ce15"/>
          <table:table-cell table:style-name="ce48"/>
          <table:table-cell table:number-columns-repeated="10"/>
          <table:table-cell table:style-name="Default" table:number-columns-repeated="16368"/>
        </table:table-row>
        <table:table-row table:style-name="ro1">
          <table:table-cell/>
          <table:table-cell table:style-name="ce10"/>
          <table:table-cell table:style-name="ce17" table:content-validation-name="val1"/>
          <table:table-cell table:style-name="ce17" table:content-validation-name="val2"/>
          <table:table-cell table:style-name="ce17"/>
          <table:table-cell table:style-name="ce49"/>
          <table:table-cell table:number-columns-repeated="10"/>
          <table:table-cell table:style-name="Default" table:number-columns-repeated="16368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Alimentação</text:p>
          </table:table-cell>
          <table:table-cell table:style-name="ce20" office:value-type="string" calcext:value-type="string">
            <text:p>Doces</text:p>
          </table:table-cell>
          <table:table-cell table:style-name="ce31" table:formula="of:=SUMIF([.$D$11:.$D$32];[.C35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6" office:value-type="string" calcext:value-type="string">
            <text:p>Internet</text:p>
          </table:table-cell>
          <table:table-cell table:style-name="ce31" table:formula="of:=SUMIF([.$I$11:.$I$22];[.H35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35:.D39])" office:value-type="float" office:value="0" calcext:value-type="float">
            <text:p><text:s/>R$ -   </text:p>
          </table:table-cell>
          <table:table-cell office:value-type="string" calcext:value-type="string">
            <text:p>Padaria </text:p>
          </table:table-cell>
          <table:table-cell table:formula="of:=SUMIF([.$D$11:.$D$32];[.C36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Planos/assinaturas</text:p>
          </table:table-cell>
          <table:table-cell table:style-name="ce32" table:formula="of:=SUMIF([.$I$11:.$I$22];[.H36];[.$K$11:.$K$22])" office:value-type="float" office:value="52" calcext:value-type="float">
            <text:p><text:s/>R$ 52,00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<text:s/>Almoço fora</text:p>
          </table:table-cell>
          <table:table-cell table:formula="of:=SUMIF([.$D$11:.$D$32];[.C37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Agua</text:p>
          </table:table-cell>
          <table:table-cell table:style-name="ce32" table:formula="of:=SUMIF([.$I$11:.$I$22];[.H37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Lanches / Snacks</text:p>
          </table:table-cell>
          <table:table-cell table:formula="of:=SUMIF([.$D$11:.$D$32];[.C38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Luz</text:p>
          </table:table-cell>
          <table:table-cell table:style-name="ce32" table:formula="of:=SUMIF([.$I$11:.$I$22];[.H38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2"/>
          <table:table-cell table:style-name="ce33" table:formula="of:=SUMIF([.$D$11:.$D$32];[.C39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Gasolina</text:p>
          </table:table-cell>
          <table:table-cell table:style-name="ce32" table:formula="of:=SUMIF([.$I$11:.$I$22];[.H39];[.$K$11:.$K$22])" office:value-type="float" office:value="56.7" calcext:value-type="float">
            <text:p><text:s/>R$ 56,70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3"/>
          <table:table-cell table:style-name="ce34"/>
          <table:table-cell table:number-columns-repeated="3"/>
          <table:table-cell table:style-name="ce57" office:value-type="string" calcext:value-type="string">
            <text:p>Dizimos</text:p>
          </table:table-cell>
          <table:table-cell table:style-name="ce32" table:formula="of:=SUMIF([.$I$11:.$I$22];[.H40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Lazer</text:p>
          </table:table-cell>
          <table:table-cell table:style-name="ce20" office:value-type="string" calcext:value-type="string">
            <text:p>Delivery (iFood, etc)</text:p>
          </table:table-cell>
          <table:table-cell table:style-name="ce31" table:formula="of:=SUMIF([.$D$11:.$D$32];[.C41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Ofertas</text:p>
          </table:table-cell>
          <table:table-cell table:style-name="ce32" table:formula="of:=SUMIF([.$I$11:.$I$22];[.H41];[.$K$11:.$K$22])" office:value-type="float" office:value="40" calcext:value-type="float">
            <text:p><text:s/>R$ 40,00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2" table:formula="of:=SUBTOTAL(9;[.D41:.D48])" office:value-type="float" office:value="39" calcext:value-type="float">
            <text:p><text:s/>R$ 39,00 </text:p>
          </table:table-cell>
          <table:table-cell office:value-type="string" calcext:value-type="string">
            <text:p>Cinema / Shows</text:p>
          </table:table-cell>
          <table:table-cell table:formula="of:=SUMIF([.$D$11:.$D$32];[.C42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Parcelas</text:p>
          </table:table-cell>
          <table:table-cell table:style-name="ce32" table:formula="of:=SUMIF([.$I$11:.$I$22];[.H42];[.$K$11:.$K$22])" office:value-type="float" office:value="213.5" calcext:value-type="float">
            <text:p><text:s/>R$ 213,50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asseios / Viagens</text:p>
          </table:table-cell>
          <table:table-cell table:formula="of:=SUMIF([.$D$11:.$D$32];[.C43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Saúde</text:p>
          </table:table-cell>
          <table:table-cell table:style-name="ce32" table:formula="of:=SUMIF([.$I$11:.$I$22];[.H43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Compras por impulso (não essenciais)</text:p>
          </table:table-cell>
          <table:table-cell table:formula="of:=SUMIF([.$D$11:.$D$32];[.C44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Investimento</text:p>
          </table:table-cell>
          <table:table-cell table:style-name="ce32" table:formula="of:=SUMIF([.$I$11:.$I$22];[.H44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<text:s/>Jogos / Games / Aplicativos pagos</text:p>
          </table:table-cell>
          <table:table-cell table:formula="of:=SUMIF([.$D$11:.$D$32];[.C45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8"/>
          <table:table-cell table:style-name="ce33" table:formula="of:=SUMIF([.$I$11:.$I$22];[.H45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Saídas com amigos</text:p>
          </table:table-cell>
          <table:table-cell table:formula="of:=SUMIF([.$D$11:.$D$32];[.C46];[.$F$11:.$F$32])" office:value-type="float" office:value="39" calcext:value-type="float">
            <text:p><text:s/>R$ 39,00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4"/>
          <table:table-cell table:style-name="ce35" table:formula="of:=SUMIF([.$D$11:.$D$32];[.C4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2"/>
          <table:table-cell table:style-name="ce33" table:formula="of:=SUMIF([.$D$11:.$D$32];[.C4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Despesas</text:p>
          </table:table-cell>
          <table:table-cell table:style-name="ce20" office:value-type="string" calcext:value-type="string">
            <text:p>Presentes e datas comemorativas</text:p>
          </table:table-cell>
          <table:table-cell table:style-name="ce31" table:formula="of:=SUMIF([.$D$11:.$D$32];[.C5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50:.D56])" office:value-type="float" office:value="226.24" calcext:value-type="float">
            <text:p><text:s/>R$ 226,24 </text:p>
          </table:table-cell>
          <table:table-cell office:value-type="string" calcext:value-type="string">
            <text:p>Doações / Contribuições</text:p>
          </table:table-cell>
          <table:table-cell table:formula="of:=SUMIF([.$D$11:.$D$32];[.C51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Taxas bancárias / Pix por engano</text:p>
          </table:table-cell>
          <table:table-cell table:formula="of:=SUMIF([.$D$11:.$D$32];[.C5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Compras online aleatórias</text:p>
          </table:table-cell>
          <table:table-cell table:formula="of:=SUMIF([.$D$11:.$D$32];[.C53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anutenção da casa (lâmpada, pilha, etc)</text:p>
          </table:table-cell>
          <table:table-cell table:formula="of:=SUMIF([.$D$11:.$D$32];[.C5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Gastos pessoais (roupas, acessórios)</text:p>
          </table:table-cell>
          <table:table-cell table:formula="of:=SUMIF([.$D$11:.$D$32];[.C55];[.$F$11:.$F$32])" office:value-type="float" office:value="226.24" calcext:value-type="float">
            <text:p><text:s/>R$ 226,24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5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Transporte</text:p>
          </table:table-cell>
          <table:table-cell table:style-name="ce20" office:value-type="string" calcext:value-type="string">
            <text:p>Acessório</text:p>
          </table:table-cell>
          <table:table-cell table:style-name="ce31" table:formula="of:=SUMIF([.$D$11:.$D$32];[.C5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58:.D64])" office:value-type="float" office:value="296.34" calcext:value-type="float">
            <text:p><text:s/>R$ 296,34 </text:p>
          </table:table-cell>
          <table:table-cell office:value-type="string" calcext:value-type="string">
            <text:p>Uber / Táxi</text:p>
          </table:table-cell>
          <table:table-cell table:formula="of:=SUMIF([.$D$11:.$D$32];[.C59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Ônibus / Metrô</text:p>
          </table:table-cell>
          <table:table-cell table:formula="of:=SUMIF([.$D$11:.$D$32];[.C6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Estacionamento</text:p>
          </table:table-cell>
          <table:table-cell table:formula="of:=SUMIF([.$D$11:.$D$32];[.C61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anutenção (óleo, pneu, etc)</text:p>
          </table:table-cell>
          <table:table-cell table:formula="of:=SUMIF([.$D$11:.$D$32];[.C62];[.$F$11:.$F$32])" office:value-type="float" office:value="57.92" calcext:value-type="float">
            <text:p><text:s/>R$ 57,92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ultas / Documentação</text:p>
          </table:table-cell>
          <table:table-cell table:formula="of:=SUMIF([.$D$11:.$D$32];[.C63];[.$F$11:.$F$32])" office:value-type="float" office:value="238.42" calcext:value-type="float">
            <text:p><text:s/>R$ 238,42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6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Educação</text:p>
          </table:table-cell>
          <table:table-cell table:style-name="ce20" office:value-type="string" calcext:value-type="string">
            <text:p>Livros </text:p>
          </table:table-cell>
          <table:table-cell table:style-name="ce31" table:formula="of:=SUMIF([.$D$11:.$D$32];[.C6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66:.D72])" office:value-type="float" office:value="0" calcext:value-type="float">
            <text:p><text:s/>R$ -   </text:p>
          </table:table-cell>
          <table:table-cell office:value-type="string" calcext:value-type="string">
            <text:p>Cursos online (Udemy, Alura, etc)</text:p>
          </table:table-cell>
          <table:table-cell table:formula="of:=SUMIF([.$D$11:.$D$32];[.C6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aterial escolar / didático</text:p>
          </table:table-cell>
          <table:table-cell table:formula="of:=SUMIF([.$D$11:.$D$32];[.C6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Apostilas</text:p>
          </table:table-cell>
          <table:table-cell table:formula="of:=SUMIF([.$D$11:.$D$32];[.C69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Internet dedicada para estudos</text:p>
          </table:table-cell>
          <table:table-cell table:formula="of:=SUMIF([.$D$11:.$D$32];[.C7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lataformas de aprendizado </text:p>
          </table:table-cell>
          <table:table-cell table:formula="of:=SUMIF([.$D$11:.$D$32];[.C71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7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Saúde</text:p>
          </table:table-cell>
          <table:table-cell table:style-name="ce20" office:value-type="string" calcext:value-type="string">
            <text:p>Medicamentos</text:p>
          </table:table-cell>
          <table:table-cell table:style-name="ce31" table:formula="of:=SUMIF([.$D$11:.$D$32];[.C7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74:.D80])" office:value-type="float" office:value="0" calcext:value-type="float">
            <text:p><text:s/>R$ -   </text:p>
          </table:table-cell>
          <table:table-cell office:value-type="string" calcext:value-type="string">
            <text:p>Consultas médicas / exames</text:p>
          </table:table-cell>
          <table:table-cell table:formula="of:=SUMIF([.$D$11:.$D$32];[.C75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Óculos / lentes</text:p>
          </table:table-cell>
          <table:table-cell table:formula="of:=SUMIF([.$D$11:.$D$32];[.C7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rodutos de higiene e cuidados pessoais</text:p>
          </table:table-cell>
          <table:table-cell table:formula="of:=SUMIF([.$D$11:.$D$32];[.C7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3"/>
          <table:table-cell table:formula="of:=SUMIF([.$D$11:.$D$32];[.C7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3"/>
          <table:table-cell table:formula="of:=SUMIF([.$D$11:.$D$32];[.C79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8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Imprevistos</text:p>
          </table:table-cell>
          <table:table-cell table:style-name="ce20" office:value-type="string" calcext:value-type="string">
            <text:p>Emergência médica ou odontológica</text:p>
          </table:table-cell>
          <table:table-cell table:style-name="ce31" table:formula="of:=SUMIF([.$D$11:.$D$32];[.C8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82:.D88])" office:value-type="float" office:value="0" calcext:value-type="float">
            <text:p><text:s/>R$ -   </text:p>
          </table:table-cell>
          <table:table-cell office:value-type="string" calcext:value-type="string">
            <text:p>Equipamento quebrado (celular, notebook)</text:p>
          </table:table-cell>
          <table:table-cell table:formula="of:=SUMIF([.$D$11:.$D$32];[.C83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erda de documentos / taxas</text:p>
          </table:table-cell>
          <table:table-cell table:formula="of:=SUMIF([.$D$11:.$D$32];[.C8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Atrasos em contas com juros</text:p>
          </table:table-cell>
          <table:table-cell table:formula="of:=SUMIF([.$D$11:.$D$32];[.C85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Conserto urgente (casa, carro, etc)</text:p>
          </table:table-cell>
          <table:table-cell table:formula="of:=SUMIF([.$D$11:.$D$32];[.C8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Ajuda financeira a alguém (urgente)</text:p>
          </table:table-cell>
          <table:table-cell table:formula="of:=SUMIF([.$D$11:.$D$32];[.C8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8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Investimento</text:p>
          </table:table-cell>
          <table:table-cell table:style-name="ce20"/>
          <table:table-cell table:style-name="ce31" table:formula="of:=SUMIF([.C11:.C32];[.B90];[.F11:.F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</table:table>
      <table:table table:name="Mar" table:style-name="ta3">
        <table:table-column table:style-name="co1" table:default-cell-style-name="Default"/>
        <table:table-column table:style-name="co2" table:default-cell-style-name="Default"/>
        <table:table-column table:style-name="co16" table:default-cell-style-name="ce21"/>
        <table:table-column table:style-name="co20" table:default-cell-style-name="ce32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3" table:number-columns-repeated="4" table:default-cell-style-name="Default"/>
        <table:table-column table:style-name="co15" table:number-columns-repeated="16368"/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" office:value-type="string" calcext:value-type="string">
            <text:p>MAR</text:p>
          </table:table-cell>
          <table:table-cell table:style-name="ce13" office:value-type="string" calcext:value-type="string">
            <text:p>entradas</text:p>
          </table:table-cell>
          <table:table-cell table:style-name="ce26" office:value-type="string" calcext:value-type="string">
            <text:p>valor</text:p>
          </table:table-cell>
          <table:table-cell table:style-name="ce13"/>
          <table:table-cell table:style-name="ce7" office:value-type="string" calcext:value-type="string">
            <text:p>Saldo mensal</text:p>
          </table:table-cell>
          <table:table-cell/>
          <table:table-cell table:style-name="ce50" table:number-columns-spanned="4" table:number-rows-spanned="1"/>
          <table:covered-table-cell table:number-columns-repeated="3" table:style-name="ce59"/>
          <table:table-cell table:number-columns-repeated="5"/>
          <table:table-cell table:style-name="Default" table:number-columns-repeated="16368"/>
        </table:table-row>
        <table:table-row table:style-name="ro1">
          <table:table-cell/>
          <table:table-cell table:style-name="ce2" office:value-type="string" calcext:value-type="string">
            <text:p>salário</text:p>
          </table:table-cell>
          <table:table-cell table:style-name="ce14"/>
          <table:table-cell table:style-name="ce27" office:value-type="float" office:value="500" calcext:value-type="float">
            <text:p><text:s/>R$ 500,00 </text:p>
          </table:table-cell>
          <table:table-cell table:style-name="ce36" office:value-type="string" office:string-value="entradas" calcext:value-type="string">
            <text:p><text:s/>entradas </text:p>
          </table:table-cell>
          <table:table-cell table:style-name="ce41" table:formula="of:=SUM([.D3];[.D5];[.D6];[.D7];[.D4])" office:value-type="float" office:value="2080.77" calcext:value-type="float">
            <text:p><text:s/>R$ 2.080,77 </text:p>
          </table:table-cell>
          <table:table-cell table:number-columns-repeated="2"/>
          <table:table-cell table:style-name="ce1" office:value-type="string" calcext:value-type="string">
            <text:p>data</text:p>
          </table:table-cell>
          <table:table-cell/>
          <table:table-cell table:style-name="ce66" office:value-type="string" calcext:value-type="string">
            <text:p>dinheiro guardado</text:p>
          </table:table-cell>
          <table:table-cell table:style-name="ce71"/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3" office:value-type="string" calcext:value-type="string">
            <text:p>Fotografia</text:p>
          </table:table-cell>
          <table:table-cell table:style-name="ce15"/>
          <table:table-cell table:style-name="ce28" table:formula="of:=SUM([.P10:.P25])" office:value-type="float" office:value="0" calcext:value-type="float">
            <text:p><text:s/>R$ -   </text:p>
          </table:table-cell>
          <table:table-cell table:style-name="ce37" office:value-type="string" office:string-value="gastos variados" calcext:value-type="string">
            <text:p><text:s/>gastos variados </text:p>
          </table:table-cell>
          <table:table-cell table:style-name="ce42" table:formula="of:=SUM([.F11:.F32])" office:value-type="float" office:value="1203.63" calcext:value-type="float">
            <text:p><text:s/>R$ 1.203,63 </text:p>
          </table:table-cell>
          <table:table-cell table:number-columns-repeated="2"/>
          <table:table-cell table:style-name="ce60" table:formula="of:=TODAY()" office:value-type="date" office:date-value="2026-06-21" calcext:value-type="date">
            <text:p>21/6/2026</text:p>
          </table:table-cell>
          <table:table-cell/>
          <table:table-cell table:style-name="ce66" office:value-type="string" calcext:value-type="string">
            <text:p>dinheiro para inestimento futuro</text:p>
          </table:table-cell>
          <table:table-cell table:style-name="ce71"/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4" office:value-type="string" calcext:value-type="string">
            <text:p>extra 2</text:p>
          </table:table-cell>
          <table:table-cell table:style-name="ce16"/>
          <table:table-cell table:style-name="ce29" office:value-type="float" office:value="223" calcext:value-type="float">
            <text:p><text:s/>R$ 223,00 </text:p>
          </table:table-cell>
          <table:table-cell table:style-name="ce38" office:value-type="string" office:string-value="entradas fotografia" calcext:value-type="string">
            <text:p><text:s/>entradas fotografia </text:p>
          </table:table-cell>
          <table:table-cell table:style-name="ce43" table:formula="of:=[.D4]" office:value-type="float" office:value="0" calcext:value-type="float">
            <text:p><text:s/>R$ -   </text:p>
          </table:table-cell>
          <table:table-cell table:number-columns-repeated="2"/>
          <table:table-cell table:style-name="ce61" office:value-type="string" calcext:value-type="string">
            <text:p>ultimo update</text:p>
          </table:table-cell>
          <table:table-cell/>
          <table:table-cell table:style-name="ce66" office:value-type="string" calcext:value-type="string">
            <text:p>dinheiro para lente</text:p>
          </table:table-cell>
          <table:table-cell table:style-name="ce71" table:formula="of:=SUM([.P10:.P25])" office:value-type="float" office:value="0" calcext:value-type="float">
            <text:p><text:s/>R$ -   </text:p>
          </table:table-cell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4" office:value-type="string" calcext:value-type="string">
            <text:p>extra 3</text:p>
          </table:table-cell>
          <table:table-cell table:style-name="ce16"/>
          <table:table-cell table:style-name="ce29"/>
          <table:table-cell table:style-name="ce39" office:value-type="string" office:string-value="saidas fixas" calcext:value-type="string">
            <text:p><text:s/>saidas fixas </text:p>
          </table:table-cell>
          <table:table-cell table:style-name="ce44" table:formula="of:=SUM([.K11:.K22])" office:value-type="float" office:value="434.6" calcext:value-type="float">
            <text:p><text:s/>R$ 434,60 </text:p>
          </table:table-cell>
          <table:table-cell table:number-columns-repeated="2"/>
          <table:table-cell table:style-name="ce62" office:value-type="date" office:date-value="2025-07-09" calcext:value-type="date">
            <text:p>9/7/2025</text:p>
          </table:table-cell>
          <table:table-cell/>
          <table:table-cell table:style-name="ce67" office:value-type="string" calcext:value-type="string">
            <text:p>para passar o mês, tenho =&gt;</text:p>
          </table:table-cell>
          <table:table-cell table:style-name="ce72"/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5" office:value-type="string" calcext:value-type="string">
            <text:p>Saldo</text:p>
          </table:table-cell>
          <table:table-cell table:style-name="ce17"/>
          <table:table-cell table:style-name="ce30" table:formula="of:=[$Fev.F7]" office:value-type="float" office:value="1357.77" calcext:value-type="float">
            <text:p><text:s/>R$ 1.357,77 </text:p>
          </table:table-cell>
          <table:table-cell table:style-name="ce40" office:value-type="string" office:string-value="saldo" calcext:value-type="string">
            <text:p><text:s/>saldo </text:p>
          </table:table-cell>
          <table:table-cell table:style-name="ce45" table:formula="of:=[.F3]-([.F4]+[.F6])" office:value-type="float" office:value="442.54" calcext:value-type="float">
            <text:p><text:s/>R$ 442,54 </text:p>
          </table:table-cell>
          <table:table-cell table:number-columns-repeated="10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Variados</text:p>
          </table:table-cell>
          <table:covered-table-cell table:number-columns-repeated="3" table:style-name="ce18"/>
          <table:covered-table-cell table:style-name="ce46"/>
          <table:table-cell/>
          <table:table-cell table:style-name="ce52" office:value-type="string" calcext:value-type="string" table:number-columns-spanned="4" table:number-rows-spanned="1">
            <text:p>Fixos</text:p>
          </table:table-cell>
          <table:covered-table-cell table:number-columns-repeated="3" table:style-name="ce52"/>
          <table:table-cell/>
          <table:table-cell table:style-name="ce73" office:value-type="string" calcext:value-type="string">
            <text:p>Eventos</text:p>
          </table:table-cell>
          <table:table-cell table:style-name="ce76" office:value-type="string" calcext:value-type="string">
            <text:p>Data</text:p>
          </table:table-cell>
          <table:table-cell table:style-name="ce80" office:value-type="string" calcext:value-type="string">
            <text:p>Descrição</text:p>
          </table:table-cell>
          <table:table-cell table:style-name="ce84" office:value-type="string" calcext:value-type="string">
            <text:p>Entradas</text:p>
          </table:table-cell>
          <table:table-cell table:style-name="Default" table:number-columns-repeated="16368"/>
        </table:table-row>
        <table:table-row table:style-name="ro1">
          <table:table-cell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topico</text:p>
          </table:table-cell>
          <table:table-cell table:style-name="ce7" office:value-type="string" calcext:value-type="string">
            <text:p>sub-tópico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valor</text:p>
          </table:table-cell>
          <table:table-cell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Topico</text:p>
          </table:table-cell>
          <table:table-cell table:style-name="ce7" office:value-type="string" calcext:value-type="string">
            <text:p>sub-tópico</text:p>
          </table:table-cell>
          <table:table-cell table:style-name="ce7" office:value-type="string" calcext:value-type="string">
            <text:p>valor</text:p>
          </table:table-cell>
          <table:table-cell/>
          <table:table-cell table:style-name="ce74"/>
          <table:table-cell table:style-name="ce77"/>
          <table:table-cell table:style-name="ce81"/>
          <table:table-cell table:style-name="ce68"/>
          <table:table-cell table:style-name="Default" table:number-columns-repeated="16368"/>
        </table:table-row>
        <table:table-row table:style-name="ro1">
          <table:table-cell/>
          <table:table-cell table:style-name="ce8" office:value-type="date" office:date-value="2026-03-02" calcext:value-type="date">
            <text:p>2/3/2026</text:p>
          </table:table-cell>
          <table:table-cell table:style-name="ce19" table:content-validation-name="val4" office:value-type="string" calcext:value-type="string">
            <text:p>Educação</text:p>
          </table:table-cell>
          <table:table-cell table:style-name="ce19" table:content-validation-name="val5" office:value-type="string" calcext:value-type="string">
            <text:p>Material escolar / didático</text:p>
          </table:table-cell>
          <table:table-cell table:style-name="ce19" office:value-type="string" calcext:value-type="string">
            <text:p>pasta, calculadora</text:p>
          </table:table-cell>
          <table:table-cell table:style-name="ce47" office:value-type="float" office:value="34.45" calcext:value-type="float">
            <text:p><text:s/>R$ 34,45 </text:p>
          </table:table-cell>
          <table:table-cell/>
          <table:table-cell table:style-name="ce53" office:value-type="date" office:date-value="2026-03-03" calcext:value-type="date">
            <text:p>3/3/2026</text:p>
          </table:table-cell>
          <table:table-cell table:style-name="ce63" table:content-validation-name="val6" office:value-type="string" calcext:value-type="string">
            <text:p>Gasolina</text:p>
          </table:table-cell>
          <table:table-cell table:style-name="ce63"/>
          <table:table-cell table:style-name="ce68" office:value-type="float" office:value="55.8" calcext:value-type="float">
            <text:p><text:s/>R$ 55,8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3-06" calcext:value-type="date">
            <text:p>6/3/2026</text:p>
          </table:table-cell>
          <table:table-cell table:style-name="ce15" table:content-validation-name="val4" office:value-type="string" calcext:value-type="string">
            <text:p>Transporte</text:p>
          </table:table-cell>
          <table:table-cell table:style-name="ce15" table:content-validation-name="val5" office:value-type="string" calcext:value-type="string">
            <text:p>Manutenção (óleo, pneu, etc)</text:p>
          </table:table-cell>
          <table:table-cell table:style-name="ce15" office:value-type="string" calcext:value-type="string">
            <text:p>relação</text:p>
          </table:table-cell>
          <table:table-cell table:style-name="ce48" office:value-type="float" office:value="210" calcext:value-type="float">
            <text:p><text:s/>R$ 210,00 </text:p>
          </table:table-cell>
          <table:table-cell/>
          <table:table-cell table:style-name="ce54" office:value-type="date" office:date-value="2026-03-07" calcext:value-type="date">
            <text:p>7/3/2026</text:p>
          </table:table-cell>
          <table:table-cell table:style-name="ce63" table:content-validation-name="val6" office:value-type="string" calcext:value-type="string">
            <text:p>Planos/assinaturas</text:p>
          </table:table-cell>
          <table:table-cell table:style-name="ce65" office:value-type="string" calcext:value-type="string">
            <text:p>spotify</text:p>
          </table:table-cell>
          <table:table-cell table:style-name="ce69" office:value-type="float" office:value="6.8" calcext:value-type="float">
            <text:p><text:s/>R$ 6,8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3-07" calcext:value-type="date">
            <text:p>7/3/2026</text:p>
          </table:table-cell>
          <table:table-cell table:style-name="ce15" table:content-validation-name="val4" office:value-type="string" calcext:value-type="string">
            <text:p>Lazer</text:p>
          </table:table-cell>
          <table:table-cell table:style-name="ce15" table:content-validation-name="val5" office:value-type="string" calcext:value-type="string">
            <text:p>Delivery (iFood, etc)</text:p>
          </table:table-cell>
          <table:table-cell table:style-name="ce15" office:value-type="string" calcext:value-type="string">
            <text:p>monster</text:p>
          </table:table-cell>
          <table:table-cell table:style-name="ce48" table:formula="of:=8.44*2" office:value-type="float" office:value="16.88" calcext:value-type="float">
            <text:p><text:s/>R$ 16,88 </text:p>
          </table:table-cell>
          <table:table-cell/>
          <table:table-cell table:style-name="ce54" office:value-type="date" office:date-value="2026-03-07" calcext:value-type="date">
            <text:p>7/3/2026</text:p>
          </table:table-cell>
          <table:table-cell table:style-name="ce63" table:content-validation-name="val6" office:value-type="string" calcext:value-type="string">
            <text:p>Internet</text:p>
          </table:table-cell>
          <table:table-cell table:style-name="ce65"/>
          <table:table-cell table:style-name="ce69" office:value-type="float" office:value="30" calcext:value-type="float">
            <text:p><text:s/>R$ 30,0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3-07" calcext:value-type="date">
            <text:p>7/3/2026</text:p>
          </table:table-cell>
          <table:table-cell table:style-name="ce15" table:content-validation-name="val4" office:value-type="string" calcext:value-type="string">
            <text:p>Lazer</text:p>
          </table:table-cell>
          <table:table-cell table:style-name="ce15" table:content-validation-name="val5" office:value-type="string" calcext:value-type="string">
            <text:p>Delivery (iFood, etc)</text:p>
          </table:table-cell>
          <table:table-cell table:style-name="ce15" office:value-type="string" calcext:value-type="string">
            <text:p>churrasco</text:p>
          </table:table-cell>
          <table:table-cell table:style-name="ce48" office:value-type="float" office:value="31" calcext:value-type="float">
            <text:p><text:s/>R$ 31,00 </text:p>
          </table:table-cell>
          <table:table-cell/>
          <table:table-cell table:style-name="ce54" office:value-type="date" office:date-value="2026-03-08" calcext:value-type="date">
            <text:p>8/3/2026</text:p>
          </table:table-cell>
          <table:table-cell table:style-name="ce63" table:content-validation-name="val6" office:value-type="string" calcext:value-type="string">
            <text:p>Dizimos</text:p>
          </table:table-cell>
          <table:table-cell table:style-name="ce65"/>
          <table:table-cell table:style-name="ce69" office:value-type="float" office:value="50" calcext:value-type="float">
            <text:p><text:s/>R$ 50,0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3-11" calcext:value-type="date">
            <text:p>11/3/2026</text:p>
          </table:table-cell>
          <table:table-cell table:style-name="ce15" table:content-validation-name="val4" office:value-type="string" calcext:value-type="string">
            <text:p>Despesas</text:p>
          </table:table-cell>
          <table:table-cell table:style-name="ce15" table:content-validation-name="val5" office:value-type="string" calcext:value-type="string">
            <text:p>Compras online aleatórias</text:p>
          </table:table-cell>
          <table:table-cell table:style-name="ce15" office:value-type="string" calcext:value-type="string">
            <text:p>balaclava</text:p>
          </table:table-cell>
          <table:table-cell table:style-name="ce48" office:value-type="float" office:value="19.3" calcext:value-type="float">
            <text:p><text:s/>R$ 19,30 </text:p>
          </table:table-cell>
          <table:table-cell/>
          <table:table-cell table:style-name="ce54" office:value-type="date" office:date-value="2026-03-18" calcext:value-type="date">
            <text:p>18/3/2026</text:p>
          </table:table-cell>
          <table:table-cell table:style-name="ce63" table:content-validation-name="val6" office:value-type="string" calcext:value-type="string">
            <text:p>Planos/assinaturas</text:p>
          </table:table-cell>
          <table:table-cell table:style-name="ce65" office:value-type="string" calcext:value-type="string">
            <text:p>volei</text:p>
          </table:table-cell>
          <table:table-cell table:style-name="ce69" office:value-type="float" office:value="40" calcext:value-type="float">
            <text:p><text:s/>R$ 40,0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3-17" calcext:value-type="date">
            <text:p>17/3/2026</text:p>
          </table:table-cell>
          <table:table-cell table:style-name="ce15" table:content-validation-name="val4" office:value-type="string" calcext:value-type="string">
            <text:p>Imprevistos</text:p>
          </table:table-cell>
          <table:table-cell table:style-name="ce15" table:content-validation-name="val5" office:value-type="string" calcext:value-type="string">
            <text:p>Conserto urgente (casa, carro, etc)</text:p>
          </table:table-cell>
          <table:table-cell table:style-name="ce15" office:value-type="string" calcext:value-type="string">
            <text:p>moto</text:p>
          </table:table-cell>
          <table:table-cell table:style-name="ce48" office:value-type="float" office:value="880" calcext:value-type="float">
            <text:p><text:s/>R$ 880,00 </text:p>
          </table:table-cell>
          <table:table-cell/>
          <table:table-cell table:style-name="ce54" office:value-type="date" office:date-value="2026-03-10" calcext:value-type="date">
            <text:p>10/3/2026</text:p>
          </table:table-cell>
          <table:table-cell table:style-name="ce63" table:content-validation-name="val6" office:value-type="string" calcext:value-type="string">
            <text:p>Parcelas</text:p>
          </table:table-cell>
          <table:table-cell table:style-name="ce65" office:value-type="string" calcext:value-type="string">
            <text:p>cannon</text:p>
          </table:table-cell>
          <table:table-cell table:style-name="ce69" office:value-type="float" office:value="149.5" calcext:value-type="float">
            <text:p><text:s/>R$ 149,5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3-20" calcext:value-type="date">
            <text:p>20/3/2026</text:p>
          </table:table-cell>
          <table:table-cell table:style-name="ce15" table:content-validation-name="val4" office:value-type="string" calcext:value-type="string">
            <text:p>alimentação</text:p>
          </table:table-cell>
          <table:table-cell table:style-name="ce15" table:content-validation-name="val5" office:value-type="string" calcext:value-type="string">
            <text:p>Padaria </text:p>
          </table:table-cell>
          <table:table-cell table:style-name="ce15" office:value-type="string" calcext:value-type="string">
            <text:p>hamburgao</text:p>
          </table:table-cell>
          <table:table-cell table:style-name="ce48" office:value-type="float" office:value="12" calcext:value-type="float">
            <text:p><text:s/>R$ 12,00 </text:p>
          </table:table-cell>
          <table:table-cell/>
          <table:table-cell table:style-name="ce54" office:value-type="date" office:date-value="2026-03-22" calcext:value-type="date">
            <text:p>22/3/2026</text:p>
          </table:table-cell>
          <table:table-cell table:style-name="ce63" table:content-validation-name="val6" office:value-type="string" calcext:value-type="string">
            <text:p>Planos/assinaturas</text:p>
          </table:table-cell>
          <table:table-cell table:style-name="ce65"/>
          <table:table-cell table:style-name="ce69" office:value-type="float" office:value="67.5" calcext:value-type="float">
            <text:p><text:s/>R$ 67,5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4"/>
          <table:table-cell table:style-name="ce15" table:content-validation-name="val5"/>
          <table:table-cell table:style-name="ce15"/>
          <table:table-cell table:style-name="ce48"/>
          <table:table-cell/>
          <table:table-cell table:style-name="ce54" office:value-type="date" office:date-value="2026-03-20" calcext:value-type="date">
            <text:p>20/3/2026</text:p>
          </table:table-cell>
          <table:table-cell table:style-name="ce63" table:content-validation-name="val6" office:value-type="string" calcext:value-type="string">
            <text:p>Barbeiro</text:p>
          </table:table-cell>
          <table:table-cell table:style-name="ce65"/>
          <table:table-cell table:style-name="ce69" office:value-type="float" office:value="35" calcext:value-type="float">
            <text:p><text:s/>R$ 35,0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 table:number-rows-repeated="2">
          <table:table-cell/>
          <table:table-cell table:style-name="ce9"/>
          <table:table-cell table:style-name="ce15" table:content-validation-name="val4"/>
          <table:table-cell table:style-name="ce15" table:content-validation-name="val5"/>
          <table:table-cell table:style-name="ce15"/>
          <table:table-cell table:style-name="ce48"/>
          <table:table-cell/>
          <table:table-cell table:style-name="ce54"/>
          <table:table-cell table:style-name="ce63" table:content-validation-name="val6"/>
          <table:table-cell table:style-name="ce65"/>
          <table:table-cell table:style-name="ce69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4-29" calcext:value-type="date">
            <text:p>29/4/2026</text:p>
          </table:table-cell>
          <table:table-cell table:style-name="ce15" table:content-validation-name="val4"/>
          <table:table-cell table:style-name="ce15" table:content-validation-name="val5"/>
          <table:table-cell table:style-name="ce15"/>
          <table:table-cell table:style-name="ce48"/>
          <table:table-cell/>
          <table:table-cell table:style-name="ce54"/>
          <table:table-cell table:style-name="ce63" table:content-validation-name="val6"/>
          <table:table-cell table:style-name="ce65"/>
          <table:table-cell table:style-name="ce69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4"/>
          <table:table-cell table:style-name="ce15" table:content-validation-name="val5"/>
          <table:table-cell table:style-name="ce15"/>
          <table:table-cell table:style-name="ce48"/>
          <table:table-cell/>
          <table:table-cell table:style-name="ce55"/>
          <table:table-cell table:style-name="ce64" table:content-validation-name="val6"/>
          <table:table-cell table:style-name="ce64"/>
          <table:table-cell table:style-name="ce70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4"/>
          <table:table-cell table:style-name="ce15" table:content-validation-name="val5"/>
          <table:table-cell table:style-name="ce15"/>
          <table:table-cell table:style-name="ce48"/>
          <table:table-cell table:number-columns-repeated="4"/>
          <table:table-cell table:style-name="ce51" table:formula="of:=SUM([.K11:.K22])" office:value-type="float" office:value="434.6" calcext:value-type="float">
            <text:p><text:s/>R$ 434,6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4"/>
          <table:table-cell table:style-name="ce15" table:content-validation-name="val5"/>
          <table:table-cell table:style-name="ce15"/>
          <table:table-cell table:style-name="ce48"/>
          <table:table-cell table:number-columns-repeated="6"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4"/>
          <table:table-cell table:style-name="ce15" table:content-validation-name="val5"/>
          <table:table-cell table:style-name="ce15"/>
          <table:table-cell table:style-name="ce48"/>
          <table:table-cell table:number-columns-repeated="6"/>
          <table:table-cell table:style-name="ce25"/>
          <table:table-cell table:style-name="ce79"/>
          <table:table-cell table:style-name="ce83"/>
          <table:table-cell table:style-name="ce70"/>
          <table:table-cell table:style-name="Default" table:number-columns-repeated="16368"/>
        </table:table-row>
        <table:table-row table:style-name="ro1" table:number-rows-repeated="6">
          <table:table-cell/>
          <table:table-cell table:style-name="ce9"/>
          <table:table-cell table:style-name="ce15" table:content-validation-name="val4"/>
          <table:table-cell table:style-name="ce15" table:content-validation-name="val5"/>
          <table:table-cell table:style-name="ce15"/>
          <table:table-cell table:style-name="ce48"/>
          <table:table-cell table:number-columns-repeated="10"/>
          <table:table-cell table:style-name="Default" table:number-columns-repeated="16368"/>
        </table:table-row>
        <table:table-row table:style-name="ro1">
          <table:table-cell/>
          <table:table-cell table:style-name="ce10"/>
          <table:table-cell table:style-name="ce17" table:content-validation-name="val4"/>
          <table:table-cell table:style-name="ce17" table:content-validation-name="val5"/>
          <table:table-cell table:style-name="ce17"/>
          <table:table-cell table:style-name="ce49"/>
          <table:table-cell table:number-columns-repeated="10"/>
          <table:table-cell table:style-name="Default" table:number-columns-repeated="16368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Alimentação</text:p>
          </table:table-cell>
          <table:table-cell table:style-name="ce20" office:value-type="string" calcext:value-type="string">
            <text:p>Doces</text:p>
          </table:table-cell>
          <table:table-cell table:style-name="ce31" table:formula="of:=SUMIF([.$D$11:.$D$32];[.C35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6" office:value-type="string" calcext:value-type="string">
            <text:p>Internet</text:p>
          </table:table-cell>
          <table:table-cell table:style-name="ce31" table:formula="of:=SUMIF([.$I$11:.$I$22];[.H35];[.$K$11:.$K$22])" office:value-type="float" office:value="30" calcext:value-type="float">
            <text:p><text:s/>R$ 30,00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35:.D39])" office:value-type="float" office:value="12" calcext:value-type="float">
            <text:p><text:s/>R$ 12,00 </text:p>
          </table:table-cell>
          <table:table-cell office:value-type="string" calcext:value-type="string">
            <text:p>Padaria </text:p>
          </table:table-cell>
          <table:table-cell table:formula="of:=SUMIF([.$D$11:.$D$32];[.C36];[.$F$11:.$F$32])" office:value-type="float" office:value="12" calcext:value-type="float">
            <text:p><text:s/>R$ 12,00 </text:p>
          </table:table-cell>
          <table:table-cell table:number-columns-repeated="3"/>
          <table:table-cell table:style-name="ce57" office:value-type="string" calcext:value-type="string">
            <text:p>Planos/assinaturas</text:p>
          </table:table-cell>
          <table:table-cell table:style-name="ce32" table:formula="of:=SUMIF([.$I$11:.$I$22];[.H36];[.$K$11:.$K$22])" office:value-type="float" office:value="114.3" calcext:value-type="float">
            <text:p><text:s/>R$ 114,30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<text:s/>Almoço fora</text:p>
          </table:table-cell>
          <table:table-cell table:formula="of:=SUMIF([.$D$11:.$D$32];[.C37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Agua</text:p>
          </table:table-cell>
          <table:table-cell table:style-name="ce32" table:formula="of:=SUMIF([.$I$11:.$I$22];[.H37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Lanches / Snacks</text:p>
          </table:table-cell>
          <table:table-cell table:formula="of:=SUMIF([.$D$11:.$D$32];[.C38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Luz</text:p>
          </table:table-cell>
          <table:table-cell table:style-name="ce32" table:formula="of:=SUMIF([.$I$11:.$I$22];[.H38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2"/>
          <table:table-cell table:style-name="ce33" table:formula="of:=SUMIF([.$D$11:.$D$32];[.C39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Gasolina</text:p>
          </table:table-cell>
          <table:table-cell table:style-name="ce32" table:formula="of:=SUMIF([.$I$11:.$I$22];[.H39];[.$K$11:.$K$22])" office:value-type="float" office:value="55.8" calcext:value-type="float">
            <text:p><text:s/>R$ 55,80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3"/>
          <table:table-cell table:style-name="ce34"/>
          <table:table-cell table:number-columns-repeated="3"/>
          <table:table-cell table:style-name="ce57" office:value-type="string" calcext:value-type="string">
            <text:p>Dizimos</text:p>
          </table:table-cell>
          <table:table-cell table:style-name="ce32" table:formula="of:=SUMIF([.$I$11:.$I$22];[.H40];[.$K$11:.$K$22])" office:value-type="float" office:value="50" calcext:value-type="float">
            <text:p><text:s/>R$ 50,00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Lazer</text:p>
          </table:table-cell>
          <table:table-cell table:style-name="ce20" office:value-type="string" calcext:value-type="string">
            <text:p>Delivery (iFood, etc)</text:p>
          </table:table-cell>
          <table:table-cell table:style-name="ce31" table:formula="of:=SUMIF([.$D$11:.$D$32];[.C41];[.$F$11:.$F$32])" office:value-type="float" office:value="47.88" calcext:value-type="float">
            <text:p><text:s/>R$ 47,88 </text:p>
          </table:table-cell>
          <table:table-cell table:number-columns-repeated="3"/>
          <table:table-cell table:style-name="ce57" office:value-type="string" calcext:value-type="string">
            <text:p>Ofertas</text:p>
          </table:table-cell>
          <table:table-cell table:style-name="ce32" table:formula="of:=SUMIF([.$I$11:.$I$22];[.H41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2" table:formula="of:=SUBTOTAL(9;[.D41:.D48])" office:value-type="float" office:value="47.88" calcext:value-type="float">
            <text:p><text:s/>R$ 47,88 </text:p>
          </table:table-cell>
          <table:table-cell office:value-type="string" calcext:value-type="string">
            <text:p>Cinema / Shows</text:p>
          </table:table-cell>
          <table:table-cell table:formula="of:=SUMIF([.$D$11:.$D$32];[.C42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Parcelas</text:p>
          </table:table-cell>
          <table:table-cell table:style-name="ce32" table:formula="of:=SUMIF([.$I$11:.$I$22];[.H42];[.$K$11:.$K$22])" office:value-type="float" office:value="149.5" calcext:value-type="float">
            <text:p><text:s/>R$ 149,50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asseios / Viagens</text:p>
          </table:table-cell>
          <table:table-cell table:formula="of:=SUMIF([.$D$11:.$D$32];[.C43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Saúde</text:p>
          </table:table-cell>
          <table:table-cell table:style-name="ce32" table:formula="of:=SUMIF([.$I$11:.$I$22];[.H43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Compras por impulso (não essenciais)</text:p>
          </table:table-cell>
          <table:table-cell table:formula="of:=SUMIF([.$D$11:.$D$32];[.C44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Investimento</text:p>
          </table:table-cell>
          <table:table-cell table:style-name="ce32" table:formula="of:=SUMIF([.$I$11:.$I$22];[.H44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<text:s/>Jogos / Games / Aplicativos pagos</text:p>
          </table:table-cell>
          <table:table-cell table:formula="of:=SUMIF([.$D$11:.$D$32];[.C45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8"/>
          <table:table-cell table:style-name="ce33" table:formula="of:=SUMIF([.$I$11:.$I$22];[.H45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Saídas com amigos</text:p>
          </table:table-cell>
          <table:table-cell table:formula="of:=SUMIF([.$D$11:.$D$32];[.C4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4"/>
          <table:table-cell table:style-name="ce35" table:formula="of:=SUMIF([.$D$11:.$D$32];[.C4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2"/>
          <table:table-cell table:style-name="ce33" table:formula="of:=SUMIF([.$D$11:.$D$32];[.C4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Despesas</text:p>
          </table:table-cell>
          <table:table-cell table:style-name="ce20" office:value-type="string" calcext:value-type="string">
            <text:p>Presentes e datas comemorativas</text:p>
          </table:table-cell>
          <table:table-cell table:style-name="ce31" table:formula="of:=SUMIF([.$D$11:.$D$32];[.C5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50:.D56])" office:value-type="float" office:value="19.3" calcext:value-type="float">
            <text:p><text:s/>R$ 19,30 </text:p>
          </table:table-cell>
          <table:table-cell office:value-type="string" calcext:value-type="string">
            <text:p>Doações / Contribuições</text:p>
          </table:table-cell>
          <table:table-cell table:formula="of:=SUMIF([.$D$11:.$D$32];[.C51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Taxas bancárias / Pix por engano</text:p>
          </table:table-cell>
          <table:table-cell table:formula="of:=SUMIF([.$D$11:.$D$32];[.C5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Compras online aleatórias</text:p>
          </table:table-cell>
          <table:table-cell table:formula="of:=SUMIF([.$D$11:.$D$32];[.C53];[.$F$11:.$F$32])" office:value-type="float" office:value="19.3" calcext:value-type="float">
            <text:p><text:s/>R$ 19,30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anutenção da casa (lâmpada, pilha, etc)</text:p>
          </table:table-cell>
          <table:table-cell table:formula="of:=SUMIF([.$D$11:.$D$32];[.C5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Gastos pessoais (roupas, acessórios)</text:p>
          </table:table-cell>
          <table:table-cell table:formula="of:=SUMIF([.$D$11:.$D$32];[.C55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5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Transporte</text:p>
          </table:table-cell>
          <table:table-cell table:style-name="ce20" office:value-type="string" calcext:value-type="string">
            <text:p>Acessório</text:p>
          </table:table-cell>
          <table:table-cell table:style-name="ce31" table:formula="of:=SUMIF([.$D$11:.$D$32];[.C5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58:.D64])" office:value-type="float" office:value="210" calcext:value-type="float">
            <text:p><text:s/>R$ 210,00 </text:p>
          </table:table-cell>
          <table:table-cell office:value-type="string" calcext:value-type="string">
            <text:p>Uber / Táxi</text:p>
          </table:table-cell>
          <table:table-cell table:formula="of:=SUMIF([.$D$11:.$D$32];[.C59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Ônibus / Metrô</text:p>
          </table:table-cell>
          <table:table-cell table:formula="of:=SUMIF([.$D$11:.$D$32];[.C6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Estacionamento</text:p>
          </table:table-cell>
          <table:table-cell table:formula="of:=SUMIF([.$D$11:.$D$32];[.C61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anutenção (óleo, pneu, etc)</text:p>
          </table:table-cell>
          <table:table-cell table:formula="of:=SUMIF([.$D$11:.$D$32];[.C62];[.$F$11:.$F$32])" office:value-type="float" office:value="210" calcext:value-type="float">
            <text:p><text:s/>R$ 210,00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ultas / Documentação</text:p>
          </table:table-cell>
          <table:table-cell table:formula="of:=SUMIF([.$D$11:.$D$32];[.C63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6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Educação</text:p>
          </table:table-cell>
          <table:table-cell table:style-name="ce20" office:value-type="string" calcext:value-type="string">
            <text:p>Livros </text:p>
          </table:table-cell>
          <table:table-cell table:style-name="ce31" table:formula="of:=SUMIF([.$D$11:.$D$32];[.C6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66:.D72])" office:value-type="float" office:value="34.45" calcext:value-type="float">
            <text:p><text:s/>R$ 34,45 </text:p>
          </table:table-cell>
          <table:table-cell office:value-type="string" calcext:value-type="string">
            <text:p>Cursos online (Udemy, Alura, etc)</text:p>
          </table:table-cell>
          <table:table-cell table:formula="of:=SUMIF([.$D$11:.$D$32];[.C6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aterial escolar / didático</text:p>
          </table:table-cell>
          <table:table-cell table:formula="of:=SUMIF([.$D$11:.$D$32];[.C68];[.$F$11:.$F$32])" office:value-type="float" office:value="34.45" calcext:value-type="float">
            <text:p><text:s/>R$ 34,45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Apostilas</text:p>
          </table:table-cell>
          <table:table-cell table:formula="of:=SUMIF([.$D$11:.$D$32];[.C69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Internet dedicada para estudos</text:p>
          </table:table-cell>
          <table:table-cell table:formula="of:=SUMIF([.$D$11:.$D$32];[.C7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lataformas de aprendizado </text:p>
          </table:table-cell>
          <table:table-cell table:formula="of:=SUMIF([.$D$11:.$D$32];[.C71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7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Saúde</text:p>
          </table:table-cell>
          <table:table-cell table:style-name="ce20" office:value-type="string" calcext:value-type="string">
            <text:p>Medicamentos</text:p>
          </table:table-cell>
          <table:table-cell table:style-name="ce31" table:formula="of:=SUMIF([.$D$11:.$D$32];[.C7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74:.D80])" office:value-type="float" office:value="0" calcext:value-type="float">
            <text:p><text:s/>R$ -   </text:p>
          </table:table-cell>
          <table:table-cell office:value-type="string" calcext:value-type="string">
            <text:p>Consultas médicas / exames</text:p>
          </table:table-cell>
          <table:table-cell table:formula="of:=SUMIF([.$D$11:.$D$32];[.C75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Óculos / lentes</text:p>
          </table:table-cell>
          <table:table-cell table:formula="of:=SUMIF([.$D$11:.$D$32];[.C7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rodutos de higiene e cuidados pessoais</text:p>
          </table:table-cell>
          <table:table-cell table:formula="of:=SUMIF([.$D$11:.$D$32];[.C7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3"/>
          <table:table-cell table:formula="of:=SUMIF([.$D$11:.$D$32];[.C7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3"/>
          <table:table-cell table:formula="of:=SUMIF([.$D$11:.$D$32];[.C79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8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Imprevistos</text:p>
          </table:table-cell>
          <table:table-cell table:style-name="ce20" office:value-type="string" calcext:value-type="string">
            <text:p>Emergência médica ou odontológica</text:p>
          </table:table-cell>
          <table:table-cell table:style-name="ce31" table:formula="of:=SUMIF([.$D$11:.$D$32];[.C8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82:.D88])" office:value-type="float" office:value="880" calcext:value-type="float">
            <text:p><text:s/>R$ 880,00 </text:p>
          </table:table-cell>
          <table:table-cell office:value-type="string" calcext:value-type="string">
            <text:p>Equipamento quebrado (celular, notebook)</text:p>
          </table:table-cell>
          <table:table-cell table:formula="of:=SUMIF([.$D$11:.$D$32];[.C83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erda de documentos / taxas</text:p>
          </table:table-cell>
          <table:table-cell table:formula="of:=SUMIF([.$D$11:.$D$32];[.C8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Atrasos em contas com juros</text:p>
          </table:table-cell>
          <table:table-cell table:formula="of:=SUMIF([.$D$11:.$D$32];[.C85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Conserto urgente (casa, carro, etc)</text:p>
          </table:table-cell>
          <table:table-cell table:formula="of:=SUMIF([.$D$11:.$D$32];[.C86];[.$F$11:.$F$32])" office:value-type="float" office:value="880" calcext:value-type="float">
            <text:p><text:s/>R$ 880,00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Ajuda financeira a alguém (urgente)</text:p>
          </table:table-cell>
          <table:table-cell table:formula="of:=SUMIF([.$D$11:.$D$32];[.C8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8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Investimento</text:p>
          </table:table-cell>
          <table:table-cell table:style-name="ce20"/>
          <table:table-cell table:style-name="ce31" table:formula="of:=SUMIF([.C11:.C32];[.B90];[.F11:.F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</table:table>
      <table:table table:name="Abr" table:style-name="ta4">
        <table:table-column table:style-name="co1" table:default-cell-style-name="Default"/>
        <table:table-column table:style-name="co2" table:default-cell-style-name="Default"/>
        <table:table-column table:style-name="co16" table:default-cell-style-name="ce21"/>
        <table:table-column table:style-name="co20" table:default-cell-style-name="ce32"/>
        <table:table-column table:style-name="co2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number-columns-repeated="2" table:default-cell-style-name="Default"/>
        <table:table-column table:style-name="co15" table:number-columns-repeated="16368"/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" office:value-type="string" calcext:value-type="string">
            <text:p>ABR</text:p>
          </table:table-cell>
          <table:table-cell table:style-name="ce13" office:value-type="string" calcext:value-type="string">
            <text:p>entradas</text:p>
          </table:table-cell>
          <table:table-cell table:style-name="ce26" office:value-type="string" calcext:value-type="string">
            <text:p>valor</text:p>
          </table:table-cell>
          <table:table-cell table:style-name="ce13"/>
          <table:table-cell table:style-name="ce7" office:value-type="string" calcext:value-type="string">
            <text:p>Saldo mensal</text:p>
          </table:table-cell>
          <table:table-cell/>
          <table:table-cell table:style-name="ce50" table:number-columns-spanned="4" table:number-rows-spanned="1"/>
          <table:covered-table-cell table:number-columns-repeated="3" table:style-name="ce59"/>
          <table:table-cell table:number-columns-repeated="5"/>
          <table:table-cell table:style-name="Default" table:number-columns-repeated="16368"/>
        </table:table-row>
        <table:table-row table:style-name="ro1">
          <table:table-cell/>
          <table:table-cell table:style-name="ce2" office:value-type="string" calcext:value-type="string">
            <text:p>salário</text:p>
          </table:table-cell>
          <table:table-cell table:style-name="ce14"/>
          <table:table-cell table:style-name="ce27" office:value-type="float" office:value="2100" calcext:value-type="float">
            <text:p><text:s/>R$ 2.100,00 </text:p>
          </table:table-cell>
          <table:table-cell table:style-name="ce36" office:value-type="string" office:string-value="entradas" calcext:value-type="string">
            <text:p><text:s/>entradas </text:p>
          </table:table-cell>
          <table:table-cell table:style-name="ce41" table:formula="of:=SUM([.D3];[.D5];[.D6];[.D7];[.D4])" office:value-type="float" office:value="2679.04" calcext:value-type="float">
            <text:p><text:s/>R$ 2.679,04 </text:p>
          </table:table-cell>
          <table:table-cell table:number-columns-repeated="2"/>
          <table:table-cell table:style-name="ce1" office:value-type="string" calcext:value-type="string">
            <text:p>data</text:p>
          </table:table-cell>
          <table:table-cell/>
          <table:table-cell table:style-name="ce66" office:value-type="string" calcext:value-type="string">
            <text:p>dinheiro guardado</text:p>
          </table:table-cell>
          <table:table-cell table:style-name="ce71" office:value-type="float" office:value="1343" calcext:value-type="float">
            <text:p><text:s/>R$ 1.343,00 </text:p>
          </table:table-cell>
          <table:table-cell table:style-name="ce51"/>
          <table:table-cell table:number-columns-repeated="3"/>
          <table:table-cell table:style-name="Default" table:number-columns-repeated="16368"/>
        </table:table-row>
        <table:table-row table:style-name="ro1">
          <table:table-cell/>
          <table:table-cell table:style-name="ce3" office:value-type="string" calcext:value-type="string">
            <text:p>Fotografia</text:p>
          </table:table-cell>
          <table:table-cell table:style-name="ce15"/>
          <table:table-cell table:style-name="ce28" table:formula="of:=SUM([.P10:.P25])" office:value-type="float" office:value="136.5" calcext:value-type="float">
            <text:p><text:s/>R$ 136,50 </text:p>
          </table:table-cell>
          <table:table-cell table:style-name="ce37" office:value-type="string" office:string-value="gastos variados" calcext:value-type="string">
            <text:p><text:s/>gastos variados </text:p>
          </table:table-cell>
          <table:table-cell table:style-name="ce42" table:formula="of:=SUM([.F11:.F32])" office:value-type="float" office:value="723.11" calcext:value-type="float">
            <text:p><text:s/>R$ 723,11 </text:p>
          </table:table-cell>
          <table:table-cell table:number-columns-repeated="2"/>
          <table:table-cell table:style-name="ce60" table:formula="of:=TODAY()" office:value-type="date" office:date-value="2026-06-21" calcext:value-type="date">
            <text:p>21/6/2026</text:p>
          </table:table-cell>
          <table:table-cell/>
          <table:table-cell table:style-name="ce66" office:value-type="string" calcext:value-type="string">
            <text:p>dinheiro para inestimento futuro</text:p>
          </table:table-cell>
          <table:table-cell table:style-name="ce71" table:formula="of:=1185.57-201.64" office:value-type="float" office:value="983.93" calcext:value-type="float">
            <text:p><text:s/>R$ 983,93 </text:p>
          </table:table-cell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4" office:value-type="string" calcext:value-type="string">
            <text:p>extra 2</text:p>
          </table:table-cell>
          <table:table-cell table:style-name="ce16"/>
          <table:table-cell table:style-name="ce29"/>
          <table:table-cell table:style-name="ce38" office:value-type="string" office:string-value="entradas fotografia" calcext:value-type="string">
            <text:p><text:s/>entradas fotografia </text:p>
          </table:table-cell>
          <table:table-cell table:style-name="ce43" table:formula="of:=[.D4]" office:value-type="float" office:value="136.5" calcext:value-type="float">
            <text:p><text:s/>R$ 136,50 </text:p>
          </table:table-cell>
          <table:table-cell table:number-columns-repeated="2"/>
          <table:table-cell table:style-name="ce61" office:value-type="string" calcext:value-type="string">
            <text:p>ultimo update</text:p>
          </table:table-cell>
          <table:table-cell/>
          <table:table-cell table:style-name="ce66" office:value-type="string" calcext:value-type="string">
            <text:p>dinheiro para lente</text:p>
          </table:table-cell>
          <table:table-cell table:style-name="ce71" table:formula="of:=SUM([.P10:.P25])" office:value-type="float" office:value="136.5" calcext:value-type="float">
            <text:p><text:s/>R$ 136,50 </text:p>
          </table:table-cell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4" office:value-type="string" calcext:value-type="string">
            <text:p>extra 3</text:p>
          </table:table-cell>
          <table:table-cell table:style-name="ce16"/>
          <table:table-cell table:style-name="ce29"/>
          <table:table-cell table:style-name="ce39" office:value-type="string" office:string-value="saidas fixas" calcext:value-type="string">
            <text:p><text:s/>saidas fixas </text:p>
          </table:table-cell>
          <table:table-cell table:style-name="ce44" table:formula="of:=SUM([.K11:.K22])" office:value-type="float" office:value="516.69" calcext:value-type="float">
            <text:p><text:s/>R$ 516,69 </text:p>
          </table:table-cell>
          <table:table-cell table:number-columns-repeated="2"/>
          <table:table-cell table:style-name="ce62" office:value-type="date" office:date-value="2026-04-24" calcext:value-type="date">
            <text:p>24/4/2026</text:p>
          </table:table-cell>
          <table:table-cell/>
          <table:table-cell table:style-name="ce67" office:value-type="string" calcext:value-type="string">
            <text:p>para passar o mês, tenho =&gt;</text:p>
          </table:table-cell>
          <table:table-cell table:style-name="ce85" table:formula="of:=274.72-67.7-23.36-48-48.5-8.6-35.31-37.5-50-6.69" office:value-type="float" office:value="-50.94" calcext:value-type="float">
            <text:p>-R$ 50,94 </text:p>
          </table:table-cell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5" office:value-type="string" calcext:value-type="string">
            <text:p>Saldo</text:p>
          </table:table-cell>
          <table:table-cell table:style-name="ce17"/>
          <table:table-cell table:style-name="ce30" table:formula="of:=[$Mar.F7]" office:value-type="float" office:value="442.54" calcext:value-type="float">
            <text:p><text:s/>R$ 442,54 </text:p>
          </table:table-cell>
          <table:table-cell table:style-name="ce40" office:value-type="string" office:string-value="saldo" calcext:value-type="string">
            <text:p><text:s/>saldo </text:p>
          </table:table-cell>
          <table:table-cell table:style-name="ce45" table:formula="of:=[.F3]-[.F4]-[.F6]" office:value-type="float" office:value="1439.24" calcext:value-type="float">
            <text:p><text:s/>R$ 1.439,24 </text:p>
          </table:table-cell>
          <table:table-cell table:number-columns-repeated="4"/>
          <table:table-cell office:value-type="string" calcext:value-type="string">
            <text:p>qualeasenha?</text:p>
          </table:table-cell>
          <table:table-cell table:number-columns-repeated="5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Variados</text:p>
          </table:table-cell>
          <table:covered-table-cell table:number-columns-repeated="3" table:style-name="ce18"/>
          <table:covered-table-cell table:style-name="ce46"/>
          <table:table-cell/>
          <table:table-cell table:style-name="ce52" office:value-type="string" calcext:value-type="string" table:number-columns-spanned="4" table:number-rows-spanned="1">
            <text:p>Fixos</text:p>
          </table:table-cell>
          <table:covered-table-cell table:number-columns-repeated="3" table:style-name="ce52"/>
          <table:table-cell/>
          <table:table-cell table:style-name="ce73" office:value-type="string" calcext:value-type="string">
            <text:p>Eventos</text:p>
          </table:table-cell>
          <table:table-cell table:style-name="ce76" office:value-type="string" calcext:value-type="string">
            <text:p>Data</text:p>
          </table:table-cell>
          <table:table-cell table:style-name="ce80" office:value-type="string" calcext:value-type="string">
            <text:p>Descrição</text:p>
          </table:table-cell>
          <table:table-cell table:style-name="ce84" office:value-type="string" calcext:value-type="string">
            <text:p>Entradas</text:p>
          </table:table-cell>
          <table:table-cell table:style-name="Default" table:number-columns-repeated="16368"/>
        </table:table-row>
        <table:table-row table:style-name="ro1">
          <table:table-cell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topico</text:p>
          </table:table-cell>
          <table:table-cell table:style-name="ce7" office:value-type="string" calcext:value-type="string">
            <text:p>sub-tópico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valor</text:p>
          </table:table-cell>
          <table:table-cell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Topico</text:p>
          </table:table-cell>
          <table:table-cell table:style-name="ce7" office:value-type="string" calcext:value-type="string">
            <text:p>sub-tópico</text:p>
          </table:table-cell>
          <table:table-cell table:style-name="ce7" office:value-type="string" calcext:value-type="string">
            <text:p>valor</text:p>
          </table:table-cell>
          <table:table-cell/>
          <table:table-cell table:style-name="ce74" office:value-type="string" calcext:value-type="string">
            <text:p>peguei dinheiro na banlek</text:p>
          </table:table-cell>
          <table:table-cell table:style-name="ce77" office:value-type="date" office:date-value="2026-04-24" calcext:value-type="date">
            <text:p>sexta-feira, 24 de abril de 2026</text:p>
          </table:table-cell>
          <table:table-cell table:style-name="ce81" office:value-type="string" calcext:value-type="string">
            <text:p>dinheiro </text:p>
          </table:table-cell>
          <table:table-cell table:style-name="ce68" office:value-type="float" office:value="136.5" calcext:value-type="float">
            <text:p><text:s/>R$ 136,50 </text:p>
          </table:table-cell>
          <table:table-cell table:style-name="Default" table:number-columns-repeated="16368"/>
        </table:table-row>
        <table:table-row table:style-name="ro1">
          <table:table-cell/>
          <table:table-cell table:style-name="ce8" office:value-type="date" office:date-value="2026-04-06" calcext:value-type="date">
            <text:p>6/4/2026</text:p>
          </table:table-cell>
          <table:table-cell table:style-name="ce19" table:content-validation-name="val7" office:value-type="string" calcext:value-type="string">
            <text:p>Alimentação</text:p>
          </table:table-cell>
          <table:table-cell table:style-name="ce19" table:content-validation-name="val2" office:value-type="string" calcext:value-type="string">
            <text:p>Padaria </text:p>
          </table:table-cell>
          <table:table-cell table:style-name="ce19" office:value-type="string" calcext:value-type="string">
            <text:p>lanche pra facul</text:p>
          </table:table-cell>
          <table:table-cell table:style-name="ce47" office:value-type="float" office:value="17.5" calcext:value-type="float">
            <text:p><text:s/>R$ 17,50 </text:p>
          </table:table-cell>
          <table:table-cell/>
          <table:table-cell table:style-name="ce53" office:value-type="date" office:date-value="2026-04-02" calcext:value-type="date">
            <text:p>2/4/2026</text:p>
          </table:table-cell>
          <table:table-cell table:style-name="ce63" table:content-validation-name="val3" office:value-type="string" calcext:value-type="string">
            <text:p>Gasolina</text:p>
          </table:table-cell>
          <table:table-cell table:style-name="ce63"/>
          <table:table-cell table:style-name="ce68" table:formula="of:=78+6.69" office:value-type="float" office:value="84.69" calcext:value-type="float">
            <text:p><text:s/>R$ 84,69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4-07" calcext:value-type="date">
            <text:p>7/4/2026</text:p>
          </table:table-cell>
          <table:table-cell table:style-name="ce15" table:content-validation-name="val8" office:value-type="string" calcext:value-type="string">
            <text:p>Alimentação</text:p>
          </table:table-cell>
          <table:table-cell table:style-name="ce15" table:content-validation-name="val2" office:value-type="string" calcext:value-type="string">
            <text:p>Padaria </text:p>
          </table:table-cell>
          <table:table-cell table:style-name="ce15" office:value-type="string" calcext:value-type="string">
            <text:p>lanche pra igreja eu acho</text:p>
          </table:table-cell>
          <table:table-cell table:style-name="ce48" office:value-type="float" office:value="30" calcext:value-type="float">
            <text:p><text:s/>R$ 30,00 </text:p>
          </table:table-cell>
          <table:table-cell/>
          <table:table-cell table:style-name="ce54" office:value-type="date" office:date-value="2026-04-02" calcext:value-type="date">
            <text:p>2/4/2026</text:p>
          </table:table-cell>
          <table:table-cell table:style-name="ce63" table:content-validation-name="val3" office:value-type="string" calcext:value-type="string">
            <text:p>Planos/assinaturas</text:p>
          </table:table-cell>
          <table:table-cell table:style-name="ce65" office:value-type="string" calcext:value-type="string">
            <text:p>net</text:p>
          </table:table-cell>
          <table:table-cell table:style-name="ce69" office:value-type="float" office:value="30" calcext:value-type="float">
            <text:p><text:s/>R$ 30,0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4-11" calcext:value-type="date">
            <text:p>11/4/2026</text:p>
          </table:table-cell>
          <table:table-cell table:style-name="ce15" table:content-validation-name="val8" office:value-type="string" calcext:value-type="string">
            <text:p>Lazer</text:p>
          </table:table-cell>
          <table:table-cell table:style-name="ce15" table:content-validation-name="val2" office:value-type="string" calcext:value-type="string">
            <text:p>Cinema / Shows</text:p>
          </table:table-cell>
          <table:table-cell table:style-name="ce15" office:value-type="string" calcext:value-type="string">
            <text:p>show projeto sola, ingresso</text:p>
          </table:table-cell>
          <table:table-cell table:style-name="ce48" office:value-type="float" office:value="155" calcext:value-type="float">
            <text:p><text:s/>R$ 155,00 </text:p>
          </table:table-cell>
          <table:table-cell/>
          <table:table-cell table:style-name="ce54" office:value-type="date" office:date-value="2026-04-02" calcext:value-type="date">
            <text:p>2/4/2026</text:p>
          </table:table-cell>
          <table:table-cell table:style-name="ce63" table:content-validation-name="val3" office:value-type="string" calcext:value-type="string">
            <text:p>Planos/assinaturas</text:p>
          </table:table-cell>
          <table:table-cell table:style-name="ce65" office:value-type="string" calcext:value-type="string">
            <text:p>spotify</text:p>
          </table:table-cell>
          <table:table-cell table:style-name="ce69" office:value-type="float" office:value="7" calcext:value-type="float">
            <text:p><text:s/>R$ 7,0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4-12" calcext:value-type="date">
            <text:p>12/4/2026</text:p>
          </table:table-cell>
          <table:table-cell table:style-name="ce15" table:content-validation-name="val8" office:value-type="string" calcext:value-type="string">
            <text:p>Despesas</text:p>
          </table:table-cell>
          <table:table-cell table:style-name="ce15" table:content-validation-name="val2" office:value-type="string" calcext:value-type="string">
            <text:p>Compras online aleatórias</text:p>
          </table:table-cell>
          <table:table-cell table:style-name="ce15" office:value-type="string" calcext:value-type="string">
            <text:p>jo e livro</text:p>
          </table:table-cell>
          <table:table-cell table:style-name="ce48" table:formula="of:=3.78+1.78+62.14" office:value-type="float" office:value="67.7" calcext:value-type="float">
            <text:p><text:s/>R$ 67,70 </text:p>
          </table:table-cell>
          <table:table-cell/>
          <table:table-cell table:style-name="ce54" office:value-type="date" office:date-value="2026-04-11" calcext:value-type="date">
            <text:p>11/4/2026</text:p>
          </table:table-cell>
          <table:table-cell table:style-name="ce63" table:content-validation-name="val3" office:value-type="string" calcext:value-type="string">
            <text:p>Dizimos</text:p>
          </table:table-cell>
          <table:table-cell table:style-name="ce65" office:value-type="string" calcext:value-type="string">
            <text:p>dizimo do mês</text:p>
          </table:table-cell>
          <table:table-cell table:style-name="ce69" office:value-type="float" office:value="210" calcext:value-type="float">
            <text:p><text:s/>R$ 210,0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4-12" calcext:value-type="date">
            <text:p>12/4/2026</text:p>
          </table:table-cell>
          <table:table-cell table:style-name="ce15" table:content-validation-name="val8" office:value-type="string" calcext:value-type="string">
            <text:p>Alimentação</text:p>
          </table:table-cell>
          <table:table-cell table:style-name="ce15" table:content-validation-name="val2" office:value-type="string" calcext:value-type="string">
            <text:p>Doces</text:p>
          </table:table-cell>
          <table:table-cell table:style-name="ce15" office:value-type="string" calcext:value-type="string">
            <text:p>acai</text:p>
          </table:table-cell>
          <table:table-cell table:style-name="ce48" office:value-type="float" office:value="23.36" calcext:value-type="float">
            <text:p><text:s/>R$ 23,36 </text:p>
          </table:table-cell>
          <table:table-cell/>
          <table:table-cell table:style-name="ce54" office:value-type="date" office:date-value="2026-04-11" calcext:value-type="date">
            <text:p>11/4/2026</text:p>
          </table:table-cell>
          <table:table-cell table:style-name="ce63" table:content-validation-name="val3" office:value-type="string" calcext:value-type="string">
            <text:p>Parcelas</text:p>
          </table:table-cell>
          <table:table-cell table:style-name="ce65" office:value-type="string" calcext:value-type="string">
            <text:p>camera</text:p>
          </table:table-cell>
          <table:table-cell table:style-name="ce69" office:value-type="float" office:value="150" calcext:value-type="float">
            <text:p><text:s/>R$ 150,0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4-20" calcext:value-type="date">
            <text:p>20/4/2026</text:p>
          </table:table-cell>
          <table:table-cell table:style-name="ce15" table:content-validation-name="val8" office:value-type="string" calcext:value-type="string">
            <text:p>Despesas</text:p>
          </table:table-cell>
          <table:table-cell table:style-name="ce15" table:content-validation-name="val2" office:value-type="string" calcext:value-type="string">
            <text:p>Compras online aleatórias</text:p>
          </table:table-cell>
          <table:table-cell table:style-name="ce15" office:value-type="string" calcext:value-type="string">
            <text:p>camisa campeonato</text:p>
          </table:table-cell>
          <table:table-cell table:style-name="ce48" office:value-type="float" office:value="48" calcext:value-type="float">
            <text:p><text:s/>R$ 48,00 </text:p>
          </table:table-cell>
          <table:table-cell/>
          <table:table-cell table:style-name="ce54" office:value-type="date" office:date-value="2026-04-18" calcext:value-type="date">
            <text:p>18/4/2026</text:p>
          </table:table-cell>
          <table:table-cell table:style-name="ce63" table:content-validation-name="val3" office:value-type="string" calcext:value-type="string">
            <text:p>Barbeiro</text:p>
          </table:table-cell>
          <table:table-cell table:style-name="ce65"/>
          <table:table-cell table:style-name="ce69" office:value-type="float" office:value="35" calcext:value-type="float">
            <text:p><text:s/>R$ 35,0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4-21" calcext:value-type="date">
            <text:p>21/4/2026</text:p>
          </table:table-cell>
          <table:table-cell table:style-name="ce15" table:content-validation-name="val8" office:value-type="string" calcext:value-type="string">
            <text:p>Transporte</text:p>
          </table:table-cell>
          <table:table-cell table:style-name="ce15" table:content-validation-name="val2" office:value-type="string" calcext:value-type="string">
            <text:p>Manutenção (óleo, pneu, etc)</text:p>
          </table:table-cell>
          <table:table-cell table:style-name="ce15" office:value-type="string" calcext:value-type="string">
            <text:p>gasolina pra são joao</text:p>
          </table:table-cell>
          <table:table-cell table:style-name="ce48" office:value-type="float" office:value="48.5" calcext:value-type="float">
            <text:p><text:s/>R$ 48,50 </text:p>
          </table:table-cell>
          <table:table-cell/>
          <table:table-cell table:style-name="ce54"/>
          <table:table-cell table:style-name="ce63" table:content-validation-name="val3"/>
          <table:table-cell table:style-name="ce65"/>
          <table:table-cell table:style-name="ce69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4-22" calcext:value-type="date">
            <text:p>22/4/2026</text:p>
          </table:table-cell>
          <table:table-cell table:style-name="ce15" table:content-validation-name="val8" office:value-type="string" calcext:value-type="string">
            <text:p>Alimentação</text:p>
          </table:table-cell>
          <table:table-cell table:style-name="ce15" table:content-validation-name="val2" office:value-type="string" calcext:value-type="string">
            <text:p>Padaria </text:p>
          </table:table-cell>
          <table:table-cell table:style-name="ce15"/>
          <table:table-cell table:style-name="ce48" office:value-type="float" office:value="8.6" calcext:value-type="float">
            <text:p><text:s/>R$ 8,60 </text:p>
          </table:table-cell>
          <table:table-cell/>
          <table:table-cell table:style-name="ce54"/>
          <table:table-cell table:style-name="ce63" table:content-validation-name="val3"/>
          <table:table-cell table:style-name="ce65"/>
          <table:table-cell table:style-name="ce69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4-26" calcext:value-type="date">
            <text:p>26/4/2026</text:p>
          </table:table-cell>
          <table:table-cell table:style-name="ce15" table:content-validation-name="val8" office:value-type="string" calcext:value-type="string">
            <text:p>Lazer</text:p>
          </table:table-cell>
          <table:table-cell table:style-name="ce15" table:content-validation-name="val2" office:value-type="string" calcext:value-type="string">
            <text:p>Saídas com amigos</text:p>
          </table:table-cell>
          <table:table-cell table:style-name="ce15" office:value-type="string" calcext:value-type="string">
            <text:p>manu </text:p>
          </table:table-cell>
          <table:table-cell table:style-name="ce48" office:value-type="float" office:value="35.31" calcext:value-type="float">
            <text:p><text:s/>R$ 35,31 </text:p>
          </table:table-cell>
          <table:table-cell/>
          <table:table-cell table:style-name="ce54"/>
          <table:table-cell table:style-name="ce63" table:content-validation-name="val3"/>
          <table:table-cell table:style-name="ce65"/>
          <table:table-cell table:style-name="ce69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4-27" calcext:value-type="date">
            <text:p>27/4/2026</text:p>
          </table:table-cell>
          <table:table-cell table:style-name="ce15" table:content-validation-name="val8" office:value-type="string" calcext:value-type="string">
            <text:p>Despesas</text:p>
          </table:table-cell>
          <table:table-cell table:style-name="ce15" table:content-validation-name="val2" office:value-type="string" calcext:value-type="string">
            <text:p>Presentes e datas comemorativas</text:p>
          </table:table-cell>
          <table:table-cell table:style-name="ce15" office:value-type="string" calcext:value-type="string">
            <text:p>lorena e jão</text:p>
          </table:table-cell>
          <table:table-cell table:style-name="ce48" office:value-type="float" office:value="37.5" calcext:value-type="float">
            <text:p><text:s/>R$ 37,50 </text:p>
          </table:table-cell>
          <table:table-cell/>
          <table:table-cell table:style-name="ce54"/>
          <table:table-cell table:style-name="ce63" table:content-validation-name="val3"/>
          <table:table-cell table:style-name="ce65"/>
          <table:table-cell table:style-name="ce69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4-29" calcext:value-type="date">
            <text:p>29/4/2026</text:p>
          </table:table-cell>
          <table:table-cell table:style-name="ce15" table:content-validation-name="val7" office:value-type="string" calcext:value-type="string">
            <text:p>Investimento</text:p>
          </table:table-cell>
          <table:table-cell table:style-name="ce15" table:content-validation-name="val2"/>
          <table:table-cell table:style-name="ce15" office:value-type="string" calcext:value-type="string">
            <text:p>pc - gabinete</text:p>
          </table:table-cell>
          <table:table-cell table:style-name="ce48" office:value-type="float" office:value="201.64" calcext:value-type="float">
            <text:p><text:s/>R$ 201,64 </text:p>
          </table:table-cell>
          <table:table-cell/>
          <table:table-cell table:style-name="ce54"/>
          <table:table-cell table:style-name="ce63" table:content-validation-name="val3"/>
          <table:table-cell table:style-name="ce65"/>
          <table:table-cell table:style-name="ce69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4-30" calcext:value-type="date">
            <text:p>30/4/2026</text:p>
          </table:table-cell>
          <table:table-cell table:style-name="ce15" table:content-validation-name="val8" office:value-type="string" calcext:value-type="string">
            <text:p>Imprevistos</text:p>
          </table:table-cell>
          <table:table-cell table:style-name="ce15" table:content-validation-name="val2" office:value-type="string" calcext:value-type="string">
            <text:p>Equipamento quebrado (celular, notebook)</text:p>
          </table:table-cell>
          <table:table-cell table:style-name="ce15" office:value-type="string" calcext:value-type="string">
            <text:p>moto bati</text:p>
          </table:table-cell>
          <table:table-cell table:style-name="ce48" office:value-type="float" office:value="50" calcext:value-type="float">
            <text:p><text:s/>R$ 50,00 </text:p>
          </table:table-cell>
          <table:table-cell/>
          <table:table-cell table:style-name="ce55"/>
          <table:table-cell table:style-name="ce64" table:content-validation-name="val3"/>
          <table:table-cell table:style-name="ce64"/>
          <table:table-cell table:style-name="ce70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8"/>
          <table:table-cell table:style-name="ce15" table:content-validation-name="val2"/>
          <table:table-cell table:style-name="ce15"/>
          <table:table-cell table:style-name="ce48"/>
          <table:table-cell table:number-columns-repeated="4"/>
          <table:table-cell table:style-name="ce51" table:formula="of:=SUM([.K11:.K22])" office:value-type="float" office:value="516.69" calcext:value-type="float">
            <text:p><text:s/>R$ 516,69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8"/>
          <table:table-cell table:style-name="ce15" table:content-validation-name="val2"/>
          <table:table-cell table:style-name="ce15"/>
          <table:table-cell table:style-name="ce48"/>
          <table:table-cell table:number-columns-repeated="6"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8"/>
          <table:table-cell table:style-name="ce15" table:content-validation-name="val2"/>
          <table:table-cell table:style-name="ce15"/>
          <table:table-cell table:style-name="ce48"/>
          <table:table-cell table:number-columns-repeated="6"/>
          <table:table-cell table:style-name="ce25"/>
          <table:table-cell table:style-name="ce79"/>
          <table:table-cell table:style-name="ce83"/>
          <table:table-cell table:style-name="ce70"/>
          <table:table-cell table:style-name="Default" table:number-columns-repeated="16368"/>
        </table:table-row>
        <table:table-row table:style-name="ro1" table:number-rows-repeated="6">
          <table:table-cell/>
          <table:table-cell table:style-name="ce9"/>
          <table:table-cell table:style-name="ce15" table:content-validation-name="val8"/>
          <table:table-cell table:style-name="ce15" table:content-validation-name="val2"/>
          <table:table-cell table:style-name="ce15"/>
          <table:table-cell table:style-name="ce48"/>
          <table:table-cell table:number-columns-repeated="10"/>
          <table:table-cell table:style-name="Default" table:number-columns-repeated="16368"/>
        </table:table-row>
        <table:table-row table:style-name="ro1">
          <table:table-cell/>
          <table:table-cell table:style-name="ce10"/>
          <table:table-cell table:style-name="ce17" table:content-validation-name="val8"/>
          <table:table-cell table:style-name="ce17" table:content-validation-name="val2"/>
          <table:table-cell table:style-name="ce17"/>
          <table:table-cell table:style-name="ce49"/>
          <table:table-cell table:number-columns-repeated="10"/>
          <table:table-cell table:style-name="Default" table:number-columns-repeated="16368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Alimentação</text:p>
          </table:table-cell>
          <table:table-cell table:style-name="ce20" office:value-type="string" calcext:value-type="string">
            <text:p>Doces</text:p>
          </table:table-cell>
          <table:table-cell table:style-name="ce31" table:formula="of:=SUMIF([.$D$11:.$D$32];[.C35];[.$F$11:.$F$32])" office:value-type="float" office:value="23.36" calcext:value-type="float">
            <text:p><text:s/>R$ 23,36 </text:p>
          </table:table-cell>
          <table:table-cell table:number-columns-repeated="3"/>
          <table:table-cell table:style-name="ce56" office:value-type="string" calcext:value-type="string">
            <text:p>Internet</text:p>
          </table:table-cell>
          <table:table-cell table:style-name="ce31" table:formula="of:=SUMIF([.$I$11:.$I$22];[.H35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35:.D39])" office:value-type="float" office:value="79.46" calcext:value-type="float">
            <text:p><text:s/>R$ 79,46 </text:p>
          </table:table-cell>
          <table:table-cell office:value-type="string" calcext:value-type="string">
            <text:p>Padaria </text:p>
          </table:table-cell>
          <table:table-cell table:formula="of:=SUMIF([.$D$11:.$D$32];[.C36];[.$F$11:.$F$32])" office:value-type="float" office:value="56.1" calcext:value-type="float">
            <text:p><text:s/>R$ 56,10 </text:p>
          </table:table-cell>
          <table:table-cell table:number-columns-repeated="3"/>
          <table:table-cell table:style-name="ce57" office:value-type="string" calcext:value-type="string">
            <text:p>Planos/assinaturas</text:p>
          </table:table-cell>
          <table:table-cell table:style-name="ce32" table:formula="of:=SUMIF([.$I$11:.$I$22];[.H36];[.$K$11:.$K$22])" office:value-type="float" office:value="37" calcext:value-type="float">
            <text:p><text:s/>R$ 37,00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<text:s/>Almoço fora</text:p>
          </table:table-cell>
          <table:table-cell table:formula="of:=SUMIF([.$D$11:.$D$32];[.C37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Agua</text:p>
          </table:table-cell>
          <table:table-cell table:style-name="ce32" table:formula="of:=SUMIF([.$I$11:.$I$22];[.H37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Lanches / Snacks</text:p>
          </table:table-cell>
          <table:table-cell table:formula="of:=SUMIF([.$D$11:.$D$32];[.C38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Luz</text:p>
          </table:table-cell>
          <table:table-cell table:style-name="ce32" table:formula="of:=SUMIF([.$I$11:.$I$22];[.H38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2"/>
          <table:table-cell table:style-name="ce33" table:formula="of:=SUMIF([.$D$11:.$D$32];[.C39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Gasolina</text:p>
          </table:table-cell>
          <table:table-cell table:style-name="ce32" table:formula="of:=SUMIF([.$I$11:.$I$22];[.H39];[.$K$11:.$K$22])" office:value-type="float" office:value="84.69" calcext:value-type="float">
            <text:p><text:s/>R$ 84,69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3"/>
          <table:table-cell table:style-name="ce34"/>
          <table:table-cell table:number-columns-repeated="3"/>
          <table:table-cell table:style-name="ce57" office:value-type="string" calcext:value-type="string">
            <text:p>Dizimos</text:p>
          </table:table-cell>
          <table:table-cell table:style-name="ce32" table:formula="of:=SUMIF([.$I$11:.$I$22];[.H40];[.$K$11:.$K$22])" office:value-type="float" office:value="210" calcext:value-type="float">
            <text:p><text:s/>R$ 210,00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Lazer</text:p>
          </table:table-cell>
          <table:table-cell table:style-name="ce20" office:value-type="string" calcext:value-type="string">
            <text:p>Delivery (iFood, etc)</text:p>
          </table:table-cell>
          <table:table-cell table:style-name="ce31" table:formula="of:=SUMIF([.$D$11:.$D$32];[.C41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Ofertas</text:p>
          </table:table-cell>
          <table:table-cell table:style-name="ce32" table:formula="of:=SUMIF([.$I$11:.$I$22];[.H41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2" table:formula="of:=SUBTOTAL(9;[.D41:.D48])" office:value-type="float" office:value="190.31" calcext:value-type="float">
            <text:p><text:s/>R$ 190,31 </text:p>
          </table:table-cell>
          <table:table-cell office:value-type="string" calcext:value-type="string">
            <text:p>Cinema / Shows</text:p>
          </table:table-cell>
          <table:table-cell table:formula="of:=SUMIF([.$D$11:.$D$32];[.C42];[.$F$11:.$F$32])" office:value-type="float" office:value="155" calcext:value-type="float">
            <text:p><text:s/>R$ 155,00 </text:p>
          </table:table-cell>
          <table:table-cell table:number-columns-repeated="3"/>
          <table:table-cell table:style-name="ce57" office:value-type="string" calcext:value-type="string">
            <text:p>Parcelas</text:p>
          </table:table-cell>
          <table:table-cell table:style-name="ce32" table:formula="of:=SUMIF([.$I$11:.$I$22];[.H42];[.$K$11:.$K$22])" office:value-type="float" office:value="150" calcext:value-type="float">
            <text:p><text:s/>R$ 150,00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asseios / Viagens</text:p>
          </table:table-cell>
          <table:table-cell table:formula="of:=SUMIF([.$D$11:.$D$32];[.C43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Saúde</text:p>
          </table:table-cell>
          <table:table-cell table:style-name="ce32" table:formula="of:=SUMIF([.$I$11:.$I$22];[.H43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Compras por impulso (não essenciais)</text:p>
          </table:table-cell>
          <table:table-cell table:formula="of:=SUMIF([.$D$11:.$D$32];[.C44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Investimento</text:p>
          </table:table-cell>
          <table:table-cell table:style-name="ce32" table:formula="of:=SUMIF([.$I$11:.$I$22];[.H44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<text:s/>Jogos / Games / Aplicativos pagos</text:p>
          </table:table-cell>
          <table:table-cell table:formula="of:=SUMIF([.$D$11:.$D$32];[.C45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8"/>
          <table:table-cell table:style-name="ce33" table:formula="of:=SUMIF([.$I$11:.$I$22];[.H45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Saídas com amigos</text:p>
          </table:table-cell>
          <table:table-cell table:formula="of:=SUMIF([.$D$11:.$D$32];[.C46];[.$F$11:.$F$32])" office:value-type="float" office:value="35.31" calcext:value-type="float">
            <text:p><text:s/>R$ 35,31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4"/>
          <table:table-cell table:style-name="ce35" table:formula="of:=SUMIF([.$D$11:.$D$32];[.C4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2"/>
          <table:table-cell table:style-name="ce33" table:formula="of:=SUMIF([.$D$11:.$D$32];[.C4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Despesas</text:p>
          </table:table-cell>
          <table:table-cell table:style-name="ce20" office:value-type="string" calcext:value-type="string">
            <text:p>Presentes e datas comemorativas</text:p>
          </table:table-cell>
          <table:table-cell table:style-name="ce31" table:formula="of:=SUMIF([.$D$11:.$D$32];[.C50];[.$F$11:.$F$32])" office:value-type="float" office:value="37.5" calcext:value-type="float">
            <text:p><text:s/>R$ 37,50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50:.D56])" office:value-type="float" office:value="153.2" calcext:value-type="float">
            <text:p><text:s/>R$ 153,20 </text:p>
          </table:table-cell>
          <table:table-cell office:value-type="string" calcext:value-type="string">
            <text:p>Doações / Contribuições</text:p>
          </table:table-cell>
          <table:table-cell table:formula="of:=SUMIF([.$D$11:.$D$32];[.C51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Taxas bancárias / Pix por engano</text:p>
          </table:table-cell>
          <table:table-cell table:formula="of:=SUMIF([.$D$11:.$D$32];[.C5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Compras online aleatórias</text:p>
          </table:table-cell>
          <table:table-cell table:formula="of:=SUMIF([.$D$11:.$D$32];[.C53];[.$F$11:.$F$32])" office:value-type="float" office:value="115.7" calcext:value-type="float">
            <text:p><text:s/>R$ 115,70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anutenção da casa (lâmpada, pilha, etc)</text:p>
          </table:table-cell>
          <table:table-cell table:formula="of:=SUMIF([.$D$11:.$D$32];[.C5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Gastos pessoais (roupas, acessórios)</text:p>
          </table:table-cell>
          <table:table-cell table:formula="of:=SUMIF([.$D$11:.$D$32];[.C55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5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Transporte</text:p>
          </table:table-cell>
          <table:table-cell table:style-name="ce20" office:value-type="string" calcext:value-type="string">
            <text:p>Acessório</text:p>
          </table:table-cell>
          <table:table-cell table:style-name="ce31" table:formula="of:=SUMIF([.$D$11:.$D$32];[.C5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58:.D64])" office:value-type="float" office:value="48.5" calcext:value-type="float">
            <text:p><text:s/>R$ 48,50 </text:p>
          </table:table-cell>
          <table:table-cell office:value-type="string" calcext:value-type="string">
            <text:p>Uber / Táxi</text:p>
          </table:table-cell>
          <table:table-cell table:formula="of:=SUMIF([.$D$11:.$D$32];[.C59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Ônibus / Metrô</text:p>
          </table:table-cell>
          <table:table-cell table:formula="of:=SUMIF([.$D$11:.$D$32];[.C6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Estacionamento</text:p>
          </table:table-cell>
          <table:table-cell table:formula="of:=SUMIF([.$D$11:.$D$32];[.C61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anutenção (óleo, pneu, etc)</text:p>
          </table:table-cell>
          <table:table-cell table:formula="of:=SUMIF([.$D$11:.$D$32];[.C62];[.$F$11:.$F$32])" office:value-type="float" office:value="48.5" calcext:value-type="float">
            <text:p><text:s/>R$ 48,50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ultas / Documentação</text:p>
          </table:table-cell>
          <table:table-cell table:formula="of:=SUMIF([.$D$11:.$D$32];[.C63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6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Educação</text:p>
          </table:table-cell>
          <table:table-cell table:style-name="ce20" office:value-type="string" calcext:value-type="string">
            <text:p>Livros </text:p>
          </table:table-cell>
          <table:table-cell table:style-name="ce31" table:formula="of:=SUMIF([.$D$11:.$D$32];[.C6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66:.D72])" office:value-type="float" office:value="0" calcext:value-type="float">
            <text:p><text:s/>R$ -   </text:p>
          </table:table-cell>
          <table:table-cell office:value-type="string" calcext:value-type="string">
            <text:p>Cursos online (Udemy, Alura, etc)</text:p>
          </table:table-cell>
          <table:table-cell table:formula="of:=SUMIF([.$D$11:.$D$32];[.C6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aterial escolar / didático</text:p>
          </table:table-cell>
          <table:table-cell table:formula="of:=SUMIF([.$D$11:.$D$32];[.C6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Apostilas</text:p>
          </table:table-cell>
          <table:table-cell table:formula="of:=SUMIF([.$D$11:.$D$32];[.C69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Internet dedicada para estudos</text:p>
          </table:table-cell>
          <table:table-cell table:formula="of:=SUMIF([.$D$11:.$D$32];[.C7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lataformas de aprendizado </text:p>
          </table:table-cell>
          <table:table-cell table:formula="of:=SUMIF([.$D$11:.$D$32];[.C71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7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Saúde</text:p>
          </table:table-cell>
          <table:table-cell table:style-name="ce20" office:value-type="string" calcext:value-type="string">
            <text:p>Medicamentos</text:p>
          </table:table-cell>
          <table:table-cell table:style-name="ce31" table:formula="of:=SUMIF([.$D$11:.$D$32];[.C7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74:.D80])" office:value-type="float" office:value="0" calcext:value-type="float">
            <text:p><text:s/>R$ -   </text:p>
          </table:table-cell>
          <table:table-cell office:value-type="string" calcext:value-type="string">
            <text:p>Consultas médicas / exames</text:p>
          </table:table-cell>
          <table:table-cell table:formula="of:=SUMIF([.$D$11:.$D$32];[.C75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Óculos / lentes</text:p>
          </table:table-cell>
          <table:table-cell table:formula="of:=SUMIF([.$D$11:.$D$32];[.C7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rodutos de higiene e cuidados pessoais</text:p>
          </table:table-cell>
          <table:table-cell table:formula="of:=SUMIF([.$D$11:.$D$32];[.C7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3"/>
          <table:table-cell table:formula="of:=SUMIF([.$D$11:.$D$32];[.C7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3"/>
          <table:table-cell table:formula="of:=SUMIF([.$D$11:.$D$32];[.C79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8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Imprevistos</text:p>
          </table:table-cell>
          <table:table-cell table:style-name="ce20" office:value-type="string" calcext:value-type="string">
            <text:p>Emergência médica ou odontológica</text:p>
          </table:table-cell>
          <table:table-cell table:style-name="ce31" table:formula="of:=SUMIF([.$D$11:.$D$32];[.C8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82:.D88])" office:value-type="float" office:value="50" calcext:value-type="float">
            <text:p><text:s/>R$ 50,00 </text:p>
          </table:table-cell>
          <table:table-cell office:value-type="string" calcext:value-type="string">
            <text:p>Equipamento quebrado (celular, notebook)</text:p>
          </table:table-cell>
          <table:table-cell table:formula="of:=SUMIF([.$D$11:.$D$32];[.C83];[.$F$11:.$F$32])" office:value-type="float" office:value="50" calcext:value-type="float">
            <text:p><text:s/>R$ 50,00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erda de documentos / taxas</text:p>
          </table:table-cell>
          <table:table-cell table:formula="of:=SUMIF([.$D$11:.$D$32];[.C8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Atrasos em contas com juros</text:p>
          </table:table-cell>
          <table:table-cell table:formula="of:=SUMIF([.$D$11:.$D$32];[.C85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Conserto urgente (casa, carro, etc)</text:p>
          </table:table-cell>
          <table:table-cell table:formula="of:=SUMIF([.$D$11:.$D$32];[.C8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Ajuda financeira a alguém (urgente)</text:p>
          </table:table-cell>
          <table:table-cell table:formula="of:=SUMIF([.$D$11:.$D$32];[.C8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8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Investimento</text:p>
          </table:table-cell>
          <table:table-cell table:style-name="ce20"/>
          <table:table-cell table:style-name="ce31" table:formula="of:=SUMIF([.C11:.C32];[.B90];[.F11:.F32])" office:value-type="float" office:value="201.64" calcext:value-type="float">
            <text:p><text:s/>R$ 201,64 </text:p>
          </table:table-cell>
          <table:table-cell table:number-columns-repeated="12"/>
          <table:table-cell table:style-name="Default" table:number-columns-repeated="16368"/>
        </table:table-row>
      </table:table>
      <table:table table:name="Mai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6" table:default-cell-style-name="ce21"/>
        <table:table-column table:style-name="co30" table:default-cell-style-name="ce32"/>
        <table:table-column table:style-name="co31" table:default-cell-style-name="Default"/>
        <table:table-column table:style-name="co32" table:default-cell-style-name="Default"/>
        <table:table-column table:style-name="co7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1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0" table:default-cell-style-name="Default"/>
        <table:table-column table:style-name="co15" table:number-columns-repeated="16367"/>
        <table:table-row table:style-name="ro1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16367"/>
        </table:table-row>
        <table:table-row table:style-name="ro1">
          <table:table-cell/>
          <table:table-cell table:style-name="ce1" office:value-type="string" calcext:value-type="string">
            <text:p>MAI</text:p>
          </table:table-cell>
          <table:table-cell table:style-name="ce13" office:value-type="string" calcext:value-type="string">
            <text:p>entradas</text:p>
          </table:table-cell>
          <table:table-cell table:style-name="ce26" office:value-type="string" calcext:value-type="string">
            <text:p>valor</text:p>
          </table:table-cell>
          <table:table-cell table:style-name="ce13"/>
          <table:table-cell table:style-name="ce7" office:value-type="string" calcext:value-type="string">
            <text:p>Saldo mensal</text:p>
          </table:table-cell>
          <table:table-cell/>
          <table:table-cell table:style-name="ce50" table:number-columns-spanned="4" table:number-rows-spanned="1"/>
          <table:covered-table-cell table:number-columns-repeated="3" table:style-name="ce59"/>
          <table:table-cell table:number-columns-repeated="2"/>
          <table:table-cell office:value-type="string" calcext:value-type="string">
            <text:p>tenho </text:p>
          </table:table-cell>
          <table:table-cell office:value-type="string" calcext:value-type="string">
            <text:p>retirei esse mês</text:p>
          </table:table-cell>
          <table:table-cell table:style-name="ce89"/>
          <table:table-cell/>
          <table:table-cell table:style-name="Default" table:number-columns-repeated="16367"/>
        </table:table-row>
        <table:table-row table:style-name="ro1">
          <table:table-cell/>
          <table:table-cell table:style-name="ce2" office:value-type="string" calcext:value-type="string">
            <text:p>salário</text:p>
          </table:table-cell>
          <table:table-cell table:style-name="ce14"/>
          <table:table-cell table:style-name="ce27" table:formula="of:=2500-[.O3]-50" office:value-type="float" office:value="146" calcext:value-type="float">
            <text:p><text:s/>R$ 146,00 </text:p>
          </table:table-cell>
          <table:table-cell table:style-name="ce36" office:value-type="string" office:string-value="entradas" calcext:value-type="string">
            <text:p><text:s/>entradas </text:p>
          </table:table-cell>
          <table:table-cell table:style-name="ce41" table:formula="of:=SUM([.D3];[.D5];[.D6];[.D7];[.D4];[.L3];[.N3];[.L5])" office:value-type="float" office:value="4523.74" calcext:value-type="float">
            <text:p><text:s/>R$ 4.523,74 </text:p>
          </table:table-cell>
          <table:table-cell/>
          <table:table-cell table:style-name="ce51"/>
          <table:table-cell table:style-name="ce1" office:value-type="string" calcext:value-type="string">
            <text:p>data</text:p>
          </table:table-cell>
          <table:table-cell/>
          <table:table-cell table:style-name="ce66" office:value-type="string" calcext:value-type="string">
            <text:p>dinheiro guardado</text:p>
          </table:table-cell>
          <table:table-cell table:style-name="ce71" table:formula="of:=([$Abr.L3]+320+840)" office:value-type="float" office:value="2503" calcext:value-type="float">
            <text:p><text:s/>R$ 2.503,00 </text:p>
          </table:table-cell>
          <table:table-cell/>
          <table:table-cell table:style-name="ce51" table:formula="of:=[.L3]-[.O3]" office:value-type="float" office:value="199" calcext:value-type="float">
            <text:p><text:s/>R$ 199,00 </text:p>
          </table:table-cell>
          <table:table-cell table:style-name="ce51" table:formula="of:=300+500+150+400+50+630+10+210+54" office:value-type="float" office:value="2304" calcext:value-type="float">
            <text:p><text:s/>R$ 2.304,00 </text:p>
          </table:table-cell>
          <table:table-cell table:style-name="ce51" table:number-columns-repeated="2"/>
          <table:table-cell table:style-name="Default" table:number-columns-repeated="16367"/>
        </table:table-row>
        <table:table-row table:style-name="ro1">
          <table:table-cell/>
          <table:table-cell table:style-name="ce3" office:value-type="string" calcext:value-type="string">
            <text:p>Fotografia</text:p>
          </table:table-cell>
          <table:table-cell table:style-name="ce15"/>
          <table:table-cell table:style-name="ce28" table:formula="of:=SUM([.P10:.P25])" office:value-type="float" office:value="20" calcext:value-type="float">
            <text:p><text:s/>R$ 20,00 </text:p>
          </table:table-cell>
          <table:table-cell table:style-name="ce37" office:value-type="string" office:string-value="gastos variados" calcext:value-type="string">
            <text:p><text:s/>gastos variados </text:p>
          </table:table-cell>
          <table:table-cell table:style-name="ce42" table:formula="of:=SUM([.F11:.F26])" office:value-type="float" office:value="3935.01" calcext:value-type="float">
            <text:p><text:s/>R$ 3.935,01 </text:p>
          </table:table-cell>
          <table:table-cell table:number-columns-repeated="2"/>
          <table:table-cell table:style-name="ce60" table:formula="of:=TODAY()" office:value-type="date" office:date-value="2026-06-21" calcext:value-type="date">
            <text:p>21/6/2026</text:p>
          </table:table-cell>
          <table:table-cell/>
          <table:table-cell table:style-name="ce66" office:value-type="string" calcext:value-type="string">
            <text:p>dinheiro para investimento futuro</text:p>
          </table:table-cell>
          <table:table-cell table:style-name="ce71" office:value-type="float" office:value="0" calcext:value-type="float">
            <text:p><text:s/>R$ -   </text:p>
          </table:table-cell>
          <table:table-cell table:number-columns-repeated="2"/>
          <table:table-cell table:style-name="ce51" table:number-columns-repeated="2"/>
          <table:table-cell/>
          <table:table-cell table:style-name="Default" table:number-columns-repeated="16367"/>
        </table:table-row>
        <table:table-row table:style-name="ro1">
          <table:table-cell/>
          <table:table-cell table:style-name="ce4" office:value-type="string" calcext:value-type="string">
            <text:p>extra 2</text:p>
          </table:table-cell>
          <table:table-cell table:style-name="ce16"/>
          <table:table-cell table:style-name="ce29" office:value-type="float" office:value="60" calcext:value-type="float">
            <text:p><text:s/>R$ 60,00 </text:p>
          </table:table-cell>
          <table:table-cell table:style-name="ce38" office:value-type="string" office:string-value="entradas fotografia" calcext:value-type="string">
            <text:p><text:s/>entradas fotografia </text:p>
          </table:table-cell>
          <table:table-cell table:style-name="ce43" table:formula="of:=[.D4]" office:value-type="float" office:value="20" calcext:value-type="float">
            <text:p><text:s/>R$ 20,00 </text:p>
          </table:table-cell>
          <table:table-cell table:number-columns-repeated="2"/>
          <table:table-cell table:style-name="ce61" office:value-type="string" calcext:value-type="string">
            <text:p>ultimo update</text:p>
          </table:table-cell>
          <table:table-cell/>
          <table:table-cell table:style-name="ce66" office:value-type="string" calcext:value-type="string">
            <text:p>dinheiro para lente</text:p>
          </table:table-cell>
          <table:table-cell table:style-name="ce71" table:formula="of:=[$Abr.L5]+SUM([.P10:.P25])" office:value-type="float" office:value="156.5" calcext:value-type="float">
            <text:p><text:s/>R$ 156,50 </text:p>
          </table:table-cell>
          <table:table-cell table:number-columns-repeated="2"/>
          <table:table-cell table:style-name="ce51" table:number-columns-repeated="2"/>
          <table:table-cell/>
          <table:table-cell table:style-name="Default" table:number-columns-repeated="16367"/>
        </table:table-row>
        <table:table-row table:style-name="ro1">
          <table:table-cell/>
          <table:table-cell table:style-name="ce4" office:value-type="string" calcext:value-type="string">
            <text:p>extra 3</text:p>
          </table:table-cell>
          <table:table-cell table:style-name="ce16"/>
          <table:table-cell table:style-name="ce29"/>
          <table:table-cell table:style-name="ce39" office:value-type="string" office:string-value="saidas fixas" calcext:value-type="string">
            <text:p><text:s/>saidas fixas </text:p>
          </table:table-cell>
          <table:table-cell table:style-name="ce44" table:formula="of:=SUM([.K11:.K22])" office:value-type="float" office:value="597.03" calcext:value-type="float">
            <text:p><text:s/>R$ 597,03 </text:p>
          </table:table-cell>
          <table:table-cell table:number-columns-repeated="2"/>
          <table:table-cell table:style-name="ce62" office:value-type="date" office:date-value="2026-05-31" calcext:value-type="date">
            <text:p>31/5/2026</text:p>
          </table:table-cell>
          <table:table-cell/>
          <table:table-cell table:style-name="ce67" office:value-type="string" calcext:value-type="string">
            <text:p>para passar o mês, tenho =&gt;</text:p>
          </table:table-cell>
          <table:table-cell table:style-name="ce86"/>
          <table:table-cell office:value-type="string" calcext:value-type="string">
            <text:p>estou me devendo =&gt;</text:p>
          </table:table-cell>
          <table:table-cell/>
          <table:table-cell table:style-name="ce88"/>
          <table:table-cell table:number-columns-repeated="2"/>
          <table:table-cell table:style-name="Default" table:number-columns-repeated="16367"/>
        </table:table-row>
        <table:table-row table:style-name="ro1">
          <table:table-cell/>
          <table:table-cell table:style-name="ce5" office:value-type="string" calcext:value-type="string">
            <text:p>Saldo</text:p>
          </table:table-cell>
          <table:table-cell table:style-name="ce17"/>
          <table:table-cell table:style-name="ce30" table:formula="of:=[$Abr.F7]" office:value-type="float" office:value="1439.24" calcext:value-type="float">
            <text:p><text:s/>R$ 1.439,24 </text:p>
          </table:table-cell>
          <table:table-cell table:style-name="ce40" office:value-type="string" office:string-value="saldo" calcext:value-type="string">
            <text:p><text:s/>saldo </text:p>
          </table:table-cell>
          <table:table-cell table:style-name="ce45" table:formula="of:=[.F3]-[.F4]-[.F6]" office:value-type="float" office:value="-8.30000000000041" calcext:value-type="float">
            <text:p>-R$ 8,30 </text:p>
          </table:table-cell>
          <table:table-cell table:number-columns-repeated="5"/>
          <table:table-cell table:style-name="ce51"/>
          <table:table-cell table:number-columns-repeated="3"/>
          <table:table-cell table:style-name="ce51"/>
          <table:table-cell/>
          <table:table-cell table:style-name="Default" table:number-columns-repeated="1636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16367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Variados</text:p>
          </table:table-cell>
          <table:covered-table-cell table:number-columns-repeated="3" table:style-name="ce18"/>
          <table:covered-table-cell table:style-name="ce46"/>
          <table:table-cell/>
          <table:table-cell table:style-name="ce52" office:value-type="string" calcext:value-type="string" table:number-columns-spanned="4" table:number-rows-spanned="1">
            <text:p>Fixos</text:p>
          </table:table-cell>
          <table:covered-table-cell table:number-columns-repeated="3" table:style-name="ce52"/>
          <table:table-cell/>
          <table:table-cell table:style-name="ce73" office:value-type="string" calcext:value-type="string">
            <text:p>Eventos</text:p>
          </table:table-cell>
          <table:table-cell table:style-name="ce76" office:value-type="string" calcext:value-type="string">
            <text:p>Data</text:p>
          </table:table-cell>
          <table:table-cell table:style-name="ce80" office:value-type="string" calcext:value-type="string">
            <text:p>Descrição</text:p>
          </table:table-cell>
          <table:table-cell table:style-name="ce84" office:value-type="string" calcext:value-type="string">
            <text:p>Entradas</text:p>
          </table:table-cell>
          <table:table-cell/>
          <table:table-cell table:style-name="Default" table:number-columns-repeated="16367"/>
        </table:table-row>
        <table:table-row table:style-name="ro1">
          <table:table-cell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topico</text:p>
          </table:table-cell>
          <table:table-cell table:style-name="ce7" office:value-type="string" calcext:value-type="string">
            <text:p>sub-tópico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valor</text:p>
          </table:table-cell>
          <table:table-cell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Topico</text:p>
          </table:table-cell>
          <table:table-cell table:style-name="ce7" office:value-type="string" calcext:value-type="string">
            <text:p>sub-tópico</text:p>
          </table:table-cell>
          <table:table-cell table:style-name="ce7" office:value-type="string" calcext:value-type="string">
            <text:p>valor</text:p>
          </table:table-cell>
          <table:table-cell/>
          <table:table-cell table:style-name="ce87" office:value-type="string" calcext:value-type="string">
            <text:p>edição </text:p>
          </table:table-cell>
          <table:table-cell table:style-name="ce77" office:value-type="date" office:date-value="2026-05-02" calcext:value-type="date">
            <text:p>sábado, 2 de maio de 2026</text:p>
          </table:table-cell>
          <table:table-cell table:style-name="ce81" office:value-type="string" calcext:value-type="string">
            <text:p>maycon</text:p>
          </table:table-cell>
          <table:table-cell table:style-name="ce68" office:value-type="float" office:value="20" calcext:value-type="float">
            <text:p><text:s/>R$ 20,00 </text:p>
          </table:table-cell>
          <table:table-cell/>
          <table:table-cell table:style-name="Default" table:number-columns-repeated="16367"/>
        </table:table-row>
        <table:table-row table:style-name="ro1">
          <table:table-cell/>
          <table:table-cell table:style-name="ce8" office:value-type="date" office:date-value="2026-05-02" calcext:value-type="date">
            <text:p>2/5/2026</text:p>
          </table:table-cell>
          <table:table-cell table:style-name="ce19" table:content-validation-name="val7" office:value-type="string" calcext:value-type="string">
            <text:p>Lazer</text:p>
          </table:table-cell>
          <table:table-cell table:style-name="ce19" table:content-validation-name="val2" office:value-type="string" calcext:value-type="string">
            <text:p>Esportes / saidas</text:p>
          </table:table-cell>
          <table:table-cell table:style-name="ce19" office:value-type="string" calcext:value-type="string">
            <text:p>volei</text:p>
          </table:table-cell>
          <table:table-cell table:style-name="ce47" table:formula="of:=10+1.69" office:value-type="float" office:value="11.69" calcext:value-type="float">
            <text:p><text:s/>R$ 11,69 </text:p>
          </table:table-cell>
          <table:table-cell/>
          <table:table-cell table:style-name="ce53" office:value-type="date" office:date-value="2026-05-02" calcext:value-type="date">
            <text:p>2/5/2026</text:p>
          </table:table-cell>
          <table:table-cell table:style-name="ce63" table:content-validation-name="val3" office:value-type="string" calcext:value-type="string">
            <text:p>Gasolina</text:p>
          </table:table-cell>
          <table:table-cell table:style-name="ce63"/>
          <table:table-cell table:style-name="ce68" table:formula="of:=75.03+13.18+30+13.22" office:value-type="float" office:value="131.43" calcext:value-type="float">
            <text:p><text:s/>R$ 131,43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/>
          <table:table-cell table:style-name="Default" table:number-columns-repeated="16367"/>
        </table:table-row>
        <table:table-row table:style-name="ro1">
          <table:table-cell/>
          <table:table-cell table:style-name="ce9" office:value-type="date" office:date-value="2026-05-03" calcext:value-type="date">
            <text:p>3/5/2026</text:p>
          </table:table-cell>
          <table:table-cell table:style-name="ce15" table:content-validation-name="val7" office:value-type="string" calcext:value-type="string">
            <text:p>Alimentação</text:p>
          </table:table-cell>
          <table:table-cell table:style-name="ce15" table:content-validation-name="val2" office:value-type="string" calcext:value-type="string">
            <text:p>Almoço fora</text:p>
          </table:table-cell>
          <table:table-cell table:style-name="ce15" office:value-type="string" calcext:value-type="string">
            <text:p>churrasco e sucos</text:p>
          </table:table-cell>
          <table:table-cell table:style-name="ce48" office:value-type="float" office:value="28" calcext:value-type="float">
            <text:p><text:s/>R$ 28,00 </text:p>
          </table:table-cell>
          <table:table-cell/>
          <table:table-cell table:style-name="ce54" office:value-type="date" office:date-value="2026-05-03" calcext:value-type="date">
            <text:p>3/5/2026</text:p>
          </table:table-cell>
          <table:table-cell table:style-name="ce63" table:content-validation-name="val3" office:value-type="string" calcext:value-type="string">
            <text:p>Planos/assinaturas</text:p>
          </table:table-cell>
          <table:table-cell table:style-name="ce65" office:value-type="string" calcext:value-type="string">
            <text:p>spotify</text:p>
          </table:table-cell>
          <table:table-cell table:style-name="ce69" table:formula="of:=6.8+6.8" office:value-type="float" office:value="13.6" calcext:value-type="float">
            <text:p><text:s/>R$ 13,6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/>
          <table:table-cell table:style-name="Default" table:number-columns-repeated="16367"/>
        </table:table-row>
        <table:table-row table:style-name="ro1">
          <table:table-cell/>
          <table:table-cell table:style-name="ce9" office:value-type="date" office:date-value="2026-05-03" calcext:value-type="date">
            <text:p>3/5/2026</text:p>
          </table:table-cell>
          <table:table-cell table:style-name="ce15" table:content-validation-name="val7" office:value-type="string" calcext:value-type="string">
            <text:p>Investimento</text:p>
          </table:table-cell>
          <table:table-cell table:style-name="ce15" table:content-validation-name="val2"/>
          <table:table-cell table:style-name="ce15" office:value-type="string" calcext:value-type="string">
            <text:p>pc - placa mãe</text:p>
          </table:table-cell>
          <table:table-cell table:style-name="ce48" office:value-type="float" office:value="1289.99" calcext:value-type="float">
            <text:p><text:s/>R$ 1.289,99 </text:p>
          </table:table-cell>
          <table:table-cell/>
          <table:table-cell table:style-name="ce54" office:value-type="date" office:date-value="2026-05-05" calcext:value-type="date">
            <text:p>5/5/2026</text:p>
          </table:table-cell>
          <table:table-cell table:style-name="ce63" table:content-validation-name="val3" office:value-type="string" calcext:value-type="string">
            <text:p>Planos/assinaturas</text:p>
          </table:table-cell>
          <table:table-cell table:style-name="ce65"/>
          <table:table-cell table:style-name="ce69" office:value-type="float" office:value="30" calcext:value-type="float">
            <text:p><text:s/>R$ 30,0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/>
          <table:table-cell table:style-name="Default" table:number-columns-repeated="16367"/>
        </table:table-row>
        <table:table-row table:style-name="ro1">
          <table:table-cell/>
          <table:table-cell table:style-name="ce9" office:value-type="date" office:date-value="2026-05-02" calcext:value-type="date">
            <text:p>2/5/2026</text:p>
          </table:table-cell>
          <table:table-cell table:style-name="ce15" table:content-validation-name="val7" office:value-type="string" calcext:value-type="string">
            <text:p>Lazer</text:p>
          </table:table-cell>
          <table:table-cell table:style-name="ce15" table:content-validation-name="val2" office:value-type="string" calcext:value-type="string">
            <text:p>Saídas com amigos</text:p>
          </table:table-cell>
          <table:table-cell table:style-name="ce15" office:value-type="string" calcext:value-type="string">
            <text:p>joyce</text:p>
          </table:table-cell>
          <table:table-cell table:style-name="ce48" office:value-type="float" office:value="44.7" calcext:value-type="float">
            <text:p><text:s/>R$ 44,70 </text:p>
          </table:table-cell>
          <table:table-cell/>
          <table:table-cell table:style-name="ce54" office:value-type="date" office:date-value="2026-05-08" calcext:value-type="date">
            <text:p>8/5/2026</text:p>
          </table:table-cell>
          <table:table-cell table:style-name="ce63" table:content-validation-name="val3" office:value-type="string" calcext:value-type="string">
            <text:p>Dizimos</text:p>
          </table:table-cell>
          <table:table-cell table:style-name="ce65"/>
          <table:table-cell table:style-name="ce69" table:formula="of:=2400*0.1" office:value-type="float" office:value="240" calcext:value-type="float">
            <text:p><text:s/>R$ 240,0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/>
          <table:table-cell table:style-name="Default" table:number-columns-repeated="16367"/>
        </table:table-row>
        <table:table-row table:style-name="ro1">
          <table:table-cell/>
          <table:table-cell table:style-name="ce9" office:value-type="date" office:date-value="2026-05-05" calcext:value-type="date">
            <text:p>5/5/2026</text:p>
          </table:table-cell>
          <table:table-cell table:style-name="ce15" table:content-validation-name="val7" office:value-type="string" calcext:value-type="string">
            <text:p>Transporte</text:p>
          </table:table-cell>
          <table:table-cell table:style-name="ce15" table:content-validation-name="val2" office:value-type="string" calcext:value-type="string">
            <text:p>Manutenção (óleo, pneu, etc)</text:p>
          </table:table-cell>
          <table:table-cell table:style-name="ce15" office:value-type="string" calcext:value-type="string">
            <text:p>oleo</text:p>
          </table:table-cell>
          <table:table-cell table:style-name="ce48" office:value-type="float" office:value="48" calcext:value-type="float">
            <text:p><text:s/>R$ 48,00 </text:p>
          </table:table-cell>
          <table:table-cell/>
          <table:table-cell table:style-name="ce54" office:value-type="date" office:date-value="2026-05-11" calcext:value-type="date">
            <text:p>11/5/2026</text:p>
          </table:table-cell>
          <table:table-cell table:style-name="ce63" table:content-validation-name="val3" office:value-type="string" calcext:value-type="string">
            <text:p>Parcelas</text:p>
          </table:table-cell>
          <table:table-cell table:style-name="ce65" office:value-type="string" calcext:value-type="string">
            <text:p>cannon</text:p>
          </table:table-cell>
          <table:table-cell table:style-name="ce69" office:value-type="float" office:value="147" calcext:value-type="float">
            <text:p><text:s/>R$ 147,0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/>
          <table:table-cell table:style-name="Default" table:number-columns-repeated="16367"/>
        </table:table-row>
        <table:table-row table:style-name="ro1">
          <table:table-cell/>
          <table:table-cell table:style-name="ce9" office:value-type="date" office:date-value="2026-05-09" calcext:value-type="date">
            <text:p>9/5/2026</text:p>
          </table:table-cell>
          <table:table-cell table:style-name="ce15" table:content-validation-name="val7" office:value-type="string" calcext:value-type="string">
            <text:p>Despesas</text:p>
          </table:table-cell>
          <table:table-cell table:style-name="ce15" table:content-validation-name="val2" office:value-type="string" calcext:value-type="string">
            <text:p>Presentes e datas comemorativas</text:p>
          </table:table-cell>
          <table:table-cell table:style-name="ce15" office:value-type="string" calcext:value-type="string">
            <text:p>mae</text:p>
          </table:table-cell>
          <table:table-cell table:style-name="ce48" office:value-type="float" office:value="69.9" calcext:value-type="float">
            <text:p><text:s/>R$ 69,90 </text:p>
          </table:table-cell>
          <table:table-cell/>
          <table:table-cell table:style-name="ce54" office:value-type="date" office:date-value="2026-05-19" calcext:value-type="date">
            <text:p>19/5/2026</text:p>
          </table:table-cell>
          <table:table-cell table:style-name="ce63" table:content-validation-name="val3" office:value-type="string" calcext:value-type="string">
            <text:p>Barbeiro</text:p>
          </table:table-cell>
          <table:table-cell table:style-name="ce65"/>
          <table:table-cell table:style-name="ce69" office:value-type="float" office:value="35" calcext:value-type="float">
            <text:p><text:s/>R$ 35,0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/>
          <table:table-cell table:style-name="Default" table:number-columns-repeated="16367"/>
        </table:table-row>
        <table:table-row table:style-name="ro1">
          <table:table-cell/>
          <table:table-cell table:style-name="ce9" office:value-type="date" office:date-value="2026-05-09" calcext:value-type="date">
            <text:p>9/5/2026</text:p>
          </table:table-cell>
          <table:table-cell table:style-name="ce15" table:content-validation-name="val7" office:value-type="string" calcext:value-type="string">
            <text:p>Investimento</text:p>
          </table:table-cell>
          <table:table-cell table:style-name="ce15" table:content-validation-name="val2"/>
          <table:table-cell table:style-name="ce15" office:value-type="string" calcext:value-type="string">
            <text:p>pc - processador</text:p>
          </table:table-cell>
          <table:table-cell table:style-name="ce48" office:value-type="float" office:value="350" calcext:value-type="float">
            <text:p><text:s/>R$ 350,00 </text:p>
          </table:table-cell>
          <table:table-cell/>
          <table:table-cell table:style-name="ce54"/>
          <table:table-cell table:style-name="ce63" table:content-validation-name="val3"/>
          <table:table-cell table:style-name="ce65"/>
          <table:table-cell table:style-name="ce69"/>
          <table:table-cell/>
          <table:table-cell table:style-name="ce75"/>
          <table:table-cell table:style-name="ce78"/>
          <table:table-cell table:style-name="ce82"/>
          <table:table-cell table:style-name="ce69"/>
          <table:table-cell/>
          <table:table-cell table:style-name="Default" table:number-columns-repeated="16367"/>
        </table:table-row>
        <table:table-row table:style-name="ro1">
          <table:table-cell/>
          <table:table-cell table:style-name="ce9" office:value-type="date" office:date-value="2026-04-13" calcext:value-type="date">
            <text:p>13/4/2026</text:p>
          </table:table-cell>
          <table:table-cell table:style-name="ce15" table:content-validation-name="val7" office:value-type="string" calcext:value-type="string">
            <text:p>Investimento</text:p>
          </table:table-cell>
          <table:table-cell table:style-name="ce15" table:content-validation-name="val2"/>
          <table:table-cell table:style-name="ce15" office:value-type="string" calcext:value-type="string">
            <text:p>pc - fonte e cooler</text:p>
          </table:table-cell>
          <table:table-cell table:style-name="ce48" office:value-type="float" office:value="448.74" calcext:value-type="float">
            <text:p><text:s/>R$ 448,74 </text:p>
          </table:table-cell>
          <table:table-cell/>
          <table:table-cell table:style-name="ce54"/>
          <table:table-cell table:style-name="ce63" table:content-validation-name="val3"/>
          <table:table-cell table:style-name="ce65"/>
          <table:table-cell table:style-name="ce69"/>
          <table:table-cell/>
          <table:table-cell table:style-name="ce75"/>
          <table:table-cell table:style-name="ce78"/>
          <table:table-cell table:style-name="ce82"/>
          <table:table-cell table:style-name="ce69"/>
          <table:table-cell/>
          <table:table-cell table:style-name="Default" table:number-columns-repeated="16367"/>
        </table:table-row>
        <table:table-row table:style-name="ro1">
          <table:table-cell/>
          <table:table-cell table:style-name="ce9" office:value-type="date" office:date-value="2026-05-15" calcext:value-type="date">
            <text:p>15/5/2026</text:p>
          </table:table-cell>
          <table:table-cell table:style-name="ce15" table:content-validation-name="val7" office:value-type="string" calcext:value-type="string">
            <text:p>Investimento</text:p>
          </table:table-cell>
          <table:table-cell table:style-name="ce15" table:content-validation-name="val2"/>
          <table:table-cell table:style-name="ce15" office:value-type="string" calcext:value-type="string">
            <text:p>pc - mouse e mouse pad</text:p>
          </table:table-cell>
          <table:table-cell table:style-name="ce48" office:value-type="float" office:value="281.76" calcext:value-type="float">
            <text:p><text:s/>R$ 281,76 </text:p>
          </table:table-cell>
          <table:table-cell/>
          <table:table-cell table:style-name="ce54"/>
          <table:table-cell table:style-name="ce63" table:content-validation-name="val3"/>
          <table:table-cell table:style-name="ce65"/>
          <table:table-cell table:style-name="ce69"/>
          <table:table-cell/>
          <table:table-cell table:style-name="ce75"/>
          <table:table-cell table:style-name="ce78"/>
          <table:table-cell table:style-name="ce82"/>
          <table:table-cell table:style-name="ce69"/>
          <table:table-cell/>
          <table:table-cell table:style-name="Default" table:number-columns-repeated="16367"/>
        </table:table-row>
        <table:table-row table:style-name="ro1">
          <table:table-cell/>
          <table:table-cell table:style-name="ce9" office:value-type="date" office:date-value="2026-05-21" calcext:value-type="date">
            <text:p>21/5/2026</text:p>
          </table:table-cell>
          <table:table-cell table:style-name="ce15" table:content-validation-name="val7" office:value-type="string" calcext:value-type="string">
            <text:p>Despesas</text:p>
          </table:table-cell>
          <table:table-cell table:style-name="ce15" table:content-validation-name="val2" office:value-type="string" calcext:value-type="string">
            <text:p>Compras online aleatórias</text:p>
          </table:table-cell>
          <table:table-cell table:style-name="ce15" office:value-type="string" calcext:value-type="string">
            <text:p>facul</text:p>
          </table:table-cell>
          <table:table-cell table:style-name="ce48" office:value-type="float" office:value="7" calcext:value-type="float">
            <text:p><text:s/>R$ 7,00 </text:p>
          </table:table-cell>
          <table:table-cell/>
          <table:table-cell table:style-name="ce54"/>
          <table:table-cell table:style-name="ce63" table:content-validation-name="val3"/>
          <table:table-cell table:style-name="ce65"/>
          <table:table-cell table:style-name="ce69"/>
          <table:table-cell/>
          <table:table-cell table:style-name="ce75"/>
          <table:table-cell table:style-name="ce78"/>
          <table:table-cell table:style-name="ce82"/>
          <table:table-cell table:style-name="ce69"/>
          <table:table-cell/>
          <table:table-cell table:style-name="Default" table:number-columns-repeated="16367"/>
        </table:table-row>
        <table:table-row table:style-name="ro1">
          <table:table-cell/>
          <table:table-cell table:style-name="ce9" office:value-type="date" office:date-value="2026-05-21" calcext:value-type="date">
            <text:p>21/5/2026</text:p>
          </table:table-cell>
          <table:table-cell table:style-name="ce15" table:content-validation-name="val7" office:value-type="string" calcext:value-type="string">
            <text:p>Alimentação</text:p>
          </table:table-cell>
          <table:table-cell table:style-name="ce15" table:content-validation-name="val2" office:value-type="string" calcext:value-type="string">
            <text:p>Almoço fora</text:p>
          </table:table-cell>
          <table:table-cell table:style-name="ce15"/>
          <table:table-cell table:style-name="ce48" office:value-type="float" office:value="85" calcext:value-type="float">
            <text:p><text:s/>R$ 85,00 </text:p>
          </table:table-cell>
          <table:table-cell/>
          <table:table-cell table:style-name="ce54"/>
          <table:table-cell table:style-name="ce63" table:content-validation-name="val3"/>
          <table:table-cell table:style-name="ce65"/>
          <table:table-cell table:style-name="ce69"/>
          <table:table-cell/>
          <table:table-cell table:style-name="ce75"/>
          <table:table-cell table:style-name="ce78"/>
          <table:table-cell table:style-name="ce82"/>
          <table:table-cell table:style-name="ce69"/>
          <table:table-cell/>
          <table:table-cell table:style-name="Default" table:number-columns-repeated="16367"/>
        </table:table-row>
        <table:table-row table:style-name="ro1">
          <table:table-cell/>
          <table:table-cell table:style-name="ce9" office:value-type="date" office:date-value="2026-05-21" calcext:value-type="date">
            <text:p>21/5/2026</text:p>
          </table:table-cell>
          <table:table-cell table:style-name="ce15" table:content-validation-name="val7" office:value-type="string" calcext:value-type="string">
            <text:p>Investimento</text:p>
          </table:table-cell>
          <table:table-cell table:style-name="ce15" table:content-validation-name="val2"/>
          <table:table-cell table:style-name="ce15" office:value-type="string" calcext:value-type="string">
            <text:p>pc - teclado</text:p>
          </table:table-cell>
          <table:table-cell table:style-name="ce48" office:value-type="float" office:value="394.14" calcext:value-type="float">
            <text:p><text:s/>R$ 394,14 </text:p>
          </table:table-cell>
          <table:table-cell/>
          <table:table-cell table:style-name="ce55"/>
          <table:table-cell table:style-name="ce64" table:content-validation-name="val3"/>
          <table:table-cell table:style-name="ce64"/>
          <table:table-cell table:style-name="ce70"/>
          <table:table-cell/>
          <table:table-cell table:style-name="ce75"/>
          <table:table-cell table:style-name="ce78"/>
          <table:table-cell table:style-name="ce82"/>
          <table:table-cell table:style-name="ce69"/>
          <table:table-cell/>
          <table:table-cell table:style-name="Default" table:number-columns-repeated="16367"/>
        </table:table-row>
        <table:table-row table:style-name="ro1">
          <table:table-cell/>
          <table:table-cell table:style-name="ce9" office:value-type="date" office:date-value="2026-05-22" calcext:value-type="date">
            <text:p>22/5/2026</text:p>
          </table:table-cell>
          <table:table-cell table:style-name="ce15" table:content-validation-name="val7" office:value-type="string" calcext:value-type="string">
            <text:p>Investimento</text:p>
          </table:table-cell>
          <table:table-cell table:style-name="ce15" table:content-validation-name="val2"/>
          <table:table-cell table:style-name="ce15" office:value-type="string" calcext:value-type="string">
            <text:p>pc - monitor</text:p>
          </table:table-cell>
          <table:table-cell table:style-name="ce48" office:value-type="float" office:value="629" calcext:value-type="float">
            <text:p><text:s/>R$ 629,00 </text:p>
          </table:table-cell>
          <table:table-cell table:number-columns-repeated="4"/>
          <table:table-cell table:style-name="ce51"/>
          <table:table-cell/>
          <table:table-cell table:style-name="ce75"/>
          <table:table-cell table:style-name="ce78"/>
          <table:table-cell table:style-name="ce82"/>
          <table:table-cell table:style-name="ce69"/>
          <table:table-cell/>
          <table:table-cell table:style-name="Default" table:number-columns-repeated="16367"/>
        </table:table-row>
        <table:table-row table:style-name="ro1">
          <table:table-cell/>
          <table:table-cell table:style-name="ce9"/>
          <table:table-cell table:style-name="ce15" table:content-validation-name="val7" office:value-type="string" calcext:value-type="string">
            <text:p>Alimentação</text:p>
          </table:table-cell>
          <table:table-cell table:style-name="ce15" table:content-validation-name="val2" office:value-type="string" calcext:value-type="string">
            <text:p>Supermercado</text:p>
          </table:table-cell>
          <table:table-cell table:style-name="ce15"/>
          <table:table-cell table:style-name="ce48" table:formula="of:=4.58+9" office:value-type="float" office:value="13.58" calcext:value-type="float">
            <text:p><text:s/>R$ 13,58 </text:p>
          </table:table-cell>
          <table:table-cell table:number-columns-repeated="6"/>
          <table:table-cell table:style-name="ce75"/>
          <table:table-cell table:style-name="ce78"/>
          <table:table-cell table:style-name="ce82"/>
          <table:table-cell table:style-name="ce69"/>
          <table:table-cell/>
          <table:table-cell table:style-name="Default" table:number-columns-repeated="16367"/>
        </table:table-row>
        <table:table-row table:style-name="ro1">
          <table:table-cell/>
          <table:table-cell table:style-name="ce9"/>
          <table:table-cell table:style-name="ce15" table:content-validation-name="val7" office:value-type="string" calcext:value-type="string">
            <text:p>Investimento</text:p>
          </table:table-cell>
          <table:table-cell table:style-name="ce15" table:content-validation-name="val2"/>
          <table:table-cell table:style-name="ce15" office:value-type="string" calcext:value-type="string">
            <text:p>pc - ventuinhas</text:p>
          </table:table-cell>
          <table:table-cell table:style-name="ce48" office:value-type="float" office:value="208.51" calcext:value-type="float">
            <text:p><text:s/>R$ 208,51 </text:p>
          </table:table-cell>
          <table:table-cell table:number-columns-repeated="6"/>
          <table:table-cell table:style-name="ce25"/>
          <table:table-cell table:style-name="ce79"/>
          <table:table-cell table:style-name="ce83"/>
          <table:table-cell table:style-name="ce70"/>
          <table:table-cell/>
          <table:table-cell table:style-name="Default" table:number-columns-repeated="16367"/>
        </table:table-row>
        <table:table-row table:style-name="ro1">
          <table:table-cell/>
          <table:table-cell table:style-name="ce9"/>
          <table:table-cell table:style-name="ce15" table:content-validation-name="val7" office:value-type="string" calcext:value-type="string">
            <text:p>Lazer</text:p>
          </table:table-cell>
          <table:table-cell table:style-name="ce15" table:content-validation-name="val2" office:value-type="string" calcext:value-type="string">
            <text:p>Saídas com amigos</text:p>
          </table:table-cell>
          <table:table-cell table:style-name="ce15"/>
          <table:table-cell table:style-name="ce48" office:value-type="float" office:value="25" calcext:value-type="float">
            <text:p><text:s/>R$ 25,00 </text:p>
          </table:table-cell>
          <table:table-cell table:number-columns-repeated="11"/>
          <table:table-cell table:style-name="Default" table:number-columns-repeated="16367"/>
        </table:table-row>
        <table:table-row table:style-name="ro1">
          <table:table-cell/>
          <table:table-cell table:style-name="ce9"/>
          <table:table-cell table:style-name="ce15" table:content-validation-name="val7" office:value-type="string" calcext:value-type="string">
            <text:p>Investimento</text:p>
          </table:table-cell>
          <table:table-cell table:style-name="ce15" table:content-validation-name="val2"/>
          <table:table-cell table:style-name="ce15" office:value-type="string" calcext:value-type="string">
            <text:p>pc - ram</text:p>
          </table:table-cell>
          <table:table-cell table:style-name="ce48" office:value-type="float" office:value="1738.04" calcext:value-type="float">
            <text:p><text:s/>R$ 1.738,04 </text:p>
          </table:table-cell>
          <table:table-cell table:number-columns-repeated="11"/>
          <table:table-cell table:style-name="Default" table:number-columns-repeated="16367"/>
        </table:table-row>
        <table:table-row table:style-name="ro1" table:number-rows-repeated="4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 table:number-columns-repeated="11"/>
          <table:table-cell table:style-name="Default" table:number-columns-repeated="16367"/>
        </table:table-row>
        <table:table-row table:style-name="ro1">
          <table:table-cell/>
          <table:table-cell table:style-name="ce10"/>
          <table:table-cell table:style-name="ce15" table:content-validation-name="val7"/>
          <table:table-cell table:style-name="ce17" table:content-validation-name="val2"/>
          <table:table-cell table:style-name="ce17"/>
          <table:table-cell table:style-name="ce49"/>
          <table:table-cell table:number-columns-repeated="11"/>
          <table:table-cell table:style-name="Default" table:number-columns-repeated="16367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16367"/>
        </table:table-row>
        <table:table-row table:style-name="ro1">
          <table:table-cell/>
          <table:table-cell table:style-name="ce11" office:value-type="string" calcext:value-type="string">
            <text:p>Alimentação</text:p>
          </table:table-cell>
          <table:table-cell table:style-name="ce20" office:value-type="string" calcext:value-type="string">
            <text:p>Doces</text:p>
          </table:table-cell>
          <table:table-cell table:style-name="ce31" table:formula="of:=SUMIF([.$D$11:.$D$32];[.C35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6" office:value-type="string" calcext:value-type="string">
            <text:p>Internet</text:p>
          </table:table-cell>
          <table:table-cell table:style-name="ce31" table:formula="of:=SUMIF([.$I$11:.$I$22];[.H35];[.$K$11:.$K$22])" office:value-type="float" office:value="0" calcext:value-type="float">
            <text:p><text:s/>R$ -   </text:p>
          </table:table-cell>
          <table:table-cell table:number-columns-repeated="8"/>
          <table:table-cell table:style-name="Default" table:number-columns-repeated="16367"/>
        </table:table-row>
        <table:table-row table:style-name="ro1">
          <table:table-cell/>
          <table:table-cell table:style-name="ce12" table:formula="of:=SUM([.D35:.D39])" office:value-type="float" office:value="0" calcext:value-type="float">
            <text:p><text:s/>R$ -   </text:p>
          </table:table-cell>
          <table:table-cell office:value-type="string" calcext:value-type="string">
            <text:p>Padaria </text:p>
          </table:table-cell>
          <table:table-cell table:formula="of:=SUMIF([.$D$11:.$D$32];[.C36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Planos/assinaturas</text:p>
          </table:table-cell>
          <table:table-cell table:style-name="ce32" table:formula="of:=SUMIF([.$I$11:.$I$22];[.H36];[.$K$11:.$K$22])" office:value-type="float" office:value="43.6" calcext:value-type="float">
            <text:p><text:s/>R$ 43,60 </text:p>
          </table:table-cell>
          <table:table-cell table:number-columns-repeated="8"/>
          <table:table-cell table:style-name="Default"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<text:s/>Almoço fora</text:p>
          </table:table-cell>
          <table:table-cell table:formula="of:=SUMIF([.$D$11:.$D$32];[.C37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Agua</text:p>
          </table:table-cell>
          <table:table-cell table:style-name="ce32" table:formula="of:=SUMIF([.$I$11:.$I$22];[.H37];[.$K$11:.$K$22])" office:value-type="float" office:value="0" calcext:value-type="float">
            <text:p><text:s/>R$ -   </text:p>
          </table:table-cell>
          <table:table-cell table:number-columns-repeated="8"/>
          <table:table-cell table:style-name="Default"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Lanches / Snacks</text:p>
          </table:table-cell>
          <table:table-cell table:formula="of:=SUMIF([.$D$11:.$D$32];[.C38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Luz</text:p>
          </table:table-cell>
          <table:table-cell table:style-name="ce32" table:formula="of:=SUMIF([.$I$11:.$I$22];[.H38];[.$K$11:.$K$22])" office:value-type="float" office:value="0" calcext:value-type="float">
            <text:p><text:s/>R$ -   </text:p>
          </table:table-cell>
          <table:table-cell table:number-columns-repeated="8"/>
          <table:table-cell table:style-name="Default" table:number-columns-repeated="16367"/>
        </table:table-row>
        <table:table-row table:style-name="ro1">
          <table:table-cell table:number-columns-repeated="2"/>
          <table:table-cell table:style-name="ce22"/>
          <table:table-cell table:style-name="ce33" table:formula="of:=SUMIF([.$D$11:.$D$32];[.C39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Gasolina</text:p>
          </table:table-cell>
          <table:table-cell table:style-name="ce32" table:formula="of:=SUMIF([.$I$11:.$I$22];[.H39];[.$K$11:.$K$22])" office:value-type="float" office:value="131.43" calcext:value-type="float">
            <text:p><text:s/>R$ 131,43 </text:p>
          </table:table-cell>
          <table:table-cell table:number-columns-repeated="8"/>
          <table:table-cell table:style-name="Default" table:number-columns-repeated="16367"/>
        </table:table-row>
        <table:table-row table:style-name="ro1">
          <table:table-cell table:number-columns-repeated="2"/>
          <table:table-cell table:style-name="ce23"/>
          <table:table-cell table:style-name="ce34"/>
          <table:table-cell table:number-columns-repeated="3"/>
          <table:table-cell table:style-name="ce57" office:value-type="string" calcext:value-type="string">
            <text:p>Dizimos</text:p>
          </table:table-cell>
          <table:table-cell table:style-name="ce32" table:formula="of:=SUMIF([.$I$11:.$I$22];[.H40];[.$K$11:.$K$22])" office:value-type="float" office:value="240" calcext:value-type="float">
            <text:p><text:s/>R$ 240,00 </text:p>
          </table:table-cell>
          <table:table-cell table:number-columns-repeated="8"/>
          <table:table-cell table:style-name="Default" table:number-columns-repeated="16367"/>
        </table:table-row>
        <table:table-row table:style-name="ro1">
          <table:table-cell/>
          <table:table-cell table:style-name="ce11" office:value-type="string" calcext:value-type="string">
            <text:p>Lazer</text:p>
          </table:table-cell>
          <table:table-cell table:style-name="ce20" office:value-type="string" calcext:value-type="string">
            <text:p>Delivery (iFood, etc)</text:p>
          </table:table-cell>
          <table:table-cell table:style-name="ce31" table:formula="of:=SUMIF([.$D$11:.$D$32];[.C41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Ofertas</text:p>
          </table:table-cell>
          <table:table-cell table:style-name="ce32" table:formula="of:=SUMIF([.$I$11:.$I$22];[.H41];[.$K$11:.$K$22])" office:value-type="float" office:value="0" calcext:value-type="float">
            <text:p><text:s/>R$ -   </text:p>
          </table:table-cell>
          <table:table-cell table:number-columns-repeated="8"/>
          <table:table-cell table:style-name="Default" table:number-columns-repeated="16367"/>
        </table:table-row>
        <table:table-row table:style-name="ro1">
          <table:table-cell/>
          <table:table-cell table:style-name="ce12" table:formula="of:=SUBTOTAL(9;[.D41:.D48])" office:value-type="float" office:value="69.7" calcext:value-type="float">
            <text:p><text:s/>R$ 69,70 </text:p>
          </table:table-cell>
          <table:table-cell office:value-type="string" calcext:value-type="string">
            <text:p>Cinema / Shows</text:p>
          </table:table-cell>
          <table:table-cell table:formula="of:=SUMIF([.$D$11:.$D$32];[.C42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Parcelas</text:p>
          </table:table-cell>
          <table:table-cell table:style-name="ce32" table:formula="of:=SUMIF([.$I$11:.$I$22];[.H42];[.$K$11:.$K$22])" office:value-type="float" office:value="147" calcext:value-type="float">
            <text:p><text:s/>R$ 147,00 </text:p>
          </table:table-cell>
          <table:table-cell table:number-columns-repeated="8"/>
          <table:table-cell table:style-name="Default"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Passeios / Viagens</text:p>
          </table:table-cell>
          <table:table-cell table:formula="of:=SUMIF([.$D$11:.$D$32];[.C43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Saúde</text:p>
          </table:table-cell>
          <table:table-cell table:style-name="ce32" table:formula="of:=SUMIF([.$I$11:.$I$22];[.H43];[.$K$11:.$K$22])" office:value-type="float" office:value="0" calcext:value-type="float">
            <text:p><text:s/>R$ -   </text:p>
          </table:table-cell>
          <table:table-cell table:number-columns-repeated="8"/>
          <table:table-cell table:style-name="Default"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Compras por impulso (não essenciais)</text:p>
          </table:table-cell>
          <table:table-cell table:formula="of:=SUMIF([.$D$11:.$D$32];[.C44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Investimento</text:p>
          </table:table-cell>
          <table:table-cell table:style-name="ce32" table:formula="of:=SUMIF([.$I$11:.$I$22];[.H44];[.$K$11:.$K$22])" office:value-type="float" office:value="0" calcext:value-type="float">
            <text:p><text:s/>R$ -   </text:p>
          </table:table-cell>
          <table:table-cell table:number-columns-repeated="8"/>
          <table:table-cell table:style-name="Default"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<text:s/>Jogos / Games / Aplicativos pagos</text:p>
          </table:table-cell>
          <table:table-cell table:formula="of:=SUMIF([.$D$11:.$D$32];[.C45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8"/>
          <table:table-cell table:style-name="ce33" table:formula="of:=SUMIF([.$I$11:.$I$22];[.H45];[.$K$11:.$K$22])" office:value-type="float" office:value="0" calcext:value-type="float">
            <text:p><text:s/>R$ -   </text:p>
          </table:table-cell>
          <table:table-cell table:number-columns-repeated="8"/>
          <table:table-cell table:style-name="Default"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Saídas com amigos</text:p>
          </table:table-cell>
          <table:table-cell table:formula="of:=SUMIF([.$D$11:.$D$32];[.C46];[.$F$11:.$F$32])" office:value-type="float" office:value="69.7" calcext:value-type="float">
            <text:p><text:s/>R$ 69,70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2"/>
          <table:table-cell table:style-name="ce24"/>
          <table:table-cell table:style-name="ce35" table:formula="of:=SUMIF([.$D$11:.$D$32];[.C47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2"/>
          <table:table-cell table:style-name="ce22"/>
          <table:table-cell table:style-name="ce33" table:formula="of:=SUMIF([.$D$11:.$D$32];[.C48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3"/>
          <table:table-cell table:style-name="Default" table:number-columns-repeated="16367"/>
        </table:table-row>
        <table:table-row table:style-name="ro1">
          <table:table-cell/>
          <table:table-cell table:style-name="ce11" office:value-type="string" calcext:value-type="string">
            <text:p>Despesas</text:p>
          </table:table-cell>
          <table:table-cell table:style-name="ce20" office:value-type="string" calcext:value-type="string">
            <text:p>Presentes e datas comemorativas</text:p>
          </table:table-cell>
          <table:table-cell table:style-name="ce31" table:formula="of:=SUMIF([.$D$11:.$D$32];[.C50];[.$F$11:.$F$32])" office:value-type="float" office:value="69.9" calcext:value-type="float">
            <text:p><text:s/>R$ 69,90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/>
          <table:table-cell table:style-name="ce12" table:formula="of:=SUM([.D50:.D56])" office:value-type="float" office:value="76.9" calcext:value-type="float">
            <text:p><text:s/>R$ 76,90 </text:p>
          </table:table-cell>
          <table:table-cell office:value-type="string" calcext:value-type="string">
            <text:p>Doações / Contribuições</text:p>
          </table:table-cell>
          <table:table-cell table:formula="of:=SUMIF([.$D$11:.$D$32];[.C51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Taxas bancárias / Pix por engano</text:p>
          </table:table-cell>
          <table:table-cell table:formula="of:=SUMIF([.$D$11:.$D$32];[.C52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Compras online aleatórias</text:p>
          </table:table-cell>
          <table:table-cell table:formula="of:=SUMIF([.$D$11:.$D$32];[.C53];[.$F$11:.$F$32])" office:value-type="float" office:value="7" calcext:value-type="float">
            <text:p><text:s/>R$ 7,00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Manutenção da casa (lâmpada, pilha, etc)</text:p>
          </table:table-cell>
          <table:table-cell table:formula="of:=SUMIF([.$D$11:.$D$32];[.C54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Gastos pessoais (roupas, acessórios)</text:p>
          </table:table-cell>
          <table:table-cell table:formula="of:=SUMIF([.$D$11:.$D$32];[.C55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56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3"/>
          <table:table-cell table:style-name="Default" table:number-columns-repeated="16367"/>
        </table:table-row>
        <table:table-row table:style-name="ro1">
          <table:table-cell/>
          <table:table-cell table:style-name="ce11" office:value-type="string" calcext:value-type="string">
            <text:p>Transporte</text:p>
          </table:table-cell>
          <table:table-cell table:style-name="ce20" office:value-type="string" calcext:value-type="string">
            <text:p>Acessório</text:p>
          </table:table-cell>
          <table:table-cell table:style-name="ce31" table:formula="of:=SUMIF([.$D$11:.$D$32];[.C58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/>
          <table:table-cell table:style-name="ce12" table:formula="of:=SUM([.D58:.D64])" office:value-type="float" office:value="48" calcext:value-type="float">
            <text:p><text:s/>R$ 48,00 </text:p>
          </table:table-cell>
          <table:table-cell office:value-type="string" calcext:value-type="string">
            <text:p>Uber / Táxi</text:p>
          </table:table-cell>
          <table:table-cell table:formula="of:=SUMIF([.$D$11:.$D$32];[.C59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Ônibus / Metrô</text:p>
          </table:table-cell>
          <table:table-cell table:formula="of:=SUMIF([.$D$11:.$D$32];[.C60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Estacionamento</text:p>
          </table:table-cell>
          <table:table-cell table:formula="of:=SUMIF([.$D$11:.$D$32];[.C61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Manutenção (óleo, pneu, etc)</text:p>
          </table:table-cell>
          <table:table-cell table:formula="of:=SUMIF([.$D$11:.$D$32];[.C62];[.$F$11:.$F$32])" office:value-type="float" office:value="48" calcext:value-type="float">
            <text:p><text:s/>R$ 48,00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Multas / Documentação</text:p>
          </table:table-cell>
          <table:table-cell table:formula="of:=SUMIF([.$D$11:.$D$32];[.C63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64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3"/>
          <table:table-cell table:style-name="Default" table:number-columns-repeated="16367"/>
        </table:table-row>
        <table:table-row table:style-name="ro1">
          <table:table-cell/>
          <table:table-cell table:style-name="ce11" office:value-type="string" calcext:value-type="string">
            <text:p>Educação</text:p>
          </table:table-cell>
          <table:table-cell table:style-name="ce20" office:value-type="string" calcext:value-type="string">
            <text:p>Livros </text:p>
          </table:table-cell>
          <table:table-cell table:style-name="ce31" table:formula="of:=SUMIF([.$D$11:.$D$32];[.C66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/>
          <table:table-cell table:style-name="ce12" table:formula="of:=SUM([.D66:.D72])" office:value-type="float" office:value="0" calcext:value-type="float">
            <text:p><text:s/>R$ -   </text:p>
          </table:table-cell>
          <table:table-cell office:value-type="string" calcext:value-type="string">
            <text:p>Cursos online (Udemy, Alura, etc)</text:p>
          </table:table-cell>
          <table:table-cell table:formula="of:=SUMIF([.$D$11:.$D$32];[.C67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Material escolar / didático</text:p>
          </table:table-cell>
          <table:table-cell table:formula="of:=SUMIF([.$D$11:.$D$32];[.C68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Apostilas</text:p>
          </table:table-cell>
          <table:table-cell table:formula="of:=SUMIF([.$D$11:.$D$32];[.C69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Internet dedicada para estudos</text:p>
          </table:table-cell>
          <table:table-cell table:formula="of:=SUMIF([.$D$11:.$D$32];[.C70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Plataformas de aprendizado </text:p>
          </table:table-cell>
          <table:table-cell table:formula="of:=SUMIF([.$D$11:.$D$32];[.C71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72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3"/>
          <table:table-cell table:style-name="Default" table:number-columns-repeated="16367"/>
        </table:table-row>
        <table:table-row table:style-name="ro1">
          <table:table-cell/>
          <table:table-cell table:style-name="ce11" office:value-type="string" calcext:value-type="string">
            <text:p>Saúde</text:p>
          </table:table-cell>
          <table:table-cell table:style-name="ce20" office:value-type="string" calcext:value-type="string">
            <text:p>Medicamentos</text:p>
          </table:table-cell>
          <table:table-cell table:style-name="ce31" table:formula="of:=SUMIF([.$D$11:.$D$32];[.C74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/>
          <table:table-cell table:style-name="ce12" table:formula="of:=SUM([.D74:.D80])" office:value-type="float" office:value="0" calcext:value-type="float">
            <text:p><text:s/>R$ -   </text:p>
          </table:table-cell>
          <table:table-cell office:value-type="string" calcext:value-type="string">
            <text:p>Consultas médicas / exames</text:p>
          </table:table-cell>
          <table:table-cell table:formula="of:=SUMIF([.$D$11:.$D$32];[.C75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Óculos / lentes</text:p>
          </table:table-cell>
          <table:table-cell table:formula="of:=SUMIF([.$D$11:.$D$32];[.C76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Produtos de higiene e cuidados pessoais</text:p>
          </table:table-cell>
          <table:table-cell table:formula="of:=SUMIF([.$D$11:.$D$32];[.C77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3"/>
          <table:table-cell table:formula="of:=SUMIF([.$D$11:.$D$32];[.C78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3"/>
          <table:table-cell table:formula="of:=SUMIF([.$D$11:.$D$32];[.C79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80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3"/>
          <table:table-cell table:style-name="Default" table:number-columns-repeated="16367"/>
        </table:table-row>
        <table:table-row table:style-name="ro1">
          <table:table-cell/>
          <table:table-cell table:style-name="ce11" office:value-type="string" calcext:value-type="string">
            <text:p>Imprevistos</text:p>
          </table:table-cell>
          <table:table-cell table:style-name="ce20" office:value-type="string" calcext:value-type="string">
            <text:p>Emergência médica ou odontológica</text:p>
          </table:table-cell>
          <table:table-cell table:style-name="ce31" table:formula="of:=SUMIF([.$D$11:.$D$32];[.C82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/>
          <table:table-cell table:style-name="ce12" table:formula="of:=SUM([.D82:.D88])" office:value-type="float" office:value="0" calcext:value-type="float">
            <text:p><text:s/>R$ -   </text:p>
          </table:table-cell>
          <table:table-cell office:value-type="string" calcext:value-type="string">
            <text:p>Equipamento quebrado (celular, notebook)</text:p>
          </table:table-cell>
          <table:table-cell table:formula="of:=SUMIF([.$D$11:.$D$32];[.C83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Perda de documentos / taxas</text:p>
          </table:table-cell>
          <table:table-cell table:formula="of:=SUMIF([.$D$11:.$D$32];[.C84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Atrasos em contas com juros</text:p>
          </table:table-cell>
          <table:table-cell table:formula="of:=SUMIF([.$D$11:.$D$32];[.C85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Conserto urgente (casa, carro, etc)</text:p>
          </table:table-cell>
          <table:table-cell table:formula="of:=SUMIF([.$D$11:.$D$32];[.C86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Ajuda financeira a alguém (urgente)</text:p>
          </table:table-cell>
          <table:table-cell table:formula="of:=SUMIF([.$D$11:.$D$32];[.C87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88];[.$F$11:.$F$32])" office:value-type="float" office:value="0" calcext:value-type="float">
            <text:p><text:s/>R$ -   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16367"/>
        </table:table-row>
        <table:table-row table:style-name="ro1">
          <table:table-cell/>
          <table:table-cell table:style-name="ce11" office:value-type="string" calcext:value-type="string">
            <text:p>Investimento</text:p>
          </table:table-cell>
          <table:table-cell table:style-name="ce20"/>
          <table:table-cell table:style-name="ce31" table:formula="of:=SUMIF([.C11:.C32];[.B90];[.F11:.F32])" office:value-type="float" office:value="5340.18" calcext:value-type="float">
            <text:p><text:s/>R$ 5.340,18 </text:p>
          </table:table-cell>
          <table:table-cell table:number-columns-repeated="13"/>
          <table:table-cell table:style-name="Default" table:number-columns-repeated="16367"/>
        </table:table-row>
      </table:table>
      <table:table table:name="Jun" table:style-name="ta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6" table:default-cell-style-name="ce21"/>
        <table:table-column table:style-name="co27" table:default-cell-style-name="ce32"/>
        <table:table-column table:style-name="co31" table:default-cell-style-name="Default"/>
        <table:table-column table:style-name="co32" table:default-cell-style-name="Default"/>
        <table:table-column table:style-name="co7" table:default-cell-style-name="Default"/>
        <table:table-column table:style-name="co25" table:default-cell-style-name="Default"/>
        <table:table-column table:style-name="co6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27" table:default-cell-style-name="Default"/>
        <table:table-column table:style-name="co13" table:number-columns-repeated="4" table:default-cell-style-name="Default"/>
        <table:table-column table:style-name="co15" table:number-columns-repeated="16368"/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" office:value-type="string" calcext:value-type="string">
            <text:p>JUN</text:p>
          </table:table-cell>
          <table:table-cell table:style-name="ce13" office:value-type="string" calcext:value-type="string">
            <text:p>entradas</text:p>
          </table:table-cell>
          <table:table-cell table:style-name="ce26" office:value-type="string" calcext:value-type="string">
            <text:p>valor</text:p>
          </table:table-cell>
          <table:table-cell table:style-name="ce13"/>
          <table:table-cell table:style-name="ce7" office:value-type="string" calcext:value-type="string">
            <text:p>Saldo mensal</text:p>
          </table:table-cell>
          <table:table-cell/>
          <table:table-cell table:style-name="ce50" table:number-columns-spanned="4" table:number-rows-spanned="1"/>
          <table:covered-table-cell table:number-columns-repeated="3" table:style-name="ce59"/>
          <table:table-cell table:number-columns-repeated="5"/>
          <table:table-cell table:style-name="Default" table:number-columns-repeated="16368"/>
        </table:table-row>
        <table:table-row table:style-name="ro1">
          <table:table-cell/>
          <table:table-cell table:style-name="ce2" office:value-type="string" calcext:value-type="string">
            <text:p>salário</text:p>
          </table:table-cell>
          <table:table-cell table:style-name="ce14"/>
          <table:table-cell table:style-name="ce27" office:value-type="float" office:value="2100" calcext:value-type="float">
            <text:p><text:s/>R$ 2.100,00 </text:p>
          </table:table-cell>
          <table:table-cell table:style-name="ce36" office:value-type="string" office:string-value="entradas" calcext:value-type="string">
            <text:p><text:s/>entradas </text:p>
          </table:table-cell>
          <table:table-cell table:style-name="ce41" table:formula="of:=SUM([.D3];[.D5];[.D6];[.D7];[.D4])" office:value-type="float" office:value="2091.7" calcext:value-type="float">
            <text:p><text:s/>R$ 2.091,70 </text:p>
          </table:table-cell>
          <table:table-cell table:number-columns-repeated="2"/>
          <table:table-cell table:style-name="ce1" office:value-type="string" calcext:value-type="string">
            <text:p>data</text:p>
          </table:table-cell>
          <table:table-cell/>
          <table:table-cell table:style-name="ce66" office:value-type="string" calcext:value-type="string">
            <text:p>dinheiro guardado</text:p>
          </table:table-cell>
          <table:table-cell table:style-name="ce71" table:formula="of:=[$Mai.L3]" office:value-type="float" office:value="2503" calcext:value-type="float">
            <text:p><text:s/>R$ 2.503,00 </text:p>
          </table:table-cell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3" office:value-type="string" calcext:value-type="string">
            <text:p>Fotografia</text:p>
          </table:table-cell>
          <table:table-cell table:style-name="ce15"/>
          <table:table-cell table:style-name="ce28" table:formula="of:=SUM([.P10:.P25])" office:value-type="float" office:value="0" calcext:value-type="float">
            <text:p><text:s/>R$ -   </text:p>
          </table:table-cell>
          <table:table-cell table:style-name="ce37" office:value-type="string" office:string-value="gastos variados" calcext:value-type="string">
            <text:p><text:s/>gastos variados </text:p>
          </table:table-cell>
          <table:table-cell table:style-name="ce42" table:formula="of:=SUM([.F11:.F32])" office:value-type="float" office:value="350" calcext:value-type="float">
            <text:p><text:s/>R$ 350,00 </text:p>
          </table:table-cell>
          <table:table-cell table:number-columns-repeated="2"/>
          <table:table-cell table:style-name="ce60" table:formula="of:=TODAY()" office:value-type="date" office:date-value="2026-06-21" calcext:value-type="date">
            <text:p>21/6/2026</text:p>
          </table:table-cell>
          <table:table-cell/>
          <table:table-cell table:style-name="ce66" office:value-type="string" calcext:value-type="string">
            <text:p>dinheiro para investimento futuro</text:p>
          </table:table-cell>
          <table:table-cell table:style-name="ce71" table:formula="of:=[$Mai.L4]" office:value-type="float" office:value="0" calcext:value-type="float">
            <text:p><text:s/>R$ -   </text:p>
          </table:table-cell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4" office:value-type="string" calcext:value-type="string">
            <text:p>extra 2</text:p>
          </table:table-cell>
          <table:table-cell table:style-name="ce16"/>
          <table:table-cell table:style-name="ce29"/>
          <table:table-cell table:style-name="ce38" office:value-type="string" office:string-value="entradas fotografia" calcext:value-type="string">
            <text:p><text:s/>entradas fotografia </text:p>
          </table:table-cell>
          <table:table-cell table:style-name="ce43" table:formula="of:=[.D4]" office:value-type="float" office:value="0" calcext:value-type="float">
            <text:p><text:s/>R$ -   </text:p>
          </table:table-cell>
          <table:table-cell table:number-columns-repeated="2"/>
          <table:table-cell table:style-name="ce61" office:value-type="string" calcext:value-type="string">
            <text:p>ultimo update</text:p>
          </table:table-cell>
          <table:table-cell/>
          <table:table-cell table:style-name="ce66" office:value-type="string" calcext:value-type="string">
            <text:p>dinheiro para lente</text:p>
          </table:table-cell>
          <table:table-cell table:style-name="ce71" table:formula="of:=[$Mai.L5]" office:value-type="float" office:value="156.5" calcext:value-type="float">
            <text:p><text:s/>R$ 156,50 </text:p>
          </table:table-cell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4" office:value-type="string" calcext:value-type="string">
            <text:p>extra 3</text:p>
          </table:table-cell>
          <table:table-cell table:style-name="ce16"/>
          <table:table-cell table:style-name="ce29"/>
          <table:table-cell table:style-name="ce39" office:value-type="string" office:string-value="saidas fixas" calcext:value-type="string">
            <text:p><text:s/>saidas fixas </text:p>
          </table:table-cell>
          <table:table-cell table:style-name="ce44" table:formula="of:=SUM([.K11:.K22])" office:value-type="float" office:value="1084" calcext:value-type="float">
            <text:p><text:s/>R$ 1.084,00 </text:p>
          </table:table-cell>
          <table:table-cell table:number-columns-repeated="2"/>
          <table:table-cell table:style-name="ce62" office:value-type="date" office:date-value="2025-07-09" calcext:value-type="date">
            <text:p>9/7/2025</text:p>
          </table:table-cell>
          <table:table-cell/>
          <table:table-cell table:style-name="ce67" office:value-type="string" calcext:value-type="string">
            <text:p>para passar o mês, tenho =&gt;</text:p>
          </table:table-cell>
          <table:table-cell table:style-name="ce72"/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5" office:value-type="string" calcext:value-type="string">
            <text:p>Saldo</text:p>
          </table:table-cell>
          <table:table-cell table:style-name="ce17"/>
          <table:table-cell table:style-name="ce30" table:formula="of:=[$Mai.F7]" office:value-type="float" office:value="-8.30000000000041" calcext:value-type="float">
            <text:p>-R$ 8,30 </text:p>
          </table:table-cell>
          <table:table-cell table:style-name="ce40" office:value-type="string" office:string-value="saldo" calcext:value-type="string">
            <text:p><text:s/>saldo </text:p>
          </table:table-cell>
          <table:table-cell table:style-name="ce45" table:formula="of:=[.F3]-[.F4]-[.F6]" office:value-type="float" office:value="657.7" calcext:value-type="float">
            <text:p><text:s/>R$ 657,70 </text:p>
          </table:table-cell>
          <table:table-cell table:number-columns-repeated="10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Variados</text:p>
          </table:table-cell>
          <table:covered-table-cell table:number-columns-repeated="3" table:style-name="ce18"/>
          <table:covered-table-cell table:style-name="ce46"/>
          <table:table-cell/>
          <table:table-cell table:style-name="ce52" office:value-type="string" calcext:value-type="string" table:number-columns-spanned="4" table:number-rows-spanned="1">
            <text:p>Fixos</text:p>
          </table:table-cell>
          <table:covered-table-cell table:number-columns-repeated="3" table:style-name="ce52"/>
          <table:table-cell/>
          <table:table-cell table:style-name="ce73" office:value-type="string" calcext:value-type="string">
            <text:p>Eventos</text:p>
          </table:table-cell>
          <table:table-cell table:style-name="ce76" office:value-type="string" calcext:value-type="string">
            <text:p>Data</text:p>
          </table:table-cell>
          <table:table-cell table:style-name="ce80" office:value-type="string" calcext:value-type="string">
            <text:p>Descrição</text:p>
          </table:table-cell>
          <table:table-cell table:style-name="ce84" office:value-type="string" calcext:value-type="string">
            <text:p>Entradas</text:p>
          </table:table-cell>
          <table:table-cell table:style-name="Default" table:number-columns-repeated="16368"/>
        </table:table-row>
        <table:table-row table:style-name="ro1">
          <table:table-cell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topico</text:p>
          </table:table-cell>
          <table:table-cell table:style-name="ce7" office:value-type="string" calcext:value-type="string">
            <text:p>sub-tópico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valor</text:p>
          </table:table-cell>
          <table:table-cell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Topico</text:p>
          </table:table-cell>
          <table:table-cell table:style-name="ce7" office:value-type="string" calcext:value-type="string">
            <text:p>sub-tópico</text:p>
          </table:table-cell>
          <table:table-cell table:style-name="ce7" office:value-type="string" calcext:value-type="string">
            <text:p>valor</text:p>
          </table:table-cell>
          <table:table-cell/>
          <table:table-cell table:style-name="ce74"/>
          <table:table-cell table:style-name="ce77"/>
          <table:table-cell table:style-name="ce81"/>
          <table:table-cell table:style-name="ce68"/>
          <table:table-cell table:style-name="Default" table:number-columns-repeated="16368"/>
        </table:table-row>
        <table:table-row table:style-name="ro1">
          <table:table-cell/>
          <table:table-cell table:style-name="ce9" office:value-type="date" office:date-value="2026-06-09" calcext:value-type="date">
            <text:p>9/6/2026</text:p>
          </table:table-cell>
          <table:table-cell table:style-name="ce15" table:content-validation-name="val7" office:value-type="string" calcext:value-type="string">
            <text:p>Investimento</text:p>
          </table:table-cell>
          <table:table-cell table:style-name="ce15" table:content-validation-name="val2"/>
          <table:table-cell table:style-name="ce15" office:value-type="string" calcext:value-type="string">
            <text:p>pc - processador</text:p>
          </table:table-cell>
          <table:table-cell table:style-name="ce48" office:value-type="float" office:value="350" calcext:value-type="float">
            <text:p><text:s/>R$ 350,00 </text:p>
          </table:table-cell>
          <table:table-cell/>
          <table:table-cell table:style-name="ce53"/>
          <table:table-cell table:style-name="ce63" table:content-validation-name="val3"/>
          <table:table-cell table:style-name="ce63" office:value-type="string" calcext:value-type="string">
            <text:p>mãe</text:p>
          </table:table-cell>
          <table:table-cell table:style-name="ce68" office:value-type="float" office:value="1012" calcext:value-type="float">
            <text:p><text:s/>R$ 1.012,0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/>
          <table:table-cell table:style-name="ce54"/>
          <table:table-cell table:style-name="ce63" table:content-validation-name="val3"/>
          <table:table-cell table:style-name="ce65" office:value-type="string" calcext:value-type="string">
            <text:p>spotify já foi pago</text:p>
          </table:table-cell>
          <table:table-cell table:style-name="ce69" office:value-type="float" office:value="7" calcext:value-type="float">
            <text:p><text:s/>R$ 7,0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/>
          <table:table-cell table:style-name="ce54"/>
          <table:table-cell table:style-name="ce63" table:content-validation-name="val3"/>
          <table:table-cell table:style-name="ce65" office:value-type="string" calcext:value-type="string">
            <text:p>claro</text:p>
          </table:table-cell>
          <table:table-cell table:style-name="ce69" office:value-type="float" office:value="30" calcext:value-type="float">
            <text:p><text:s/>R$ 30,0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/>
          <table:table-cell table:style-name="ce54"/>
          <table:table-cell table:style-name="ce63" table:content-validation-name="val3"/>
          <table:table-cell table:style-name="ce65" office:value-type="string" calcext:value-type="string">
            <text:p>barbeiro</text:p>
          </table:table-cell>
          <table:table-cell table:style-name="ce69" office:value-type="float" office:value="35" calcext:value-type="float">
            <text:p><text:s/>R$ 35,0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/>
          <table:table-cell table:style-name="ce54"/>
          <table:table-cell table:style-name="ce63" table:content-validation-name="val3"/>
          <table:table-cell table:style-name="ce65" office:value-type="string" calcext:value-type="string">
            <text:p>gasolina</text:p>
          </table:table-cell>
          <table:table-cell table:style-name="ce69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 table:number-rows-repeated="6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/>
          <table:table-cell table:style-name="ce54"/>
          <table:table-cell table:style-name="ce63" table:content-validation-name="val3"/>
          <table:table-cell table:style-name="ce65"/>
          <table:table-cell table:style-name="ce69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/>
          <table:table-cell table:style-name="ce55"/>
          <table:table-cell table:style-name="ce64" table:content-validation-name="val3"/>
          <table:table-cell table:style-name="ce64"/>
          <table:table-cell table:style-name="ce70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 table:number-columns-repeated="4"/>
          <table:table-cell table:style-name="ce51" table:formula="of:=SUM([.K11:.K22])" office:value-type="float" office:value="1084" calcext:value-type="float">
            <text:p><text:s/>R$ 1.084,00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/>
          <table:table-cell office:value-type="string" calcext:value-type="string">
            <text:p>terabyte</text:p>
          </table:table-cell>
          <table:table-cell office:value-type="string" calcext:value-type="string">
            <text:p>SSD</text:p>
          </table:table-cell>
          <table:table-cell table:style-name="ce90" office:value-type="float" office:value="1000" calcext:value-type="float">
            <text:p><text:s/>R$ 1.000,00 </text:p>
          </table:table-cell>
          <table:table-cell table:number-columns-repeated="2"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 table:number-columns-repeated="2"/>
          <table:table-cell office:value-type="string" calcext:value-type="string">
            <text:p>RAM</text:p>
          </table:table-cell>
          <table:table-cell table:number-columns-repeated="3"/>
          <table:table-cell table:style-name="ce25"/>
          <table:table-cell table:style-name="ce79"/>
          <table:table-cell table:style-name="ce83"/>
          <table:table-cell table:style-name="ce70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/>
          <table:table-cell office:value-type="string" calcext:value-type="string">
            <text:p>amazon OU shoope</text:p>
          </table:table-cell>
          <table:table-cell office:value-type="string" calcext:value-type="string">
            <text:p>MONITOR</text:p>
          </table:table-cell>
          <table:table-cell table:style-name="ce91" office:value-type="float" office:value="700" calcext:value-type="float">
            <text:p><text:s/>R$ 700,00 </text:p>
          </table:table-cell>
          <table:table-cell table:number-columns-repeated="6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/>
          <table:table-cell office:value-type="string" calcext:value-type="string">
            <text:p>aliepres</text:p>
          </table:table-cell>
          <table:table-cell office:value-type="string" calcext:value-type="string">
            <text:p>MOUSE</text:p>
          </table:table-cell>
          <table:table-cell table:style-name="ce91" office:value-type="float" office:value="112" calcext:value-type="float">
            <text:p><text:s/>R$ 112,00 </text:p>
          </table:table-cell>
          <table:table-cell table:number-columns-repeated="6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/>
          <table:table-cell office:value-type="string" calcext:value-type="string">
            <text:p>pichau</text:p>
          </table:table-cell>
          <table:table-cell office:value-type="string" calcext:value-type="string">
            <text:p>FONTE</text:p>
          </table:table-cell>
          <table:table-cell table:style-name="ce91" office:value-type="float" office:value="499" calcext:value-type="float">
            <text:p><text:s/>R$ 499,00 </text:p>
          </table:table-cell>
          <table:table-cell table:number-columns-repeated="6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/>
          <table:table-cell office:value-type="string" calcext:value-type="string">
            <text:p>aliespres</text:p>
          </table:table-cell>
          <table:table-cell office:value-type="string" calcext:value-type="string">
            <text:p>mousepad</text:p>
          </table:table-cell>
          <table:table-cell table:style-name="ce91" office:value-type="float" office:value="40" calcext:value-type="float">
            <text:p><text:s/>R$ 40,00 </text:p>
          </table:table-cell>
          <table:table-cell table:style-name="ce51"/>
          <table:table-cell table:number-columns-repeated="5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/>
          <table:table-cell office:value-type="string" calcext:value-type="string">
            <text:p>kabum</text:p>
          </table:table-cell>
          <table:table-cell office:value-type="string" calcext:value-type="string">
            <text:p>TECLADO</text:p>
          </table:table-cell>
          <table:table-cell table:style-name="ce90" office:value-type="float" office:value="350" calcext:value-type="float">
            <text:p><text:s/>R$ 350,00 </text:p>
          </table:table-cell>
          <table:table-cell table:number-columns-repeated="6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/>
          <table:table-cell office:value-type="string" calcext:value-type="string">
            <text:p>pichau</text:p>
          </table:table-cell>
          <table:table-cell office:value-type="string" calcext:value-type="string">
            <text:p>COOLER</text:p>
          </table:table-cell>
          <table:table-cell table:style-name="ce90" office:value-type="float" office:value="150" calcext:value-type="float">
            <text:p><text:s/>R$ 150,00 </text:p>
          </table:table-cell>
          <table:table-cell table:number-columns-repeated="6"/>
          <table:table-cell table:style-name="Default" table:number-columns-repeated="16368"/>
        </table:table-row>
        <table:table-row table:style-name="ro1">
          <table:table-cell/>
          <table:table-cell table:style-name="ce10"/>
          <table:table-cell table:style-name="ce17" table:content-validation-name="val7"/>
          <table:table-cell table:style-name="ce17" table:content-validation-name="val2"/>
          <table:table-cell table:style-name="ce17"/>
          <table:table-cell table:style-name="ce49"/>
          <table:table-cell table:number-columns-repeated="3"/>
          <table:table-cell table:style-name="ce88" table:formula="of:=SUM([.J24:.J31])" office:value-type="float" office:value="2851" calcext:value-type="float">
            <text:p><text:s/>R$ 2.851,00 </text:p>
          </table:table-cell>
          <table:table-cell table:number-columns-repeated="6"/>
          <table:table-cell table:style-name="Default" table:number-columns-repeated="16368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Alimentação</text:p>
          </table:table-cell>
          <table:table-cell table:style-name="ce20" office:value-type="string" calcext:value-type="string">
            <text:p>Doces</text:p>
          </table:table-cell>
          <table:table-cell table:style-name="ce31" table:formula="of:=SUMIF([.$D$11:.$D$32];[.C35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6" office:value-type="string" calcext:value-type="string">
            <text:p>Internet</text:p>
          </table:table-cell>
          <table:table-cell table:style-name="ce31" table:formula="of:=SUMIF([.$I$11:.$I$22];[.H35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35:.D39])" office:value-type="float" office:value="0" calcext:value-type="float">
            <text:p><text:s/>R$ -   </text:p>
          </table:table-cell>
          <table:table-cell office:value-type="string" calcext:value-type="string">
            <text:p>Padaria </text:p>
          </table:table-cell>
          <table:table-cell table:formula="of:=SUMIF([.$D$11:.$D$32];[.C36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Planos/assinaturas</text:p>
          </table:table-cell>
          <table:table-cell table:style-name="ce32" table:formula="of:=SUMIF([.$I$11:.$I$22];[.H36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<text:s/>Almoço fora</text:p>
          </table:table-cell>
          <table:table-cell table:formula="of:=SUMIF([.$D$11:.$D$32];[.C37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Agua</text:p>
          </table:table-cell>
          <table:table-cell table:style-name="ce32" table:formula="of:=SUMIF([.$I$11:.$I$22];[.H37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Lanches / Snacks</text:p>
          </table:table-cell>
          <table:table-cell table:formula="of:=SUMIF([.$D$11:.$D$32];[.C38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Luz</text:p>
          </table:table-cell>
          <table:table-cell table:style-name="ce32" table:formula="of:=SUMIF([.$I$11:.$I$22];[.H38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2"/>
          <table:table-cell table:style-name="ce33" table:formula="of:=SUMIF([.$D$11:.$D$32];[.C39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Gasolina</text:p>
          </table:table-cell>
          <table:table-cell table:style-name="ce32" table:formula="of:=SUMIF([.$I$11:.$I$22];[.H39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3"/>
          <table:table-cell table:style-name="ce34"/>
          <table:table-cell table:number-columns-repeated="3"/>
          <table:table-cell table:style-name="ce57" office:value-type="string" calcext:value-type="string">
            <text:p>Dizimos</text:p>
          </table:table-cell>
          <table:table-cell table:style-name="ce32" table:formula="of:=SUMIF([.$I$11:.$I$22];[.H40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Lazer</text:p>
          </table:table-cell>
          <table:table-cell table:style-name="ce20" office:value-type="string" calcext:value-type="string">
            <text:p>Delivery (iFood, etc)</text:p>
          </table:table-cell>
          <table:table-cell table:style-name="ce31" table:formula="of:=SUMIF([.$D$11:.$D$32];[.C41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Ofertas</text:p>
          </table:table-cell>
          <table:table-cell table:style-name="ce32" table:formula="of:=SUMIF([.$I$11:.$I$22];[.H41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2" table:formula="of:=SUBTOTAL(9;[.D41:.D48])" office:value-type="float" office:value="0" calcext:value-type="float">
            <text:p><text:s/>R$ -   </text:p>
          </table:table-cell>
          <table:table-cell office:value-type="string" calcext:value-type="string">
            <text:p>Cinema / Shows</text:p>
          </table:table-cell>
          <table:table-cell table:formula="of:=SUMIF([.$D$11:.$D$32];[.C42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Parcelas</text:p>
          </table:table-cell>
          <table:table-cell table:style-name="ce32" table:formula="of:=SUMIF([.$I$11:.$I$22];[.H42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asseios / Viagens</text:p>
          </table:table-cell>
          <table:table-cell table:formula="of:=SUMIF([.$D$11:.$D$32];[.C43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Saúde</text:p>
          </table:table-cell>
          <table:table-cell table:style-name="ce32" table:formula="of:=SUMIF([.$I$11:.$I$22];[.H43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Compras por impulso (não essenciais)</text:p>
          </table:table-cell>
          <table:table-cell table:formula="of:=SUMIF([.$D$11:.$D$32];[.C44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Investimento</text:p>
          </table:table-cell>
          <table:table-cell table:style-name="ce32" table:formula="of:=SUMIF([.$I$11:.$I$22];[.H44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<text:s/>Jogos / Games / Aplicativos pagos</text:p>
          </table:table-cell>
          <table:table-cell table:formula="of:=SUMIF([.$D$11:.$D$32];[.C45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8"/>
          <table:table-cell table:style-name="ce33" table:formula="of:=SUMIF([.$I$11:.$I$22];[.H45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Saídas com amigos</text:p>
          </table:table-cell>
          <table:table-cell table:formula="of:=SUMIF([.$D$11:.$D$32];[.C4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4"/>
          <table:table-cell table:style-name="ce35" table:formula="of:=SUMIF([.$D$11:.$D$32];[.C4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2"/>
          <table:table-cell table:style-name="ce33" table:formula="of:=SUMIF([.$D$11:.$D$32];[.C4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Despesas</text:p>
          </table:table-cell>
          <table:table-cell table:style-name="ce20" office:value-type="string" calcext:value-type="string">
            <text:p>Presentes e datas comemorativas</text:p>
          </table:table-cell>
          <table:table-cell table:style-name="ce31" table:formula="of:=SUMIF([.$D$11:.$D$32];[.C5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50:.D56])" office:value-type="float" office:value="0" calcext:value-type="float">
            <text:p><text:s/>R$ -   </text:p>
          </table:table-cell>
          <table:table-cell office:value-type="string" calcext:value-type="string">
            <text:p>Doações / Contribuições</text:p>
          </table:table-cell>
          <table:table-cell table:formula="of:=SUMIF([.$D$11:.$D$32];[.C51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Taxas bancárias / Pix por engano</text:p>
          </table:table-cell>
          <table:table-cell table:formula="of:=SUMIF([.$D$11:.$D$32];[.C5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Compras online aleatórias</text:p>
          </table:table-cell>
          <table:table-cell table:formula="of:=SUMIF([.$D$11:.$D$32];[.C53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anutenção da casa (lâmpada, pilha, etc)</text:p>
          </table:table-cell>
          <table:table-cell table:formula="of:=SUMIF([.$D$11:.$D$32];[.C5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Gastos pessoais (roupas, acessórios)</text:p>
          </table:table-cell>
          <table:table-cell table:formula="of:=SUMIF([.$D$11:.$D$32];[.C55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5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Transporte</text:p>
          </table:table-cell>
          <table:table-cell table:style-name="ce20" office:value-type="string" calcext:value-type="string">
            <text:p>Acessório</text:p>
          </table:table-cell>
          <table:table-cell table:style-name="ce31" table:formula="of:=SUMIF([.$D$11:.$D$32];[.C5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58:.D64])" office:value-type="float" office:value="0" calcext:value-type="float">
            <text:p><text:s/>R$ -   </text:p>
          </table:table-cell>
          <table:table-cell office:value-type="string" calcext:value-type="string">
            <text:p>Uber / Táxi</text:p>
          </table:table-cell>
          <table:table-cell table:formula="of:=SUMIF([.$D$11:.$D$32];[.C59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Ônibus / Metrô</text:p>
          </table:table-cell>
          <table:table-cell table:formula="of:=SUMIF([.$D$11:.$D$32];[.C6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Estacionamento</text:p>
          </table:table-cell>
          <table:table-cell table:formula="of:=SUMIF([.$D$11:.$D$32];[.C61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anutenção (óleo, pneu, etc)</text:p>
          </table:table-cell>
          <table:table-cell table:formula="of:=SUMIF([.$D$11:.$D$32];[.C6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ultas / Documentação</text:p>
          </table:table-cell>
          <table:table-cell table:formula="of:=SUMIF([.$D$11:.$D$32];[.C63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6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Educação</text:p>
          </table:table-cell>
          <table:table-cell table:style-name="ce20" office:value-type="string" calcext:value-type="string">
            <text:p>Livros </text:p>
          </table:table-cell>
          <table:table-cell table:style-name="ce31" table:formula="of:=SUMIF([.$D$11:.$D$32];[.C6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66:.D72])" office:value-type="float" office:value="0" calcext:value-type="float">
            <text:p><text:s/>R$ -   </text:p>
          </table:table-cell>
          <table:table-cell office:value-type="string" calcext:value-type="string">
            <text:p>Cursos online (Udemy, Alura, etc)</text:p>
          </table:table-cell>
          <table:table-cell table:formula="of:=SUMIF([.$D$11:.$D$32];[.C6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aterial escolar / didático</text:p>
          </table:table-cell>
          <table:table-cell table:formula="of:=SUMIF([.$D$11:.$D$32];[.C6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Apostilas</text:p>
          </table:table-cell>
          <table:table-cell table:formula="of:=SUMIF([.$D$11:.$D$32];[.C69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Internet dedicada para estudos</text:p>
          </table:table-cell>
          <table:table-cell table:formula="of:=SUMIF([.$D$11:.$D$32];[.C7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lataformas de aprendizado </text:p>
          </table:table-cell>
          <table:table-cell table:formula="of:=SUMIF([.$D$11:.$D$32];[.C71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7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Saúde</text:p>
          </table:table-cell>
          <table:table-cell table:style-name="ce20" office:value-type="string" calcext:value-type="string">
            <text:p>Medicamentos</text:p>
          </table:table-cell>
          <table:table-cell table:style-name="ce31" table:formula="of:=SUMIF([.$D$11:.$D$32];[.C7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74:.D80])" office:value-type="float" office:value="0" calcext:value-type="float">
            <text:p><text:s/>R$ -   </text:p>
          </table:table-cell>
          <table:table-cell office:value-type="string" calcext:value-type="string">
            <text:p>Consultas médicas / exames</text:p>
          </table:table-cell>
          <table:table-cell table:formula="of:=SUMIF([.$D$11:.$D$32];[.C75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Óculos / lentes</text:p>
          </table:table-cell>
          <table:table-cell table:formula="of:=SUMIF([.$D$11:.$D$32];[.C7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rodutos de higiene e cuidados pessoais</text:p>
          </table:table-cell>
          <table:table-cell table:formula="of:=SUMIF([.$D$11:.$D$32];[.C7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3"/>
          <table:table-cell table:formula="of:=SUMIF([.$D$11:.$D$32];[.C7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3"/>
          <table:table-cell table:formula="of:=SUMIF([.$D$11:.$D$32];[.C79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8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Imprevistos</text:p>
          </table:table-cell>
          <table:table-cell table:style-name="ce20" office:value-type="string" calcext:value-type="string">
            <text:p>Emergência médica ou odontológica</text:p>
          </table:table-cell>
          <table:table-cell table:style-name="ce31" table:formula="of:=SUMIF([.$D$11:.$D$32];[.C8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82:.D88])" office:value-type="float" office:value="0" calcext:value-type="float">
            <text:p><text:s/>R$ -   </text:p>
          </table:table-cell>
          <table:table-cell office:value-type="string" calcext:value-type="string">
            <text:p>Equipamento quebrado (celular, notebook)</text:p>
          </table:table-cell>
          <table:table-cell table:formula="of:=SUMIF([.$D$11:.$D$32];[.C83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erda de documentos / taxas</text:p>
          </table:table-cell>
          <table:table-cell table:formula="of:=SUMIF([.$D$11:.$D$32];[.C8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Atrasos em contas com juros</text:p>
          </table:table-cell>
          <table:table-cell table:formula="of:=SUMIF([.$D$11:.$D$32];[.C85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Conserto urgente (casa, carro, etc)</text:p>
          </table:table-cell>
          <table:table-cell table:formula="of:=SUMIF([.$D$11:.$D$32];[.C8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Ajuda financeira a alguém (urgente)</text:p>
          </table:table-cell>
          <table:table-cell table:formula="of:=SUMIF([.$D$11:.$D$32];[.C8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8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Investimento</text:p>
          </table:table-cell>
          <table:table-cell table:style-name="ce20"/>
          <table:table-cell table:style-name="ce31" table:formula="of:=SUMIF([.C11:.C32];[.B90];[.F11:.F32])" office:value-type="float" office:value="350" calcext:value-type="float">
            <text:p><text:s/>R$ 350,00 </text:p>
          </table:table-cell>
          <table:table-cell table:number-columns-repeated="12"/>
          <table:table-cell table:style-name="Default" table:number-columns-repeated="16368"/>
        </table:table-row>
      </table:table>
      <table:table table:name="Jul" table:style-name="ta7">
        <table:table-column table:style-name="co1" table:default-cell-style-name="Default"/>
        <table:table-column table:style-name="co2" table:default-cell-style-name="Default"/>
        <table:table-column table:style-name="co16" table:default-cell-style-name="ce21"/>
        <table:table-column table:style-name="co40" table:default-cell-style-name="ce32"/>
        <table:table-column table:style-name="co41" table:default-cell-style-name="Default"/>
        <table:table-column table:style-name="co3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3" table:number-columns-repeated="4" table:default-cell-style-name="Default"/>
        <table:table-column table:style-name="co15" table:number-columns-repeated="16368"/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" office:value-type="string" calcext:value-type="string">
            <text:p>JUL</text:p>
          </table:table-cell>
          <table:table-cell table:style-name="ce13" office:value-type="string" calcext:value-type="string">
            <text:p>entradas</text:p>
          </table:table-cell>
          <table:table-cell table:style-name="ce26" office:value-type="string" calcext:value-type="string">
            <text:p>valor</text:p>
          </table:table-cell>
          <table:table-cell table:style-name="ce13"/>
          <table:table-cell table:style-name="ce7" office:value-type="string" calcext:value-type="string">
            <text:p>Saldo mensal</text:p>
          </table:table-cell>
          <table:table-cell/>
          <table:table-cell table:style-name="ce50" table:number-columns-spanned="4" table:number-rows-spanned="1"/>
          <table:covered-table-cell table:number-columns-repeated="3" table:style-name="ce59"/>
          <table:table-cell table:number-columns-repeated="5"/>
          <table:table-cell table:style-name="Default" table:number-columns-repeated="16368"/>
        </table:table-row>
        <table:table-row table:style-name="ro1">
          <table:table-cell/>
          <table:table-cell table:style-name="ce2" office:value-type="string" calcext:value-type="string">
            <text:p>salário</text:p>
          </table:table-cell>
          <table:table-cell table:style-name="ce14"/>
          <table:table-cell table:style-name="ce27"/>
          <table:table-cell table:style-name="ce36" office:value-type="string" office:string-value="entradas" calcext:value-type="string">
            <text:p><text:s/>entradas </text:p>
          </table:table-cell>
          <table:table-cell table:style-name="ce41" table:formula="of:=SUM([.D3];[.D5];[.D6];[.D7];[.D4])" office:value-type="float" office:value="657.7" calcext:value-type="float">
            <text:p><text:s/>R$ 657,70 </text:p>
          </table:table-cell>
          <table:table-cell table:number-columns-repeated="2"/>
          <table:table-cell table:style-name="ce1" office:value-type="string" calcext:value-type="string">
            <text:p>data</text:p>
          </table:table-cell>
          <table:table-cell/>
          <table:table-cell table:style-name="ce66" office:value-type="string" calcext:value-type="string">
            <text:p>dinheiro guardado</text:p>
          </table:table-cell>
          <table:table-cell table:style-name="ce71"/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3" office:value-type="string" calcext:value-type="string">
            <text:p>Fotografia</text:p>
          </table:table-cell>
          <table:table-cell table:style-name="ce15"/>
          <table:table-cell table:style-name="ce28" table:formula="of:=SUM([.P10:.P25])" office:value-type="float" office:value="0" calcext:value-type="float">
            <text:p><text:s/>R$ -   </text:p>
          </table:table-cell>
          <table:table-cell table:style-name="ce37" office:value-type="string" office:string-value="gastos variados" calcext:value-type="string">
            <text:p><text:s/>gastos variados </text:p>
          </table:table-cell>
          <table:table-cell table:style-name="ce42" table:formula="of:=SUM([.F11:.F32])" office:value-type="float" office:value="0" calcext:value-type="float">
            <text:p><text:s/>R$ -   </text:p>
          </table:table-cell>
          <table:table-cell table:number-columns-repeated="2"/>
          <table:table-cell table:style-name="ce60" table:formula="of:=TODAY()" office:value-type="date" office:date-value="2026-06-21" calcext:value-type="date">
            <text:p>21/6/2026</text:p>
          </table:table-cell>
          <table:table-cell/>
          <table:table-cell table:style-name="ce66" office:value-type="string" calcext:value-type="string">
            <text:p>dinheiro para inestimento futuro</text:p>
          </table:table-cell>
          <table:table-cell table:style-name="ce71"/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4" office:value-type="string" calcext:value-type="string">
            <text:p>extra 2</text:p>
          </table:table-cell>
          <table:table-cell table:style-name="ce16"/>
          <table:table-cell table:style-name="ce29"/>
          <table:table-cell table:style-name="ce38" office:value-type="string" office:string-value="entradas fotografia" calcext:value-type="string">
            <text:p><text:s/>entradas fotografia </text:p>
          </table:table-cell>
          <table:table-cell table:style-name="ce43" table:formula="of:=[.D4]" office:value-type="float" office:value="0" calcext:value-type="float">
            <text:p><text:s/>R$ -   </text:p>
          </table:table-cell>
          <table:table-cell table:number-columns-repeated="2"/>
          <table:table-cell table:style-name="ce61" office:value-type="string" calcext:value-type="string">
            <text:p>ultimo update</text:p>
          </table:table-cell>
          <table:table-cell/>
          <table:table-cell table:style-name="ce66" office:value-type="string" calcext:value-type="string">
            <text:p>dinheiro para lente</text:p>
          </table:table-cell>
          <table:table-cell table:style-name="ce71" table:formula="of:=SUM([.P10:.P25])" office:value-type="float" office:value="0" calcext:value-type="float">
            <text:p><text:s/>R$ -   </text:p>
          </table:table-cell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4" office:value-type="string" calcext:value-type="string">
            <text:p>extra 3</text:p>
          </table:table-cell>
          <table:table-cell table:style-name="ce16"/>
          <table:table-cell table:style-name="ce29"/>
          <table:table-cell table:style-name="ce39" office:value-type="string" office:string-value="saidas fixas" calcext:value-type="string">
            <text:p><text:s/>saidas fixas </text:p>
          </table:table-cell>
          <table:table-cell table:style-name="ce44" table:formula="of:=SUM([.K11:.K22])" office:value-type="float" office:value="0" calcext:value-type="float">
            <text:p><text:s/>R$ -   </text:p>
          </table:table-cell>
          <table:table-cell table:number-columns-repeated="2"/>
          <table:table-cell table:style-name="ce62" office:value-type="date" office:date-value="2025-07-09" calcext:value-type="date">
            <text:p>9/7/2025</text:p>
          </table:table-cell>
          <table:table-cell/>
          <table:table-cell table:style-name="ce67" office:value-type="string" calcext:value-type="string">
            <text:p>para passar o mês, tenho =&gt;</text:p>
          </table:table-cell>
          <table:table-cell table:style-name="ce72"/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5" office:value-type="string" calcext:value-type="string">
            <text:p>Saldo</text:p>
          </table:table-cell>
          <table:table-cell table:style-name="ce17"/>
          <table:table-cell table:style-name="ce30" table:formula="of:=[$Jun.F7]" office:value-type="float" office:value="657.7" calcext:value-type="float">
            <text:p><text:s/>R$ 657,70 </text:p>
          </table:table-cell>
          <table:table-cell table:style-name="ce40" office:value-type="string" office:string-value="saldo" calcext:value-type="string">
            <text:p><text:s/>saldo </text:p>
          </table:table-cell>
          <table:table-cell table:style-name="ce45" table:formula="of:=[.F3]-[.F4]-[.F6]" office:value-type="float" office:value="657.7" calcext:value-type="float">
            <text:p><text:s/>R$ 657,70 </text:p>
          </table:table-cell>
          <table:table-cell table:number-columns-repeated="10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Variados</text:p>
          </table:table-cell>
          <table:covered-table-cell table:number-columns-repeated="3" table:style-name="ce18"/>
          <table:covered-table-cell table:style-name="ce46"/>
          <table:table-cell/>
          <table:table-cell table:style-name="ce52" office:value-type="string" calcext:value-type="string" table:number-columns-spanned="4" table:number-rows-spanned="1">
            <text:p>Fixos</text:p>
          </table:table-cell>
          <table:covered-table-cell table:number-columns-repeated="3" table:style-name="ce52"/>
          <table:table-cell/>
          <table:table-cell table:style-name="ce73" office:value-type="string" calcext:value-type="string">
            <text:p>Eventos</text:p>
          </table:table-cell>
          <table:table-cell table:style-name="ce76" office:value-type="string" calcext:value-type="string">
            <text:p>Data</text:p>
          </table:table-cell>
          <table:table-cell table:style-name="ce80" office:value-type="string" calcext:value-type="string">
            <text:p>Descrição</text:p>
          </table:table-cell>
          <table:table-cell table:style-name="ce84" office:value-type="string" calcext:value-type="string">
            <text:p>Entradas</text:p>
          </table:table-cell>
          <table:table-cell table:style-name="Default" table:number-columns-repeated="16368"/>
        </table:table-row>
        <table:table-row table:style-name="ro1">
          <table:table-cell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topico</text:p>
          </table:table-cell>
          <table:table-cell table:style-name="ce7" office:value-type="string" calcext:value-type="string">
            <text:p>sub-tópico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valor</text:p>
          </table:table-cell>
          <table:table-cell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Topico</text:p>
          </table:table-cell>
          <table:table-cell table:style-name="ce7" office:value-type="string" calcext:value-type="string">
            <text:p>sub-tópico</text:p>
          </table:table-cell>
          <table:table-cell table:style-name="ce7" office:value-type="string" calcext:value-type="string">
            <text:p>valor</text:p>
          </table:table-cell>
          <table:table-cell/>
          <table:table-cell table:style-name="ce74"/>
          <table:table-cell table:style-name="ce77"/>
          <table:table-cell table:style-name="ce81"/>
          <table:table-cell table:style-name="ce68"/>
          <table:table-cell table:style-name="Default" table:number-columns-repeated="16368"/>
        </table:table-row>
        <table:table-row table:style-name="ro1">
          <table:table-cell/>
          <table:table-cell table:style-name="ce8"/>
          <table:table-cell table:style-name="ce19" table:content-validation-name="val7"/>
          <table:table-cell table:style-name="ce19" table:content-validation-name="val2"/>
          <table:table-cell table:style-name="ce19"/>
          <table:table-cell table:style-name="ce47"/>
          <table:table-cell/>
          <table:table-cell table:style-name="ce53"/>
          <table:table-cell table:style-name="ce63" table:content-validation-name="val3"/>
          <table:table-cell table:style-name="ce63"/>
          <table:table-cell table:style-name="ce68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 table:number-rows-repeated="10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/>
          <table:table-cell table:style-name="ce54"/>
          <table:table-cell table:style-name="ce63" table:content-validation-name="val3"/>
          <table:table-cell table:style-name="ce65"/>
          <table:table-cell table:style-name="ce69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/>
          <table:table-cell table:style-name="ce55"/>
          <table:table-cell table:style-name="ce64" table:content-validation-name="val3"/>
          <table:table-cell table:style-name="ce64"/>
          <table:table-cell table:style-name="ce70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 table:number-columns-repeated="4"/>
          <table:table-cell table:style-name="ce51" table:formula="of:=SUM([.K11:.K22])" office:value-type="float" office:value="0" calcext:value-type="float">
            <text:p><text:s/>R$ -  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 table:number-columns-repeated="6"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 table:number-columns-repeated="6"/>
          <table:table-cell table:style-name="ce25"/>
          <table:table-cell table:style-name="ce79"/>
          <table:table-cell table:style-name="ce83"/>
          <table:table-cell table:style-name="ce70"/>
          <table:table-cell table:style-name="Default" table:number-columns-repeated="16368"/>
        </table:table-row>
        <table:table-row table:style-name="ro1" table:number-rows-repeated="6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 table:number-columns-repeated="10"/>
          <table:table-cell table:style-name="Default" table:number-columns-repeated="16368"/>
        </table:table-row>
        <table:table-row table:style-name="ro1">
          <table:table-cell/>
          <table:table-cell table:style-name="ce10"/>
          <table:table-cell table:style-name="ce17" table:content-validation-name="val7"/>
          <table:table-cell table:style-name="ce17" table:content-validation-name="val2"/>
          <table:table-cell table:style-name="ce17"/>
          <table:table-cell table:style-name="ce49"/>
          <table:table-cell table:number-columns-repeated="10"/>
          <table:table-cell table:style-name="Default" table:number-columns-repeated="16368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Alimentação</text:p>
          </table:table-cell>
          <table:table-cell table:style-name="ce20" office:value-type="string" calcext:value-type="string">
            <text:p>Doces</text:p>
          </table:table-cell>
          <table:table-cell table:style-name="ce31" table:formula="of:=SUMIF([.$D$11:.$D$32];[.C35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6" office:value-type="string" calcext:value-type="string">
            <text:p>Internet</text:p>
          </table:table-cell>
          <table:table-cell table:style-name="ce31" table:formula="of:=SUMIF([.$I$11:.$I$22];[.H35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35:.D39])" office:value-type="float" office:value="0" calcext:value-type="float">
            <text:p><text:s/>R$ -   </text:p>
          </table:table-cell>
          <table:table-cell office:value-type="string" calcext:value-type="string">
            <text:p>Padaria </text:p>
          </table:table-cell>
          <table:table-cell table:formula="of:=SUMIF([.$D$11:.$D$32];[.C36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Planos/assinaturas</text:p>
          </table:table-cell>
          <table:table-cell table:style-name="ce32" table:formula="of:=SUMIF([.$I$11:.$I$22];[.H36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<text:s/>Almoço fora</text:p>
          </table:table-cell>
          <table:table-cell table:formula="of:=SUMIF([.$D$11:.$D$32];[.C37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Agua</text:p>
          </table:table-cell>
          <table:table-cell table:style-name="ce32" table:formula="of:=SUMIF([.$I$11:.$I$22];[.H37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Lanches / Snacks</text:p>
          </table:table-cell>
          <table:table-cell table:formula="of:=SUMIF([.$D$11:.$D$32];[.C38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Luz</text:p>
          </table:table-cell>
          <table:table-cell table:style-name="ce32" table:formula="of:=SUMIF([.$I$11:.$I$22];[.H38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2"/>
          <table:table-cell table:style-name="ce33" table:formula="of:=SUMIF([.$D$11:.$D$32];[.C39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Gasolina</text:p>
          </table:table-cell>
          <table:table-cell table:style-name="ce32" table:formula="of:=SUMIF([.$I$11:.$I$22];[.H39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3"/>
          <table:table-cell table:style-name="ce34"/>
          <table:table-cell table:number-columns-repeated="3"/>
          <table:table-cell table:style-name="ce57" office:value-type="string" calcext:value-type="string">
            <text:p>Dizimos</text:p>
          </table:table-cell>
          <table:table-cell table:style-name="ce32" table:formula="of:=SUMIF([.$I$11:.$I$22];[.H40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Lazer</text:p>
          </table:table-cell>
          <table:table-cell table:style-name="ce20" office:value-type="string" calcext:value-type="string">
            <text:p>Delivery (iFood, etc)</text:p>
          </table:table-cell>
          <table:table-cell table:style-name="ce31" table:formula="of:=SUMIF([.$D$11:.$D$32];[.C41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Ofertas</text:p>
          </table:table-cell>
          <table:table-cell table:style-name="ce32" table:formula="of:=SUMIF([.$I$11:.$I$22];[.H41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2" table:formula="of:=SUBTOTAL(9;[.D41:.D48])" office:value-type="float" office:value="0" calcext:value-type="float">
            <text:p><text:s/>R$ -   </text:p>
          </table:table-cell>
          <table:table-cell office:value-type="string" calcext:value-type="string">
            <text:p>Cinema / Shows</text:p>
          </table:table-cell>
          <table:table-cell table:formula="of:=SUMIF([.$D$11:.$D$32];[.C42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Parcelas</text:p>
          </table:table-cell>
          <table:table-cell table:style-name="ce32" table:formula="of:=SUMIF([.$I$11:.$I$22];[.H42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asseios / Viagens</text:p>
          </table:table-cell>
          <table:table-cell table:formula="of:=SUMIF([.$D$11:.$D$32];[.C43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Saúde</text:p>
          </table:table-cell>
          <table:table-cell table:style-name="ce32" table:formula="of:=SUMIF([.$I$11:.$I$22];[.H43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Compras por impulso (não essenciais)</text:p>
          </table:table-cell>
          <table:table-cell table:formula="of:=SUMIF([.$D$11:.$D$32];[.C44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Investimento</text:p>
          </table:table-cell>
          <table:table-cell table:style-name="ce32" table:formula="of:=SUMIF([.$I$11:.$I$22];[.H44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<text:s/>Jogos / Games / Aplicativos pagos</text:p>
          </table:table-cell>
          <table:table-cell table:formula="of:=SUMIF([.$D$11:.$D$32];[.C45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8"/>
          <table:table-cell table:style-name="ce33" table:formula="of:=SUMIF([.$I$11:.$I$22];[.H45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Saídas com amigos</text:p>
          </table:table-cell>
          <table:table-cell table:formula="of:=SUMIF([.$D$11:.$D$32];[.C4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4"/>
          <table:table-cell table:style-name="ce35" table:formula="of:=SUMIF([.$D$11:.$D$32];[.C4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2"/>
          <table:table-cell table:style-name="ce33" table:formula="of:=SUMIF([.$D$11:.$D$32];[.C4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Despesas</text:p>
          </table:table-cell>
          <table:table-cell table:style-name="ce20" office:value-type="string" calcext:value-type="string">
            <text:p>Presentes e datas comemorativas</text:p>
          </table:table-cell>
          <table:table-cell table:style-name="ce31" table:formula="of:=SUMIF([.$D$11:.$D$32];[.C5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50:.D56])" office:value-type="float" office:value="0" calcext:value-type="float">
            <text:p><text:s/>R$ -   </text:p>
          </table:table-cell>
          <table:table-cell office:value-type="string" calcext:value-type="string">
            <text:p>Doações / Contribuições</text:p>
          </table:table-cell>
          <table:table-cell table:formula="of:=SUMIF([.$D$11:.$D$32];[.C51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Taxas bancárias / Pix por engano</text:p>
          </table:table-cell>
          <table:table-cell table:formula="of:=SUMIF([.$D$11:.$D$32];[.C5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Compras online aleatórias</text:p>
          </table:table-cell>
          <table:table-cell table:formula="of:=SUMIF([.$D$11:.$D$32];[.C53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anutenção da casa (lâmpada, pilha, etc)</text:p>
          </table:table-cell>
          <table:table-cell table:formula="of:=SUMIF([.$D$11:.$D$32];[.C5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Gastos pessoais (roupas, acessórios)</text:p>
          </table:table-cell>
          <table:table-cell table:formula="of:=SUMIF([.$D$11:.$D$32];[.C55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5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Transporte</text:p>
          </table:table-cell>
          <table:table-cell table:style-name="ce20" office:value-type="string" calcext:value-type="string">
            <text:p>Acessório</text:p>
          </table:table-cell>
          <table:table-cell table:style-name="ce31" table:formula="of:=SUMIF([.$D$11:.$D$32];[.C5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58:.D64])" office:value-type="float" office:value="0" calcext:value-type="float">
            <text:p><text:s/>R$ -   </text:p>
          </table:table-cell>
          <table:table-cell office:value-type="string" calcext:value-type="string">
            <text:p>Uber / Táxi</text:p>
          </table:table-cell>
          <table:table-cell table:formula="of:=SUMIF([.$D$11:.$D$32];[.C59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Ônibus / Metrô</text:p>
          </table:table-cell>
          <table:table-cell table:formula="of:=SUMIF([.$D$11:.$D$32];[.C6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Estacionamento</text:p>
          </table:table-cell>
          <table:table-cell table:formula="of:=SUMIF([.$D$11:.$D$32];[.C61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anutenção (óleo, pneu, etc)</text:p>
          </table:table-cell>
          <table:table-cell table:formula="of:=SUMIF([.$D$11:.$D$32];[.C6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ultas / Documentação</text:p>
          </table:table-cell>
          <table:table-cell table:formula="of:=SUMIF([.$D$11:.$D$32];[.C63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6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Educação</text:p>
          </table:table-cell>
          <table:table-cell table:style-name="ce20" office:value-type="string" calcext:value-type="string">
            <text:p>Livros </text:p>
          </table:table-cell>
          <table:table-cell table:style-name="ce31" table:formula="of:=SUMIF([.$D$11:.$D$32];[.C6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66:.D72])" office:value-type="float" office:value="0" calcext:value-type="float">
            <text:p><text:s/>R$ -   </text:p>
          </table:table-cell>
          <table:table-cell office:value-type="string" calcext:value-type="string">
            <text:p>Cursos online (Udemy, Alura, etc)</text:p>
          </table:table-cell>
          <table:table-cell table:formula="of:=SUMIF([.$D$11:.$D$32];[.C6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aterial escolar / didático</text:p>
          </table:table-cell>
          <table:table-cell table:formula="of:=SUMIF([.$D$11:.$D$32];[.C6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Apostilas</text:p>
          </table:table-cell>
          <table:table-cell table:formula="of:=SUMIF([.$D$11:.$D$32];[.C69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Internet dedicada para estudos</text:p>
          </table:table-cell>
          <table:table-cell table:formula="of:=SUMIF([.$D$11:.$D$32];[.C7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lataformas de aprendizado </text:p>
          </table:table-cell>
          <table:table-cell table:formula="of:=SUMIF([.$D$11:.$D$32];[.C71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7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Saúde</text:p>
          </table:table-cell>
          <table:table-cell table:style-name="ce20" office:value-type="string" calcext:value-type="string">
            <text:p>Medicamentos</text:p>
          </table:table-cell>
          <table:table-cell table:style-name="ce31" table:formula="of:=SUMIF([.$D$11:.$D$32];[.C7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74:.D80])" office:value-type="float" office:value="0" calcext:value-type="float">
            <text:p><text:s/>R$ -   </text:p>
          </table:table-cell>
          <table:table-cell office:value-type="string" calcext:value-type="string">
            <text:p>Consultas médicas / exames</text:p>
          </table:table-cell>
          <table:table-cell table:formula="of:=SUMIF([.$D$11:.$D$32];[.C75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Óculos / lentes</text:p>
          </table:table-cell>
          <table:table-cell table:formula="of:=SUMIF([.$D$11:.$D$32];[.C7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rodutos de higiene e cuidados pessoais</text:p>
          </table:table-cell>
          <table:table-cell table:formula="of:=SUMIF([.$D$11:.$D$32];[.C7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3"/>
          <table:table-cell table:formula="of:=SUMIF([.$D$11:.$D$32];[.C7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3"/>
          <table:table-cell table:formula="of:=SUMIF([.$D$11:.$D$32];[.C79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8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Imprevistos</text:p>
          </table:table-cell>
          <table:table-cell table:style-name="ce20" office:value-type="string" calcext:value-type="string">
            <text:p>Emergência médica ou odontológica</text:p>
          </table:table-cell>
          <table:table-cell table:style-name="ce31" table:formula="of:=SUMIF([.$D$11:.$D$32];[.C8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82:.D88])" office:value-type="float" office:value="0" calcext:value-type="float">
            <text:p><text:s/>R$ -   </text:p>
          </table:table-cell>
          <table:table-cell office:value-type="string" calcext:value-type="string">
            <text:p>Equipamento quebrado (celular, notebook)</text:p>
          </table:table-cell>
          <table:table-cell table:formula="of:=SUMIF([.$D$11:.$D$32];[.C83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erda de documentos / taxas</text:p>
          </table:table-cell>
          <table:table-cell table:formula="of:=SUMIF([.$D$11:.$D$32];[.C8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Atrasos em contas com juros</text:p>
          </table:table-cell>
          <table:table-cell table:formula="of:=SUMIF([.$D$11:.$D$32];[.C85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Conserto urgente (casa, carro, etc)</text:p>
          </table:table-cell>
          <table:table-cell table:formula="of:=SUMIF([.$D$11:.$D$32];[.C8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Ajuda financeira a alguém (urgente)</text:p>
          </table:table-cell>
          <table:table-cell table:formula="of:=SUMIF([.$D$11:.$D$32];[.C8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8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Investimento</text:p>
          </table:table-cell>
          <table:table-cell table:style-name="ce20"/>
          <table:table-cell table:style-name="ce31" table:formula="of:=SUMIF([.C11:.C32];[.B90];[.F11:.F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</table:table>
      <table:table table:name="Ago" table:style-name="ta8">
        <table:table-column table:style-name="co1" table:default-cell-style-name="Default"/>
        <table:table-column table:style-name="co2" table:default-cell-style-name="Default"/>
        <table:table-column table:style-name="co16" table:default-cell-style-name="ce21"/>
        <table:table-column table:style-name="co42" table:default-cell-style-name="ce32"/>
        <table:table-column table:style-name="co43" table:default-cell-style-name="Default"/>
        <table:table-column table:style-name="co3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44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3" table:number-columns-repeated="4" table:default-cell-style-name="Default"/>
        <table:table-column table:style-name="co15" table:number-columns-repeated="16368"/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" office:value-type="string" calcext:value-type="string">
            <text:p>AGO</text:p>
          </table:table-cell>
          <table:table-cell table:style-name="ce13" office:value-type="string" calcext:value-type="string">
            <text:p>entradas</text:p>
          </table:table-cell>
          <table:table-cell table:style-name="ce26" office:value-type="string" calcext:value-type="string">
            <text:p>valor</text:p>
          </table:table-cell>
          <table:table-cell table:style-name="ce13"/>
          <table:table-cell table:style-name="ce7" office:value-type="string" calcext:value-type="string">
            <text:p>Saldo mensal</text:p>
          </table:table-cell>
          <table:table-cell/>
          <table:table-cell table:style-name="ce50" table:number-columns-spanned="4" table:number-rows-spanned="1"/>
          <table:covered-table-cell table:number-columns-repeated="3" table:style-name="ce59"/>
          <table:table-cell table:number-columns-repeated="5"/>
          <table:table-cell table:style-name="Default" table:number-columns-repeated="16368"/>
        </table:table-row>
        <table:table-row table:style-name="ro1">
          <table:table-cell/>
          <table:table-cell table:style-name="ce2" office:value-type="string" calcext:value-type="string">
            <text:p>salário</text:p>
          </table:table-cell>
          <table:table-cell table:style-name="ce14"/>
          <table:table-cell table:style-name="ce27"/>
          <table:table-cell table:style-name="ce36" office:value-type="string" office:string-value="entradas" calcext:value-type="string">
            <text:p><text:s/>entradas </text:p>
          </table:table-cell>
          <table:table-cell table:style-name="ce41" table:formula="of:=SUM([.D3];[.D5];[.D6];[.D7];[.D4])" office:value-type="float" office:value="657.7" calcext:value-type="float">
            <text:p><text:s/>R$ 657,70 </text:p>
          </table:table-cell>
          <table:table-cell table:number-columns-repeated="2"/>
          <table:table-cell table:style-name="ce1" office:value-type="string" calcext:value-type="string">
            <text:p>data</text:p>
          </table:table-cell>
          <table:table-cell/>
          <table:table-cell table:style-name="ce66" office:value-type="string" calcext:value-type="string">
            <text:p>dinheiro guardado</text:p>
          </table:table-cell>
          <table:table-cell table:style-name="ce71"/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3" office:value-type="string" calcext:value-type="string">
            <text:p>Fotografia</text:p>
          </table:table-cell>
          <table:table-cell table:style-name="ce15" office:value-type="string" calcext:value-type="string">
            <text:p>minha mãe me mandou 100 reias</text:p>
          </table:table-cell>
          <table:table-cell table:style-name="ce28" table:formula="of:=SUM([.P10:.P25])" office:value-type="float" office:value="0" calcext:value-type="float">
            <text:p><text:s/>R$ -   </text:p>
          </table:table-cell>
          <table:table-cell table:style-name="ce37" office:value-type="string" office:string-value="gastos variados" calcext:value-type="string">
            <text:p><text:s/>gastos variados </text:p>
          </table:table-cell>
          <table:table-cell table:style-name="ce42" table:formula="of:=SUM([.F11:.F32])" office:value-type="float" office:value="0" calcext:value-type="float">
            <text:p><text:s/>R$ -   </text:p>
          </table:table-cell>
          <table:table-cell table:number-columns-repeated="2"/>
          <table:table-cell table:style-name="ce60" table:formula="of:=TODAY()" office:value-type="date" office:date-value="2026-06-21" calcext:value-type="date">
            <text:p>21/6/2026</text:p>
          </table:table-cell>
          <table:table-cell/>
          <table:table-cell table:style-name="ce66" office:value-type="string" calcext:value-type="string">
            <text:p>dinheiro para inestimento futuro</text:p>
          </table:table-cell>
          <table:table-cell table:style-name="ce71"/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4" office:value-type="string" calcext:value-type="string">
            <text:p>extra 2</text:p>
          </table:table-cell>
          <table:table-cell table:style-name="ce16"/>
          <table:table-cell table:style-name="ce29"/>
          <table:table-cell table:style-name="ce38" office:value-type="string" office:string-value="entradas fotografia" calcext:value-type="string">
            <text:p><text:s/>entradas fotografia </text:p>
          </table:table-cell>
          <table:table-cell table:style-name="ce43" table:formula="of:=[.D4]" office:value-type="float" office:value="0" calcext:value-type="float">
            <text:p><text:s/>R$ -   </text:p>
          </table:table-cell>
          <table:table-cell table:number-columns-repeated="2"/>
          <table:table-cell table:style-name="ce61" office:value-type="string" calcext:value-type="string">
            <text:p>ultimo update</text:p>
          </table:table-cell>
          <table:table-cell/>
          <table:table-cell table:style-name="ce66" office:value-type="string" calcext:value-type="string">
            <text:p>dinheiro para lente</text:p>
          </table:table-cell>
          <table:table-cell table:style-name="ce71" table:formula="of:=SUM([.P10:.P25])" office:value-type="float" office:value="0" calcext:value-type="float">
            <text:p><text:s/>R$ -   </text:p>
          </table:table-cell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4" office:value-type="string" calcext:value-type="string">
            <text:p>extra 3</text:p>
          </table:table-cell>
          <table:table-cell table:style-name="ce16"/>
          <table:table-cell table:style-name="ce29"/>
          <table:table-cell table:style-name="ce39" office:value-type="string" office:string-value="saidas fixas" calcext:value-type="string">
            <text:p><text:s/>saidas fixas </text:p>
          </table:table-cell>
          <table:table-cell table:style-name="ce44" table:formula="of:=SUM([.K11:.K22])" office:value-type="float" office:value="0" calcext:value-type="float">
            <text:p><text:s/>R$ -   </text:p>
          </table:table-cell>
          <table:table-cell table:number-columns-repeated="2"/>
          <table:table-cell table:style-name="ce62" office:value-type="date" office:date-value="2025-08-10" calcext:value-type="date">
            <text:p>10/8/2025</text:p>
          </table:table-cell>
          <table:table-cell/>
          <table:table-cell table:style-name="ce67" office:value-type="string" calcext:value-type="string">
            <text:p>para passar o mês, tenho =&gt;</text:p>
          </table:table-cell>
          <table:table-cell table:style-name="ce72"/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5" office:value-type="string" calcext:value-type="string">
            <text:p>Saldo</text:p>
          </table:table-cell>
          <table:table-cell table:style-name="ce17"/>
          <table:table-cell table:style-name="ce30" table:formula="of:=[$Jul.F7]" office:value-type="float" office:value="657.7" calcext:value-type="float">
            <text:p><text:s/>R$ 657,70 </text:p>
          </table:table-cell>
          <table:table-cell table:style-name="ce40" office:value-type="string" office:string-value="saldo" calcext:value-type="string">
            <text:p><text:s/>saldo </text:p>
          </table:table-cell>
          <table:table-cell table:style-name="ce45" table:formula="of:=[.F3]-[.F4]-[.F6]" office:value-type="float" office:value="657.7" calcext:value-type="float">
            <text:p><text:s/>R$ 657,70 </text:p>
          </table:table-cell>
          <table:table-cell table:number-columns-repeated="10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Variados</text:p>
          </table:table-cell>
          <table:covered-table-cell table:number-columns-repeated="3" table:style-name="ce18"/>
          <table:covered-table-cell table:style-name="ce46"/>
          <table:table-cell/>
          <table:table-cell table:style-name="ce52" office:value-type="string" calcext:value-type="string" table:number-columns-spanned="4" table:number-rows-spanned="1">
            <text:p>Fixos</text:p>
          </table:table-cell>
          <table:covered-table-cell table:number-columns-repeated="3" table:style-name="ce52"/>
          <table:table-cell/>
          <table:table-cell table:style-name="ce73" office:value-type="string" calcext:value-type="string">
            <text:p>Eventos</text:p>
          </table:table-cell>
          <table:table-cell table:style-name="ce76" office:value-type="string" calcext:value-type="string">
            <text:p>Data</text:p>
          </table:table-cell>
          <table:table-cell table:style-name="ce80" office:value-type="string" calcext:value-type="string">
            <text:p>Descrição</text:p>
          </table:table-cell>
          <table:table-cell table:style-name="ce84" office:value-type="string" calcext:value-type="string">
            <text:p>Entradas</text:p>
          </table:table-cell>
          <table:table-cell table:style-name="Default" table:number-columns-repeated="16368"/>
        </table:table-row>
        <table:table-row table:style-name="ro1">
          <table:table-cell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topico</text:p>
          </table:table-cell>
          <table:table-cell table:style-name="ce7" office:value-type="string" calcext:value-type="string">
            <text:p>sub-tópico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valor</text:p>
          </table:table-cell>
          <table:table-cell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Topico</text:p>
          </table:table-cell>
          <table:table-cell table:style-name="ce7" office:value-type="string" calcext:value-type="string">
            <text:p>sub-tópico</text:p>
          </table:table-cell>
          <table:table-cell table:style-name="ce7" office:value-type="string" calcext:value-type="string">
            <text:p>valor</text:p>
          </table:table-cell>
          <table:table-cell/>
          <table:table-cell table:style-name="ce74"/>
          <table:table-cell table:style-name="ce77"/>
          <table:table-cell table:style-name="ce81"/>
          <table:table-cell table:style-name="ce68"/>
          <table:table-cell table:style-name="Default" table:number-columns-repeated="16368"/>
        </table:table-row>
        <table:table-row table:style-name="ro1">
          <table:table-cell/>
          <table:table-cell table:style-name="ce8"/>
          <table:table-cell table:style-name="ce15" table:content-validation-name="val7"/>
          <table:table-cell table:style-name="ce15" table:content-validation-name="val2"/>
          <table:table-cell table:style-name="ce19"/>
          <table:table-cell table:style-name="ce47"/>
          <table:table-cell/>
          <table:table-cell table:style-name="ce53"/>
          <table:table-cell table:style-name="ce63" table:content-validation-name="val3"/>
          <table:table-cell table:style-name="ce63"/>
          <table:table-cell table:style-name="ce68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 table:number-rows-repeated="10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/>
          <table:table-cell table:style-name="ce54"/>
          <table:table-cell table:style-name="ce63" table:content-validation-name="val3"/>
          <table:table-cell table:style-name="ce65"/>
          <table:table-cell table:style-name="ce69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/>
          <table:table-cell table:style-name="ce55"/>
          <table:table-cell table:style-name="ce64" table:content-validation-name="val3"/>
          <table:table-cell table:style-name="ce64"/>
          <table:table-cell table:style-name="ce70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 table:number-columns-repeated="4"/>
          <table:table-cell table:style-name="ce51" table:formula="of:=SUM([.K11:.K22])" office:value-type="float" office:value="0" calcext:value-type="float">
            <text:p><text:s/>R$ -  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 table:number-columns-repeated="6"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 table:number-columns-repeated="6"/>
          <table:table-cell table:style-name="ce25"/>
          <table:table-cell table:style-name="ce79"/>
          <table:table-cell table:style-name="ce83"/>
          <table:table-cell table:style-name="ce70"/>
          <table:table-cell table:style-name="Default" table:number-columns-repeated="16368"/>
        </table:table-row>
        <table:table-row table:style-name="ro1" table:number-rows-repeated="6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 table:number-columns-repeated="10"/>
          <table:table-cell table:style-name="Default" table:number-columns-repeated="16368"/>
        </table:table-row>
        <table:table-row table:style-name="ro1">
          <table:table-cell/>
          <table:table-cell table:style-name="ce10"/>
          <table:table-cell table:style-name="ce17" table:content-validation-name="val7"/>
          <table:table-cell table:style-name="ce17" table:content-validation-name="val2"/>
          <table:table-cell table:style-name="ce17"/>
          <table:table-cell table:style-name="ce49"/>
          <table:table-cell table:number-columns-repeated="10"/>
          <table:table-cell table:style-name="Default" table:number-columns-repeated="16368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Alimentação</text:p>
          </table:table-cell>
          <table:table-cell table:style-name="ce20" office:value-type="string" calcext:value-type="string">
            <text:p>Doces</text:p>
          </table:table-cell>
          <table:table-cell table:style-name="ce31" table:formula="of:=SUMIF([.$D$11:.$D$32];[.C35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6" office:value-type="string" calcext:value-type="string">
            <text:p>Internet</text:p>
          </table:table-cell>
          <table:table-cell table:style-name="ce31" table:formula="of:=SUMIF([.$I$11:.$I$22];[.H35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35:.D39])" office:value-type="float" office:value="0" calcext:value-type="float">
            <text:p><text:s/>R$ -   </text:p>
          </table:table-cell>
          <table:table-cell office:value-type="string" calcext:value-type="string">
            <text:p>Padaria </text:p>
          </table:table-cell>
          <table:table-cell table:formula="of:=SUMIF([.$D$11:.$D$32];[.C36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Planos/assinaturas</text:p>
          </table:table-cell>
          <table:table-cell table:style-name="ce32" table:formula="of:=SUMIF([.$I$11:.$I$22];[.H36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<text:s/>Almoço fora</text:p>
          </table:table-cell>
          <table:table-cell table:formula="of:=SUMIF([.$D$11:.$D$32];[.C37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Agua</text:p>
          </table:table-cell>
          <table:table-cell table:style-name="ce32" table:formula="of:=SUMIF([.$I$11:.$I$22];[.H37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Lanches / Snacks</text:p>
          </table:table-cell>
          <table:table-cell table:formula="of:=SUMIF([.$D$11:.$D$32];[.C38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Luz</text:p>
          </table:table-cell>
          <table:table-cell table:style-name="ce32" table:formula="of:=SUMIF([.$I$11:.$I$22];[.H38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2"/>
          <table:table-cell table:style-name="ce33" table:formula="of:=SUMIF([.$D$11:.$D$32];[.C39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Gasolina</text:p>
          </table:table-cell>
          <table:table-cell table:style-name="ce32" table:formula="of:=SUMIF([.$I$11:.$I$22];[.H39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3"/>
          <table:table-cell table:style-name="ce34"/>
          <table:table-cell table:number-columns-repeated="3"/>
          <table:table-cell table:style-name="ce57" office:value-type="string" calcext:value-type="string">
            <text:p>Dizimos</text:p>
          </table:table-cell>
          <table:table-cell table:style-name="ce32" table:formula="of:=SUMIF([.$I$11:.$I$22];[.H40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Lazer</text:p>
          </table:table-cell>
          <table:table-cell table:style-name="ce20" office:value-type="string" calcext:value-type="string">
            <text:p>Delivery (iFood, etc)</text:p>
          </table:table-cell>
          <table:table-cell table:style-name="ce31" table:formula="of:=SUMIF([.$D$11:.$D$32];[.C41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Ofertas</text:p>
          </table:table-cell>
          <table:table-cell table:style-name="ce32" table:formula="of:=SUMIF([.$I$11:.$I$22];[.H41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2" table:formula="of:=SUBTOTAL(9;[.D41:.D48])" office:value-type="float" office:value="0" calcext:value-type="float">
            <text:p><text:s/>R$ -   </text:p>
          </table:table-cell>
          <table:table-cell office:value-type="string" calcext:value-type="string">
            <text:p>Cinema / Shows</text:p>
          </table:table-cell>
          <table:table-cell table:formula="of:=SUMIF([.$D$11:.$D$32];[.C42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Parcelas</text:p>
          </table:table-cell>
          <table:table-cell table:style-name="ce32" table:formula="of:=SUMIF([.$I$11:.$I$22];[.H42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asseios / Viagens</text:p>
          </table:table-cell>
          <table:table-cell table:formula="of:=SUMIF([.$D$11:.$D$32];[.C43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Saúde</text:p>
          </table:table-cell>
          <table:table-cell table:style-name="ce32" table:formula="of:=SUMIF([.$I$11:.$I$22];[.H43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Compras por impulso (não essenciais)</text:p>
          </table:table-cell>
          <table:table-cell table:formula="of:=SUMIF([.$D$11:.$D$32];[.C44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Investimento</text:p>
          </table:table-cell>
          <table:table-cell table:style-name="ce32" table:formula="of:=SUMIF([.$I$11:.$I$22];[.H44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<text:s/>Jogos / Games / Aplicativos pagos</text:p>
          </table:table-cell>
          <table:table-cell table:formula="of:=SUMIF([.$D$11:.$D$32];[.C45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8"/>
          <table:table-cell table:style-name="ce33" table:formula="of:=SUMIF([.$I$11:.$I$22];[.H45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Saídas com amigos</text:p>
          </table:table-cell>
          <table:table-cell table:formula="of:=SUMIF([.$D$11:.$D$32];[.C4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4"/>
          <table:table-cell table:style-name="ce35" table:formula="of:=SUMIF([.$D$11:.$D$32];[.C4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2"/>
          <table:table-cell table:style-name="ce33" table:formula="of:=SUMIF([.$D$11:.$D$32];[.C4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Despesas</text:p>
          </table:table-cell>
          <table:table-cell table:style-name="ce20" office:value-type="string" calcext:value-type="string">
            <text:p>Presentes e datas comemorativas</text:p>
          </table:table-cell>
          <table:table-cell table:style-name="ce31" table:formula="of:=SUMIF([.$D$11:.$D$32];[.C5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50:.D56])" office:value-type="float" office:value="0" calcext:value-type="float">
            <text:p><text:s/>R$ -   </text:p>
          </table:table-cell>
          <table:table-cell office:value-type="string" calcext:value-type="string">
            <text:p>Doações / Contribuições</text:p>
          </table:table-cell>
          <table:table-cell table:formula="of:=SUMIF([.$D$11:.$D$32];[.C51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Taxas bancárias / Pix por engano</text:p>
          </table:table-cell>
          <table:table-cell table:formula="of:=SUMIF([.$D$11:.$D$32];[.C5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Compras online aleatórias</text:p>
          </table:table-cell>
          <table:table-cell table:formula="of:=SUMIF([.$D$11:.$D$32];[.C53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anutenção da casa (lâmpada, pilha, etc)</text:p>
          </table:table-cell>
          <table:table-cell table:formula="of:=SUMIF([.$D$11:.$D$32];[.C5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Gastos pessoais (roupas, acessórios)</text:p>
          </table:table-cell>
          <table:table-cell table:formula="of:=SUMIF([.$D$11:.$D$32];[.C55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5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Transporte</text:p>
          </table:table-cell>
          <table:table-cell table:style-name="ce20" office:value-type="string" calcext:value-type="string">
            <text:p>Acessório</text:p>
          </table:table-cell>
          <table:table-cell table:style-name="ce31" table:formula="of:=SUMIF([.$D$11:.$D$32];[.C5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58:.D64])" office:value-type="float" office:value="0" calcext:value-type="float">
            <text:p><text:s/>R$ -   </text:p>
          </table:table-cell>
          <table:table-cell office:value-type="string" calcext:value-type="string">
            <text:p>Uber / Táxi</text:p>
          </table:table-cell>
          <table:table-cell table:formula="of:=SUMIF([.$D$11:.$D$32];[.C59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Ônibus / Metrô</text:p>
          </table:table-cell>
          <table:table-cell table:formula="of:=SUMIF([.$D$11:.$D$32];[.C6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Estacionamento</text:p>
          </table:table-cell>
          <table:table-cell table:formula="of:=SUMIF([.$D$11:.$D$32];[.C61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anutenção (óleo, pneu, etc)</text:p>
          </table:table-cell>
          <table:table-cell table:formula="of:=SUMIF([.$D$11:.$D$32];[.C6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ultas / Documentação</text:p>
          </table:table-cell>
          <table:table-cell table:formula="of:=SUMIF([.$D$11:.$D$32];[.C63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6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Educação</text:p>
          </table:table-cell>
          <table:table-cell table:style-name="ce20" office:value-type="string" calcext:value-type="string">
            <text:p>Livros </text:p>
          </table:table-cell>
          <table:table-cell table:style-name="ce31" table:formula="of:=SUMIF([.$D$11:.$D$32];[.C6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66:.D72])" office:value-type="float" office:value="0" calcext:value-type="float">
            <text:p><text:s/>R$ -   </text:p>
          </table:table-cell>
          <table:table-cell office:value-type="string" calcext:value-type="string">
            <text:p>Cursos online (Udemy, Alura, etc)</text:p>
          </table:table-cell>
          <table:table-cell table:formula="of:=SUMIF([.$D$11:.$D$32];[.C6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aterial escolar / didático</text:p>
          </table:table-cell>
          <table:table-cell table:formula="of:=SUMIF([.$D$11:.$D$32];[.C6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Apostilas</text:p>
          </table:table-cell>
          <table:table-cell table:formula="of:=SUMIF([.$D$11:.$D$32];[.C69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Internet dedicada para estudos</text:p>
          </table:table-cell>
          <table:table-cell table:formula="of:=SUMIF([.$D$11:.$D$32];[.C7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lataformas de aprendizado </text:p>
          </table:table-cell>
          <table:table-cell table:formula="of:=SUMIF([.$D$11:.$D$32];[.C71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7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Saúde</text:p>
          </table:table-cell>
          <table:table-cell table:style-name="ce20" office:value-type="string" calcext:value-type="string">
            <text:p>Medicamentos</text:p>
          </table:table-cell>
          <table:table-cell table:style-name="ce31" table:formula="of:=SUMIF([.$D$11:.$D$32];[.C7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74:.D80])" office:value-type="float" office:value="0" calcext:value-type="float">
            <text:p><text:s/>R$ -   </text:p>
          </table:table-cell>
          <table:table-cell office:value-type="string" calcext:value-type="string">
            <text:p>Consultas médicas / exames</text:p>
          </table:table-cell>
          <table:table-cell table:formula="of:=SUMIF([.$D$11:.$D$32];[.C75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Óculos / lentes</text:p>
          </table:table-cell>
          <table:table-cell table:formula="of:=SUMIF([.$D$11:.$D$32];[.C7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rodutos de higiene e cuidados pessoais</text:p>
          </table:table-cell>
          <table:table-cell table:formula="of:=SUMIF([.$D$11:.$D$32];[.C7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3"/>
          <table:table-cell table:formula="of:=SUMIF([.$D$11:.$D$32];[.C7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3"/>
          <table:table-cell table:formula="of:=SUMIF([.$D$11:.$D$32];[.C79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8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Imprevistos</text:p>
          </table:table-cell>
          <table:table-cell table:style-name="ce20" office:value-type="string" calcext:value-type="string">
            <text:p>Emergência médica ou odontológica</text:p>
          </table:table-cell>
          <table:table-cell table:style-name="ce31" table:formula="of:=SUMIF([.$D$11:.$D$32];[.C8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82:.D88])" office:value-type="float" office:value="0" calcext:value-type="float">
            <text:p><text:s/>R$ -   </text:p>
          </table:table-cell>
          <table:table-cell office:value-type="string" calcext:value-type="string">
            <text:p>Equipamento quebrado (celular, notebook)</text:p>
          </table:table-cell>
          <table:table-cell table:formula="of:=SUMIF([.$D$11:.$D$32];[.C83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erda de documentos / taxas</text:p>
          </table:table-cell>
          <table:table-cell table:formula="of:=SUMIF([.$D$11:.$D$32];[.C8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Atrasos em contas com juros</text:p>
          </table:table-cell>
          <table:table-cell table:formula="of:=SUMIF([.$D$11:.$D$32];[.C85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Conserto urgente (casa, carro, etc)</text:p>
          </table:table-cell>
          <table:table-cell table:formula="of:=SUMIF([.$D$11:.$D$32];[.C8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Ajuda financeira a alguém (urgente)</text:p>
          </table:table-cell>
          <table:table-cell table:formula="of:=SUMIF([.$D$11:.$D$32];[.C8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8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Investimento</text:p>
          </table:table-cell>
          <table:table-cell table:style-name="ce20"/>
          <table:table-cell table:style-name="ce31" table:formula="of:=SUMIF([.C11:.C32];[.B90];[.F11:.F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</table:table>
      <table:table table:name="Set" table:style-name="ta9">
        <table:table-column table:style-name="co1" table:default-cell-style-name="Default"/>
        <table:table-column table:style-name="co2" table:default-cell-style-name="Default"/>
        <table:table-column table:style-name="co16" table:default-cell-style-name="ce21"/>
        <table:table-column table:style-name="co40" table:default-cell-style-name="ce32"/>
        <table:table-column table:style-name="co45" table:default-cell-style-name="Default"/>
        <table:table-column table:style-name="co32" table:default-cell-style-name="Default"/>
        <table:table-column table:style-name="co7" table:default-cell-style-name="Default"/>
        <table:table-column table:style-name="co2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3" table:number-columns-repeated="4" table:default-cell-style-name="Default"/>
        <table:table-column table:style-name="co15" table:number-columns-repeated="16368"/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" office:value-type="string" calcext:value-type="string">
            <text:p>SET</text:p>
          </table:table-cell>
          <table:table-cell table:style-name="ce13" office:value-type="string" calcext:value-type="string">
            <text:p>entradas</text:p>
          </table:table-cell>
          <table:table-cell table:style-name="ce26" office:value-type="string" calcext:value-type="string">
            <text:p>valor</text:p>
          </table:table-cell>
          <table:table-cell table:style-name="ce13"/>
          <table:table-cell table:style-name="ce7" office:value-type="string" calcext:value-type="string">
            <text:p>Saldo mensal</text:p>
          </table:table-cell>
          <table:table-cell/>
          <table:table-cell table:style-name="ce50" table:number-columns-spanned="4" table:number-rows-spanned="1"/>
          <table:covered-table-cell table:number-columns-repeated="3" table:style-name="ce59"/>
          <table:table-cell table:number-columns-repeated="5"/>
          <table:table-cell table:style-name="Default" table:number-columns-repeated="16368"/>
        </table:table-row>
        <table:table-row table:style-name="ro1">
          <table:table-cell/>
          <table:table-cell table:style-name="ce2" office:value-type="string" calcext:value-type="string">
            <text:p>salário</text:p>
          </table:table-cell>
          <table:table-cell table:style-name="ce14"/>
          <table:table-cell table:style-name="ce27"/>
          <table:table-cell table:style-name="ce36" office:value-type="string" office:string-value="entradas" calcext:value-type="string">
            <text:p><text:s/>entradas </text:p>
          </table:table-cell>
          <table:table-cell table:style-name="ce41" table:formula="of:=SUM([.D3];[.D5];[.D6];[.D7];[.D4])" office:value-type="float" office:value="657.7" calcext:value-type="float">
            <text:p><text:s/>R$ 657,70 </text:p>
          </table:table-cell>
          <table:table-cell table:number-columns-repeated="2"/>
          <table:table-cell table:style-name="ce1" office:value-type="string" calcext:value-type="string">
            <text:p>data</text:p>
          </table:table-cell>
          <table:table-cell/>
          <table:table-cell table:style-name="ce66" office:value-type="string" calcext:value-type="string">
            <text:p>dinheiro guardado</text:p>
          </table:table-cell>
          <table:table-cell table:style-name="ce71"/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3" office:value-type="string" calcext:value-type="string">
            <text:p>Fotografia</text:p>
          </table:table-cell>
          <table:table-cell table:style-name="ce15"/>
          <table:table-cell table:style-name="ce28" table:formula="of:=SUM([.P10:.P25])" office:value-type="float" office:value="0" calcext:value-type="float">
            <text:p><text:s/>R$ -   </text:p>
          </table:table-cell>
          <table:table-cell table:style-name="ce37" office:value-type="string" office:string-value="gastos variados" calcext:value-type="string">
            <text:p><text:s/>gastos variados </text:p>
          </table:table-cell>
          <table:table-cell table:style-name="ce42" table:formula="of:=SUM([.F11:.F32])" office:value-type="float" office:value="0" calcext:value-type="float">
            <text:p><text:s/>R$ -   </text:p>
          </table:table-cell>
          <table:table-cell table:number-columns-repeated="2"/>
          <table:table-cell table:style-name="ce60" table:formula="of:=TODAY()" office:value-type="date" office:date-value="2026-06-21" calcext:value-type="date">
            <text:p>21/6/2026</text:p>
          </table:table-cell>
          <table:table-cell/>
          <table:table-cell table:style-name="ce66" office:value-type="string" calcext:value-type="string">
            <text:p>dinheiro para inestimento futuro</text:p>
          </table:table-cell>
          <table:table-cell table:style-name="ce71"/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4" office:value-type="string" calcext:value-type="string">
            <text:p>extra 2</text:p>
          </table:table-cell>
          <table:table-cell table:style-name="ce16"/>
          <table:table-cell table:style-name="ce29"/>
          <table:table-cell table:style-name="ce38" office:value-type="string" office:string-value="entradas fotografia" calcext:value-type="string">
            <text:p><text:s/>entradas fotografia </text:p>
          </table:table-cell>
          <table:table-cell table:style-name="ce43" table:formula="of:=[.D4]" office:value-type="float" office:value="0" calcext:value-type="float">
            <text:p><text:s/>R$ -   </text:p>
          </table:table-cell>
          <table:table-cell table:number-columns-repeated="2"/>
          <table:table-cell table:style-name="ce61" office:value-type="string" calcext:value-type="string">
            <text:p>ultimo update</text:p>
          </table:table-cell>
          <table:table-cell/>
          <table:table-cell table:style-name="ce66" office:value-type="string" calcext:value-type="string">
            <text:p>dinheiro para lente</text:p>
          </table:table-cell>
          <table:table-cell table:style-name="ce71" table:formula="of:=SUM([.P10:.P25])" office:value-type="float" office:value="0" calcext:value-type="float">
            <text:p><text:s/>R$ -   </text:p>
          </table:table-cell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4" office:value-type="string" calcext:value-type="string">
            <text:p>extra 3</text:p>
          </table:table-cell>
          <table:table-cell table:style-name="ce16"/>
          <table:table-cell table:style-name="ce29"/>
          <table:table-cell table:style-name="ce39" office:value-type="string" office:string-value="saidas fixas" calcext:value-type="string">
            <text:p><text:s/>saidas fixas </text:p>
          </table:table-cell>
          <table:table-cell table:style-name="ce44" table:formula="of:=SUM([.K11:.K22])" office:value-type="float" office:value="0" calcext:value-type="float">
            <text:p><text:s/>R$ -   </text:p>
          </table:table-cell>
          <table:table-cell table:number-columns-repeated="2"/>
          <table:table-cell table:style-name="ce62" office:value-type="date" office:date-value="2025-07-09" calcext:value-type="date">
            <text:p>9/7/2025</text:p>
          </table:table-cell>
          <table:table-cell/>
          <table:table-cell table:style-name="ce67" office:value-type="string" calcext:value-type="string">
            <text:p>para passar o mês, tenho =&gt;</text:p>
          </table:table-cell>
          <table:table-cell table:style-name="ce72"/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5" office:value-type="string" calcext:value-type="string">
            <text:p>Saldo</text:p>
          </table:table-cell>
          <table:table-cell table:style-name="ce17"/>
          <table:table-cell table:style-name="ce30" table:formula="of:=[$Ago.F7]" office:value-type="float" office:value="657.7" calcext:value-type="float">
            <text:p><text:s/>R$ 657,70 </text:p>
          </table:table-cell>
          <table:table-cell table:style-name="ce40" office:value-type="string" office:string-value="saldo" calcext:value-type="string">
            <text:p><text:s/>saldo </text:p>
          </table:table-cell>
          <table:table-cell table:style-name="ce45" table:formula="of:=[.F3]-[.F4]-[.F6]" office:value-type="float" office:value="657.7" calcext:value-type="float">
            <text:p><text:s/>R$ 657,70 </text:p>
          </table:table-cell>
          <table:table-cell table:number-columns-repeated="10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Variados</text:p>
          </table:table-cell>
          <table:covered-table-cell table:number-columns-repeated="3" table:style-name="ce18"/>
          <table:covered-table-cell table:style-name="ce46"/>
          <table:table-cell/>
          <table:table-cell table:style-name="ce52" office:value-type="string" calcext:value-type="string" table:number-columns-spanned="4" table:number-rows-spanned="1">
            <text:p>Fixos</text:p>
          </table:table-cell>
          <table:covered-table-cell table:number-columns-repeated="3" table:style-name="ce52"/>
          <table:table-cell/>
          <table:table-cell table:style-name="ce73" office:value-type="string" calcext:value-type="string">
            <text:p>Eventos</text:p>
          </table:table-cell>
          <table:table-cell table:style-name="ce76" office:value-type="string" calcext:value-type="string">
            <text:p>Data</text:p>
          </table:table-cell>
          <table:table-cell table:style-name="ce80" office:value-type="string" calcext:value-type="string">
            <text:p>Descrição</text:p>
          </table:table-cell>
          <table:table-cell table:style-name="ce84" office:value-type="string" calcext:value-type="string">
            <text:p>Entradas</text:p>
          </table:table-cell>
          <table:table-cell table:style-name="Default" table:number-columns-repeated="16368"/>
        </table:table-row>
        <table:table-row table:style-name="ro1">
          <table:table-cell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topico</text:p>
          </table:table-cell>
          <table:table-cell table:style-name="ce7" office:value-type="string" calcext:value-type="string">
            <text:p>sub-tópico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valor</text:p>
          </table:table-cell>
          <table:table-cell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Topico</text:p>
          </table:table-cell>
          <table:table-cell table:style-name="ce7" office:value-type="string" calcext:value-type="string">
            <text:p>sub-tópico</text:p>
          </table:table-cell>
          <table:table-cell table:style-name="ce7" office:value-type="string" calcext:value-type="string">
            <text:p>valor</text:p>
          </table:table-cell>
          <table:table-cell/>
          <table:table-cell table:style-name="ce74"/>
          <table:table-cell table:style-name="ce77"/>
          <table:table-cell table:style-name="ce81"/>
          <table:table-cell table:style-name="ce68"/>
          <table:table-cell table:style-name="Default" table:number-columns-repeated="16368"/>
        </table:table-row>
        <table:table-row table:style-name="ro1">
          <table:table-cell/>
          <table:table-cell table:style-name="ce8"/>
          <table:table-cell table:style-name="ce19" table:content-validation-name="val7"/>
          <table:table-cell table:style-name="ce19" table:content-validation-name="val2"/>
          <table:table-cell table:style-name="ce19"/>
          <table:table-cell table:style-name="ce47"/>
          <table:table-cell/>
          <table:table-cell table:style-name="ce53"/>
          <table:table-cell table:style-name="ce63" table:content-validation-name="val3"/>
          <table:table-cell table:style-name="ce63"/>
          <table:table-cell table:style-name="ce68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 table:number-rows-repeated="10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/>
          <table:table-cell table:style-name="ce54"/>
          <table:table-cell table:style-name="ce63" table:content-validation-name="val3"/>
          <table:table-cell table:style-name="ce65"/>
          <table:table-cell table:style-name="ce69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/>
          <table:table-cell table:style-name="ce55"/>
          <table:table-cell table:style-name="ce64" table:content-validation-name="val3"/>
          <table:table-cell table:style-name="ce64"/>
          <table:table-cell table:style-name="ce70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 table:number-columns-repeated="4"/>
          <table:table-cell table:style-name="ce51" table:formula="of:=SUM([.K11:.K22])" office:value-type="float" office:value="0" calcext:value-type="float">
            <text:p><text:s/>R$ -  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 table:number-columns-repeated="6"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 table:number-columns-repeated="6"/>
          <table:table-cell table:style-name="ce25"/>
          <table:table-cell table:style-name="ce79"/>
          <table:table-cell table:style-name="ce83"/>
          <table:table-cell table:style-name="ce70"/>
          <table:table-cell table:style-name="Default" table:number-columns-repeated="16368"/>
        </table:table-row>
        <table:table-row table:style-name="ro1" table:number-rows-repeated="6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 table:number-columns-repeated="10"/>
          <table:table-cell table:style-name="Default" table:number-columns-repeated="16368"/>
        </table:table-row>
        <table:table-row table:style-name="ro1">
          <table:table-cell/>
          <table:table-cell table:style-name="ce10"/>
          <table:table-cell table:style-name="ce17" table:content-validation-name="val7"/>
          <table:table-cell table:style-name="ce17" table:content-validation-name="val2"/>
          <table:table-cell table:style-name="ce17"/>
          <table:table-cell table:style-name="ce49"/>
          <table:table-cell table:number-columns-repeated="10"/>
          <table:table-cell table:style-name="Default" table:number-columns-repeated="16368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Alimentação</text:p>
          </table:table-cell>
          <table:table-cell table:style-name="ce20" office:value-type="string" calcext:value-type="string">
            <text:p>Doces</text:p>
          </table:table-cell>
          <table:table-cell table:style-name="ce31" table:formula="of:=SUMIF([.$D$11:.$D$32];[.C35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6" office:value-type="string" calcext:value-type="string">
            <text:p>Internet</text:p>
          </table:table-cell>
          <table:table-cell table:style-name="ce31" table:formula="of:=SUMIF([.$I$11:.$I$22];[.H35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35:.D39])" office:value-type="float" office:value="0" calcext:value-type="float">
            <text:p><text:s/>R$ -   </text:p>
          </table:table-cell>
          <table:table-cell office:value-type="string" calcext:value-type="string">
            <text:p>Padaria </text:p>
          </table:table-cell>
          <table:table-cell table:formula="of:=SUMIF([.$D$11:.$D$32];[.C36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Planos/assinaturas</text:p>
          </table:table-cell>
          <table:table-cell table:style-name="ce32" table:formula="of:=SUMIF([.$I$11:.$I$22];[.H36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<text:s/>Almoço fora</text:p>
          </table:table-cell>
          <table:table-cell table:formula="of:=SUMIF([.$D$11:.$D$32];[.C37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Agua</text:p>
          </table:table-cell>
          <table:table-cell table:style-name="ce32" table:formula="of:=SUMIF([.$I$11:.$I$22];[.H37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Lanches / Snacks</text:p>
          </table:table-cell>
          <table:table-cell table:formula="of:=SUMIF([.$D$11:.$D$32];[.C38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Luz</text:p>
          </table:table-cell>
          <table:table-cell table:style-name="ce32" table:formula="of:=SUMIF([.$I$11:.$I$22];[.H38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2"/>
          <table:table-cell table:style-name="ce33" table:formula="of:=SUMIF([.$D$11:.$D$32];[.C39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Gasolina</text:p>
          </table:table-cell>
          <table:table-cell table:style-name="ce32" table:formula="of:=SUMIF([.$I$11:.$I$22];[.H39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3"/>
          <table:table-cell table:style-name="ce34"/>
          <table:table-cell table:number-columns-repeated="3"/>
          <table:table-cell table:style-name="ce57" office:value-type="string" calcext:value-type="string">
            <text:p>Dizimos</text:p>
          </table:table-cell>
          <table:table-cell table:style-name="ce32" table:formula="of:=SUMIF([.$I$11:.$I$22];[.H40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Lazer</text:p>
          </table:table-cell>
          <table:table-cell table:style-name="ce20" office:value-type="string" calcext:value-type="string">
            <text:p>Delivery (iFood, etc)</text:p>
          </table:table-cell>
          <table:table-cell table:style-name="ce31" table:formula="of:=SUMIF([.$D$11:.$D$32];[.C41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Ofertas</text:p>
          </table:table-cell>
          <table:table-cell table:style-name="ce32" table:formula="of:=SUMIF([.$I$11:.$I$22];[.H41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2" table:formula="of:=SUBTOTAL(9;[.D41:.D48])" office:value-type="float" office:value="0" calcext:value-type="float">
            <text:p><text:s/>R$ -   </text:p>
          </table:table-cell>
          <table:table-cell office:value-type="string" calcext:value-type="string">
            <text:p>Cinema / Shows</text:p>
          </table:table-cell>
          <table:table-cell table:formula="of:=SUMIF([.$D$11:.$D$32];[.C42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Parcelas</text:p>
          </table:table-cell>
          <table:table-cell table:style-name="ce32" table:formula="of:=SUMIF([.$I$11:.$I$22];[.H42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asseios / Viagens</text:p>
          </table:table-cell>
          <table:table-cell table:formula="of:=SUMIF([.$D$11:.$D$32];[.C43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Saúde</text:p>
          </table:table-cell>
          <table:table-cell table:style-name="ce32" table:formula="of:=SUMIF([.$I$11:.$I$22];[.H43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Compras por impulso (não essenciais)</text:p>
          </table:table-cell>
          <table:table-cell table:formula="of:=SUMIF([.$D$11:.$D$32];[.C44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Investimento</text:p>
          </table:table-cell>
          <table:table-cell table:style-name="ce32" table:formula="of:=SUMIF([.$I$11:.$I$22];[.H44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<text:s/>Jogos / Games / Aplicativos pagos</text:p>
          </table:table-cell>
          <table:table-cell table:formula="of:=SUMIF([.$D$11:.$D$32];[.C45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8"/>
          <table:table-cell table:style-name="ce33" table:formula="of:=SUMIF([.$I$11:.$I$22];[.H45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Saídas com amigos</text:p>
          </table:table-cell>
          <table:table-cell table:formula="of:=SUMIF([.$D$11:.$D$32];[.C4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4"/>
          <table:table-cell table:style-name="ce35" table:formula="of:=SUMIF([.$D$11:.$D$32];[.C4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2"/>
          <table:table-cell table:style-name="ce33" table:formula="of:=SUMIF([.$D$11:.$D$32];[.C4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Despesas</text:p>
          </table:table-cell>
          <table:table-cell table:style-name="ce20" office:value-type="string" calcext:value-type="string">
            <text:p>Presentes e datas comemorativas</text:p>
          </table:table-cell>
          <table:table-cell table:style-name="ce31" table:formula="of:=SUMIF([.$D$11:.$D$32];[.C5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50:.D56])" office:value-type="float" office:value="0" calcext:value-type="float">
            <text:p><text:s/>R$ -   </text:p>
          </table:table-cell>
          <table:table-cell office:value-type="string" calcext:value-type="string">
            <text:p>Doações / Contribuições</text:p>
          </table:table-cell>
          <table:table-cell table:formula="of:=SUMIF([.$D$11:.$D$32];[.C51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Taxas bancárias / Pix por engano</text:p>
          </table:table-cell>
          <table:table-cell table:formula="of:=SUMIF([.$D$11:.$D$32];[.C5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Compras online aleatórias</text:p>
          </table:table-cell>
          <table:table-cell table:formula="of:=SUMIF([.$D$11:.$D$32];[.C53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anutenção da casa (lâmpada, pilha, etc)</text:p>
          </table:table-cell>
          <table:table-cell table:formula="of:=SUMIF([.$D$11:.$D$32];[.C5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Gastos pessoais (roupas, acessórios)</text:p>
          </table:table-cell>
          <table:table-cell table:formula="of:=SUMIF([.$D$11:.$D$32];[.C55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5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Transporte</text:p>
          </table:table-cell>
          <table:table-cell table:style-name="ce20" office:value-type="string" calcext:value-type="string">
            <text:p>Acessório</text:p>
          </table:table-cell>
          <table:table-cell table:style-name="ce31" table:formula="of:=SUMIF([.$D$11:.$D$32];[.C5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58:.D64])" office:value-type="float" office:value="0" calcext:value-type="float">
            <text:p><text:s/>R$ -   </text:p>
          </table:table-cell>
          <table:table-cell office:value-type="string" calcext:value-type="string">
            <text:p>Uber / Táxi</text:p>
          </table:table-cell>
          <table:table-cell table:formula="of:=SUMIF([.$D$11:.$D$32];[.C59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Ônibus / Metrô</text:p>
          </table:table-cell>
          <table:table-cell table:formula="of:=SUMIF([.$D$11:.$D$32];[.C6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Estacionamento</text:p>
          </table:table-cell>
          <table:table-cell table:formula="of:=SUMIF([.$D$11:.$D$32];[.C61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anutenção (óleo, pneu, etc)</text:p>
          </table:table-cell>
          <table:table-cell table:formula="of:=SUMIF([.$D$11:.$D$32];[.C6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ultas / Documentação</text:p>
          </table:table-cell>
          <table:table-cell table:formula="of:=SUMIF([.$D$11:.$D$32];[.C63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6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Educação</text:p>
          </table:table-cell>
          <table:table-cell table:style-name="ce20" office:value-type="string" calcext:value-type="string">
            <text:p>Livros </text:p>
          </table:table-cell>
          <table:table-cell table:style-name="ce31" table:formula="of:=SUMIF([.$D$11:.$D$32];[.C6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66:.D72])" office:value-type="float" office:value="0" calcext:value-type="float">
            <text:p><text:s/>R$ -   </text:p>
          </table:table-cell>
          <table:table-cell office:value-type="string" calcext:value-type="string">
            <text:p>Cursos online (Udemy, Alura, etc)</text:p>
          </table:table-cell>
          <table:table-cell table:formula="of:=SUMIF([.$D$11:.$D$32];[.C6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aterial escolar / didático</text:p>
          </table:table-cell>
          <table:table-cell table:formula="of:=SUMIF([.$D$11:.$D$32];[.C6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Apostilas</text:p>
          </table:table-cell>
          <table:table-cell table:formula="of:=SUMIF([.$D$11:.$D$32];[.C69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Internet dedicada para estudos</text:p>
          </table:table-cell>
          <table:table-cell table:formula="of:=SUMIF([.$D$11:.$D$32];[.C7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lataformas de aprendizado </text:p>
          </table:table-cell>
          <table:table-cell table:formula="of:=SUMIF([.$D$11:.$D$32];[.C71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7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Saúde</text:p>
          </table:table-cell>
          <table:table-cell table:style-name="ce20" office:value-type="string" calcext:value-type="string">
            <text:p>Medicamentos</text:p>
          </table:table-cell>
          <table:table-cell table:style-name="ce31" table:formula="of:=SUMIF([.$D$11:.$D$32];[.C7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74:.D80])" office:value-type="float" office:value="0" calcext:value-type="float">
            <text:p><text:s/>R$ -   </text:p>
          </table:table-cell>
          <table:table-cell office:value-type="string" calcext:value-type="string">
            <text:p>Consultas médicas / exames</text:p>
          </table:table-cell>
          <table:table-cell table:formula="of:=SUMIF([.$D$11:.$D$32];[.C75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Óculos / lentes</text:p>
          </table:table-cell>
          <table:table-cell table:formula="of:=SUMIF([.$D$11:.$D$32];[.C7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rodutos de higiene e cuidados pessoais</text:p>
          </table:table-cell>
          <table:table-cell table:formula="of:=SUMIF([.$D$11:.$D$32];[.C7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3"/>
          <table:table-cell table:formula="of:=SUMIF([.$D$11:.$D$32];[.C7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3"/>
          <table:table-cell table:formula="of:=SUMIF([.$D$11:.$D$32];[.C79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8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Imprevistos</text:p>
          </table:table-cell>
          <table:table-cell table:style-name="ce20" office:value-type="string" calcext:value-type="string">
            <text:p>Emergência médica ou odontológica</text:p>
          </table:table-cell>
          <table:table-cell table:style-name="ce31" table:formula="of:=SUMIF([.$D$11:.$D$32];[.C8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82:.D88])" office:value-type="float" office:value="0" calcext:value-type="float">
            <text:p><text:s/>R$ -   </text:p>
          </table:table-cell>
          <table:table-cell office:value-type="string" calcext:value-type="string">
            <text:p>Equipamento quebrado (celular, notebook)</text:p>
          </table:table-cell>
          <table:table-cell table:formula="of:=SUMIF([.$D$11:.$D$32];[.C83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erda de documentos / taxas</text:p>
          </table:table-cell>
          <table:table-cell table:formula="of:=SUMIF([.$D$11:.$D$32];[.C8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Atrasos em contas com juros</text:p>
          </table:table-cell>
          <table:table-cell table:formula="of:=SUMIF([.$D$11:.$D$32];[.C85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Conserto urgente (casa, carro, etc)</text:p>
          </table:table-cell>
          <table:table-cell table:formula="of:=SUMIF([.$D$11:.$D$32];[.C8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Ajuda financeira a alguém (urgente)</text:p>
          </table:table-cell>
          <table:table-cell table:formula="of:=SUMIF([.$D$11:.$D$32];[.C8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8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Investimento</text:p>
          </table:table-cell>
          <table:table-cell table:style-name="ce20"/>
          <table:table-cell table:style-name="ce31" table:formula="of:=SUMIF([.C11:.C32];[.B90];[.F11:.F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</table:table>
      <table:table table:name="Out" table:style-name="ta10">
        <table:table-column table:style-name="co1" table:default-cell-style-name="Default"/>
        <table:table-column table:style-name="co2" table:default-cell-style-name="Default"/>
        <table:table-column table:style-name="co16" table:default-cell-style-name="ce21"/>
        <table:table-column table:style-name="co46" table:default-cell-style-name="ce32"/>
        <table:table-column table:style-name="co31" table:default-cell-style-name="Default"/>
        <table:table-column table:style-name="co32" table:default-cell-style-name="Default"/>
        <table:table-column table:style-name="co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3" table:number-columns-repeated="4" table:default-cell-style-name="Default"/>
        <table:table-column table:style-name="co15" table:number-columns-repeated="16368"/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" office:value-type="string" calcext:value-type="string">
            <text:p>OUT</text:p>
          </table:table-cell>
          <table:table-cell table:style-name="ce13" office:value-type="string" calcext:value-type="string">
            <text:p>entradas</text:p>
          </table:table-cell>
          <table:table-cell table:style-name="ce26" office:value-type="string" calcext:value-type="string">
            <text:p>valor</text:p>
          </table:table-cell>
          <table:table-cell table:style-name="ce13"/>
          <table:table-cell table:style-name="ce7" office:value-type="string" calcext:value-type="string">
            <text:p>Saldo mensal</text:p>
          </table:table-cell>
          <table:table-cell/>
          <table:table-cell table:style-name="ce50" table:number-columns-spanned="4" table:number-rows-spanned="1"/>
          <table:covered-table-cell table:number-columns-repeated="3" table:style-name="ce59"/>
          <table:table-cell table:number-columns-repeated="5"/>
          <table:table-cell table:style-name="Default" table:number-columns-repeated="16368"/>
        </table:table-row>
        <table:table-row table:style-name="ro1">
          <table:table-cell/>
          <table:table-cell table:style-name="ce2" office:value-type="string" calcext:value-type="string">
            <text:p>salário</text:p>
          </table:table-cell>
          <table:table-cell table:style-name="ce14"/>
          <table:table-cell table:style-name="ce27"/>
          <table:table-cell table:style-name="ce36" office:value-type="string" office:string-value="entradas" calcext:value-type="string">
            <text:p><text:s/>entradas </text:p>
          </table:table-cell>
          <table:table-cell table:style-name="ce41" table:formula="of:=SUM([.D3];[.D5];[.D6];[.D7];[.D4])" office:value-type="float" office:value="657.7" calcext:value-type="float">
            <text:p><text:s/>R$ 657,70 </text:p>
          </table:table-cell>
          <table:table-cell table:number-columns-repeated="2"/>
          <table:table-cell table:style-name="ce1" office:value-type="string" calcext:value-type="string">
            <text:p>data</text:p>
          </table:table-cell>
          <table:table-cell/>
          <table:table-cell table:style-name="ce66" office:value-type="string" calcext:value-type="string">
            <text:p>dinheiro guardado</text:p>
          </table:table-cell>
          <table:table-cell table:style-name="ce71"/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3" office:value-type="string" calcext:value-type="string">
            <text:p>Fotografia</text:p>
          </table:table-cell>
          <table:table-cell table:style-name="ce15"/>
          <table:table-cell table:style-name="ce28" table:formula="of:=SUM([.P10:.P25])" office:value-type="float" office:value="0" calcext:value-type="float">
            <text:p><text:s/>R$ -   </text:p>
          </table:table-cell>
          <table:table-cell table:style-name="ce37" office:value-type="string" office:string-value="gastos variados" calcext:value-type="string">
            <text:p><text:s/>gastos variados </text:p>
          </table:table-cell>
          <table:table-cell table:style-name="ce42" table:formula="of:=SUM([.F11:.F32])" office:value-type="float" office:value="0" calcext:value-type="float">
            <text:p><text:s/>R$ -   </text:p>
          </table:table-cell>
          <table:table-cell table:number-columns-repeated="2"/>
          <table:table-cell table:style-name="ce60" table:formula="of:=TODAY()" office:value-type="date" office:date-value="2026-06-21" calcext:value-type="date">
            <text:p>21/6/2026</text:p>
          </table:table-cell>
          <table:table-cell/>
          <table:table-cell table:style-name="ce66" office:value-type="string" calcext:value-type="string">
            <text:p>dinheiro para inestimento futuro</text:p>
          </table:table-cell>
          <table:table-cell table:style-name="ce71"/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4" office:value-type="string" calcext:value-type="string">
            <text:p>extra 2</text:p>
          </table:table-cell>
          <table:table-cell table:style-name="ce16"/>
          <table:table-cell table:style-name="ce29"/>
          <table:table-cell table:style-name="ce38" office:value-type="string" office:string-value="entradas fotografia" calcext:value-type="string">
            <text:p><text:s/>entradas fotografia </text:p>
          </table:table-cell>
          <table:table-cell table:style-name="ce43" table:formula="of:=[.D4]" office:value-type="float" office:value="0" calcext:value-type="float">
            <text:p><text:s/>R$ -   </text:p>
          </table:table-cell>
          <table:table-cell table:number-columns-repeated="2"/>
          <table:table-cell table:style-name="ce61" office:value-type="string" calcext:value-type="string">
            <text:p>ultimo update</text:p>
          </table:table-cell>
          <table:table-cell/>
          <table:table-cell table:style-name="ce66" office:value-type="string" calcext:value-type="string">
            <text:p>dinheiro para lente</text:p>
          </table:table-cell>
          <table:table-cell table:style-name="ce71" table:formula="of:=SUM([.P10:.P25])" office:value-type="float" office:value="0" calcext:value-type="float">
            <text:p><text:s/>R$ -   </text:p>
          </table:table-cell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4" office:value-type="string" calcext:value-type="string">
            <text:p>extra 3</text:p>
          </table:table-cell>
          <table:table-cell table:style-name="ce16"/>
          <table:table-cell table:style-name="ce29"/>
          <table:table-cell table:style-name="ce39" office:value-type="string" office:string-value="saidas fixas" calcext:value-type="string">
            <text:p><text:s/>saidas fixas </text:p>
          </table:table-cell>
          <table:table-cell table:style-name="ce44" table:formula="of:=SUM([.K11:.K22])" office:value-type="float" office:value="0" calcext:value-type="float">
            <text:p><text:s/>R$ -   </text:p>
          </table:table-cell>
          <table:table-cell table:number-columns-repeated="2"/>
          <table:table-cell table:style-name="ce62" office:value-type="date" office:date-value="2025-07-09" calcext:value-type="date">
            <text:p>9/7/2025</text:p>
          </table:table-cell>
          <table:table-cell/>
          <table:table-cell table:style-name="ce67" office:value-type="string" calcext:value-type="string">
            <text:p>para passar o mês, tenho =&gt;</text:p>
          </table:table-cell>
          <table:table-cell table:style-name="ce72"/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5" office:value-type="string" calcext:value-type="string">
            <text:p>Saldo</text:p>
          </table:table-cell>
          <table:table-cell table:style-name="ce17"/>
          <table:table-cell table:style-name="ce30" table:formula="of:=[$Set.F7]" office:value-type="float" office:value="657.7" calcext:value-type="float">
            <text:p><text:s/>R$ 657,70 </text:p>
          </table:table-cell>
          <table:table-cell table:style-name="ce40" office:value-type="string" office:string-value="saldo" calcext:value-type="string">
            <text:p><text:s/>saldo </text:p>
          </table:table-cell>
          <table:table-cell table:style-name="ce45" table:formula="of:=[.F3]-[.F4]-[.F6]" office:value-type="float" office:value="657.7" calcext:value-type="float">
            <text:p><text:s/>R$ 657,70 </text:p>
          </table:table-cell>
          <table:table-cell table:number-columns-repeated="10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Variados</text:p>
          </table:table-cell>
          <table:covered-table-cell table:number-columns-repeated="3" table:style-name="ce18"/>
          <table:covered-table-cell table:style-name="ce46"/>
          <table:table-cell/>
          <table:table-cell table:style-name="ce52" office:value-type="string" calcext:value-type="string" table:number-columns-spanned="4" table:number-rows-spanned="1">
            <text:p>Fixos</text:p>
          </table:table-cell>
          <table:covered-table-cell table:number-columns-repeated="3" table:style-name="ce52"/>
          <table:table-cell/>
          <table:table-cell table:style-name="ce73" office:value-type="string" calcext:value-type="string">
            <text:p>Eventos</text:p>
          </table:table-cell>
          <table:table-cell table:style-name="ce76" office:value-type="string" calcext:value-type="string">
            <text:p>Data</text:p>
          </table:table-cell>
          <table:table-cell table:style-name="ce80" office:value-type="string" calcext:value-type="string">
            <text:p>Descrição</text:p>
          </table:table-cell>
          <table:table-cell table:style-name="ce84" office:value-type="string" calcext:value-type="string">
            <text:p>Entradas</text:p>
          </table:table-cell>
          <table:table-cell table:style-name="Default" table:number-columns-repeated="16368"/>
        </table:table-row>
        <table:table-row table:style-name="ro1">
          <table:table-cell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topico</text:p>
          </table:table-cell>
          <table:table-cell table:style-name="ce7" office:value-type="string" calcext:value-type="string">
            <text:p>sub-tópico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valor</text:p>
          </table:table-cell>
          <table:table-cell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Topico</text:p>
          </table:table-cell>
          <table:table-cell table:style-name="ce7" office:value-type="string" calcext:value-type="string">
            <text:p>sub-tópico</text:p>
          </table:table-cell>
          <table:table-cell table:style-name="ce7" office:value-type="string" calcext:value-type="string">
            <text:p>valor</text:p>
          </table:table-cell>
          <table:table-cell/>
          <table:table-cell table:style-name="ce74"/>
          <table:table-cell table:style-name="ce77"/>
          <table:table-cell table:style-name="ce81"/>
          <table:table-cell table:style-name="ce68"/>
          <table:table-cell table:style-name="Default" table:number-columns-repeated="16368"/>
        </table:table-row>
        <table:table-row table:style-name="ro1">
          <table:table-cell/>
          <table:table-cell table:style-name="ce8"/>
          <table:table-cell table:style-name="ce19" table:content-validation-name="val7"/>
          <table:table-cell table:style-name="ce19" table:content-validation-name="val2"/>
          <table:table-cell table:style-name="ce19"/>
          <table:table-cell table:style-name="ce47"/>
          <table:table-cell/>
          <table:table-cell table:style-name="ce53"/>
          <table:table-cell table:style-name="ce63" table:content-validation-name="val3"/>
          <table:table-cell table:style-name="ce63"/>
          <table:table-cell table:style-name="ce68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 table:number-rows-repeated="10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/>
          <table:table-cell table:style-name="ce54"/>
          <table:table-cell table:style-name="ce63" table:content-validation-name="val3"/>
          <table:table-cell table:style-name="ce65"/>
          <table:table-cell table:style-name="ce69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/>
          <table:table-cell table:style-name="ce55"/>
          <table:table-cell table:style-name="ce64" table:number-columns-repeated="2"/>
          <table:table-cell table:style-name="ce70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 table:number-columns-repeated="4"/>
          <table:table-cell table:style-name="ce51" table:formula="of:=SUM([.K11:.K22])" office:value-type="float" office:value="0" calcext:value-type="float">
            <text:p><text:s/>R$ -  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 table:number-columns-repeated="6"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 table:number-columns-repeated="6"/>
          <table:table-cell table:style-name="ce25"/>
          <table:table-cell table:style-name="ce79"/>
          <table:table-cell table:style-name="ce83"/>
          <table:table-cell table:style-name="ce70"/>
          <table:table-cell table:style-name="Default" table:number-columns-repeated="16368"/>
        </table:table-row>
        <table:table-row table:style-name="ro1" table:number-rows-repeated="6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 table:number-columns-repeated="10"/>
          <table:table-cell table:style-name="Default" table:number-columns-repeated="16368"/>
        </table:table-row>
        <table:table-row table:style-name="ro1">
          <table:table-cell/>
          <table:table-cell table:style-name="ce10"/>
          <table:table-cell table:style-name="ce17" table:content-validation-name="val7"/>
          <table:table-cell table:style-name="ce17" table:content-validation-name="val2"/>
          <table:table-cell table:style-name="ce17"/>
          <table:table-cell table:style-name="ce49"/>
          <table:table-cell table:number-columns-repeated="10"/>
          <table:table-cell table:style-name="Default" table:number-columns-repeated="16368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Alimentação</text:p>
          </table:table-cell>
          <table:table-cell table:style-name="ce20" office:value-type="string" calcext:value-type="string">
            <text:p>Doces</text:p>
          </table:table-cell>
          <table:table-cell table:style-name="ce31" table:formula="of:=SUMIF([.$D$11:.$D$32];[.C35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6" office:value-type="string" calcext:value-type="string">
            <text:p>Internet</text:p>
          </table:table-cell>
          <table:table-cell table:style-name="ce31" table:formula="of:=SUMIF([.$I$11:.$I$22];[.H35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35:.D39])" office:value-type="float" office:value="0" calcext:value-type="float">
            <text:p><text:s/>R$ -   </text:p>
          </table:table-cell>
          <table:table-cell office:value-type="string" calcext:value-type="string">
            <text:p>Padaria </text:p>
          </table:table-cell>
          <table:table-cell table:formula="of:=SUMIF([.$D$11:.$D$32];[.C36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Planos/assinaturas</text:p>
          </table:table-cell>
          <table:table-cell table:style-name="ce32" table:formula="of:=SUMIF([.$I$11:.$I$22];[.H36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<text:s/>Almoço fora</text:p>
          </table:table-cell>
          <table:table-cell table:formula="of:=SUMIF([.$D$11:.$D$32];[.C37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Agua</text:p>
          </table:table-cell>
          <table:table-cell table:style-name="ce32" table:formula="of:=SUMIF([.$I$11:.$I$22];[.H37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Lanches / Snacks</text:p>
          </table:table-cell>
          <table:table-cell table:formula="of:=SUMIF([.$D$11:.$D$32];[.C38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Luz</text:p>
          </table:table-cell>
          <table:table-cell table:style-name="ce32" table:formula="of:=SUMIF([.$I$11:.$I$22];[.H38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2"/>
          <table:table-cell table:style-name="ce33" table:formula="of:=SUMIF([.$D$11:.$D$32];[.C39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Gasolina</text:p>
          </table:table-cell>
          <table:table-cell table:style-name="ce32" table:formula="of:=SUMIF([.$I$11:.$I$22];[.H39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3"/>
          <table:table-cell table:style-name="ce34"/>
          <table:table-cell table:number-columns-repeated="3"/>
          <table:table-cell table:style-name="ce57" office:value-type="string" calcext:value-type="string">
            <text:p>Dizimos</text:p>
          </table:table-cell>
          <table:table-cell table:style-name="ce32" table:formula="of:=SUMIF([.$I$11:.$I$22];[.H40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Lazer</text:p>
          </table:table-cell>
          <table:table-cell table:style-name="ce20" office:value-type="string" calcext:value-type="string">
            <text:p>Delivery (iFood, etc)</text:p>
          </table:table-cell>
          <table:table-cell table:style-name="ce31" table:formula="of:=SUMIF([.$D$11:.$D$32];[.C41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Ofertas</text:p>
          </table:table-cell>
          <table:table-cell table:style-name="ce32" table:formula="of:=SUMIF([.$I$11:.$I$22];[.H41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2" table:formula="of:=SUBTOTAL(9;[.D41:.D48])" office:value-type="float" office:value="0" calcext:value-type="float">
            <text:p><text:s/>R$ -   </text:p>
          </table:table-cell>
          <table:table-cell office:value-type="string" calcext:value-type="string">
            <text:p>Cinema / Shows</text:p>
          </table:table-cell>
          <table:table-cell table:formula="of:=SUMIF([.$D$11:.$D$32];[.C42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Parcelas</text:p>
          </table:table-cell>
          <table:table-cell table:style-name="ce32" table:formula="of:=SUMIF([.$I$11:.$I$22];[.H42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asseios / Viagens</text:p>
          </table:table-cell>
          <table:table-cell table:formula="of:=SUMIF([.$D$11:.$D$32];[.C43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Saúde</text:p>
          </table:table-cell>
          <table:table-cell table:style-name="ce32" table:formula="of:=SUMIF([.$I$11:.$I$22];[.H43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Compras por impulso (não essenciais)</text:p>
          </table:table-cell>
          <table:table-cell table:formula="of:=SUMIF([.$D$11:.$D$32];[.C44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Investimento</text:p>
          </table:table-cell>
          <table:table-cell table:style-name="ce32" table:formula="of:=SUMIF([.$I$11:.$I$22];[.H44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<text:s/>Jogos / Games / Aplicativos pagos</text:p>
          </table:table-cell>
          <table:table-cell table:formula="of:=SUMIF([.$D$11:.$D$32];[.C45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8"/>
          <table:table-cell table:style-name="ce33" table:formula="of:=SUMIF([.$I$11:.$I$22];[.H45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Saídas com amigos</text:p>
          </table:table-cell>
          <table:table-cell table:formula="of:=SUMIF([.$D$11:.$D$32];[.C4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4"/>
          <table:table-cell table:style-name="ce35" table:formula="of:=SUMIF([.$D$11:.$D$32];[.C4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2"/>
          <table:table-cell table:style-name="ce33" table:formula="of:=SUMIF([.$D$11:.$D$32];[.C4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Despesas</text:p>
          </table:table-cell>
          <table:table-cell table:style-name="ce20" office:value-type="string" calcext:value-type="string">
            <text:p>Presentes e datas comemorativas</text:p>
          </table:table-cell>
          <table:table-cell table:style-name="ce31" table:formula="of:=SUMIF([.$D$11:.$D$32];[.C5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50:.D56])" office:value-type="float" office:value="0" calcext:value-type="float">
            <text:p><text:s/>R$ -   </text:p>
          </table:table-cell>
          <table:table-cell office:value-type="string" calcext:value-type="string">
            <text:p>Doações / Contribuições</text:p>
          </table:table-cell>
          <table:table-cell table:formula="of:=SUMIF([.$D$11:.$D$32];[.C51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Taxas bancárias / Pix por engano</text:p>
          </table:table-cell>
          <table:table-cell table:formula="of:=SUMIF([.$D$11:.$D$32];[.C5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Compras online aleatórias</text:p>
          </table:table-cell>
          <table:table-cell table:formula="of:=SUMIF([.$D$11:.$D$32];[.C53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anutenção da casa (lâmpada, pilha, etc)</text:p>
          </table:table-cell>
          <table:table-cell table:formula="of:=SUMIF([.$D$11:.$D$32];[.C5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Gastos pessoais (roupas, acessórios)</text:p>
          </table:table-cell>
          <table:table-cell table:formula="of:=SUMIF([.$D$11:.$D$32];[.C55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5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Transporte</text:p>
          </table:table-cell>
          <table:table-cell table:style-name="ce20" office:value-type="string" calcext:value-type="string">
            <text:p>Acessório</text:p>
          </table:table-cell>
          <table:table-cell table:style-name="ce31" table:formula="of:=SUMIF([.$D$11:.$D$32];[.C5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58:.D64])" office:value-type="float" office:value="0" calcext:value-type="float">
            <text:p><text:s/>R$ -   </text:p>
          </table:table-cell>
          <table:table-cell office:value-type="string" calcext:value-type="string">
            <text:p>Uber / Táxi</text:p>
          </table:table-cell>
          <table:table-cell table:formula="of:=SUMIF([.$D$11:.$D$32];[.C59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Ônibus / Metrô</text:p>
          </table:table-cell>
          <table:table-cell table:formula="of:=SUMIF([.$D$11:.$D$32];[.C6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Estacionamento</text:p>
          </table:table-cell>
          <table:table-cell table:formula="of:=SUMIF([.$D$11:.$D$32];[.C61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anutenção (óleo, pneu, etc)</text:p>
          </table:table-cell>
          <table:table-cell table:formula="of:=SUMIF([.$D$11:.$D$32];[.C6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ultas / Documentação</text:p>
          </table:table-cell>
          <table:table-cell table:formula="of:=SUMIF([.$D$11:.$D$32];[.C63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6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Educação</text:p>
          </table:table-cell>
          <table:table-cell table:style-name="ce20" office:value-type="string" calcext:value-type="string">
            <text:p>Livros </text:p>
          </table:table-cell>
          <table:table-cell table:style-name="ce31" table:formula="of:=SUMIF([.$D$11:.$D$32];[.C6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66:.D72])" office:value-type="float" office:value="0" calcext:value-type="float">
            <text:p><text:s/>R$ -   </text:p>
          </table:table-cell>
          <table:table-cell office:value-type="string" calcext:value-type="string">
            <text:p>Cursos online (Udemy, Alura, etc)</text:p>
          </table:table-cell>
          <table:table-cell table:formula="of:=SUMIF([.$D$11:.$D$32];[.C6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aterial escolar / didático</text:p>
          </table:table-cell>
          <table:table-cell table:formula="of:=SUMIF([.$D$11:.$D$32];[.C6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Apostilas</text:p>
          </table:table-cell>
          <table:table-cell table:formula="of:=SUMIF([.$D$11:.$D$32];[.C69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Internet dedicada para estudos</text:p>
          </table:table-cell>
          <table:table-cell table:formula="of:=SUMIF([.$D$11:.$D$32];[.C7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lataformas de aprendizado </text:p>
          </table:table-cell>
          <table:table-cell table:formula="of:=SUMIF([.$D$11:.$D$32];[.C71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7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Saúde</text:p>
          </table:table-cell>
          <table:table-cell table:style-name="ce20" office:value-type="string" calcext:value-type="string">
            <text:p>Medicamentos</text:p>
          </table:table-cell>
          <table:table-cell table:style-name="ce31" table:formula="of:=SUMIF([.$D$11:.$D$32];[.C7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74:.D80])" office:value-type="float" office:value="0" calcext:value-type="float">
            <text:p><text:s/>R$ -   </text:p>
          </table:table-cell>
          <table:table-cell office:value-type="string" calcext:value-type="string">
            <text:p>Consultas médicas / exames</text:p>
          </table:table-cell>
          <table:table-cell table:formula="of:=SUMIF([.$D$11:.$D$32];[.C75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Óculos / lentes</text:p>
          </table:table-cell>
          <table:table-cell table:formula="of:=SUMIF([.$D$11:.$D$32];[.C7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rodutos de higiene e cuidados pessoais</text:p>
          </table:table-cell>
          <table:table-cell table:formula="of:=SUMIF([.$D$11:.$D$32];[.C7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3"/>
          <table:table-cell table:formula="of:=SUMIF([.$D$11:.$D$32];[.C7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3"/>
          <table:table-cell table:formula="of:=SUMIF([.$D$11:.$D$32];[.C79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8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Imprevistos</text:p>
          </table:table-cell>
          <table:table-cell table:style-name="ce20" office:value-type="string" calcext:value-type="string">
            <text:p>Emergência médica ou odontológica</text:p>
          </table:table-cell>
          <table:table-cell table:style-name="ce31" table:formula="of:=SUMIF([.$D$11:.$D$32];[.C8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82:.D88])" office:value-type="float" office:value="0" calcext:value-type="float">
            <text:p><text:s/>R$ -   </text:p>
          </table:table-cell>
          <table:table-cell office:value-type="string" calcext:value-type="string">
            <text:p>Equipamento quebrado (celular, notebook)</text:p>
          </table:table-cell>
          <table:table-cell table:formula="of:=SUMIF([.$D$11:.$D$32];[.C83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erda de documentos / taxas</text:p>
          </table:table-cell>
          <table:table-cell table:formula="of:=SUMIF([.$D$11:.$D$32];[.C8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Atrasos em contas com juros</text:p>
          </table:table-cell>
          <table:table-cell table:formula="of:=SUMIF([.$D$11:.$D$32];[.C85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Conserto urgente (casa, carro, etc)</text:p>
          </table:table-cell>
          <table:table-cell table:formula="of:=SUMIF([.$D$11:.$D$32];[.C8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Ajuda financeira a alguém (urgente)</text:p>
          </table:table-cell>
          <table:table-cell table:formula="of:=SUMIF([.$D$11:.$D$32];[.C8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8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Investimento</text:p>
          </table:table-cell>
          <table:table-cell table:style-name="ce20"/>
          <table:table-cell table:style-name="ce31" table:formula="of:=SUMIF([.C11:.C32];[.B90];[.F11:.F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</table:table>
      <table:table table:name="Nov" table:style-name="ta11">
        <table:table-column table:style-name="co1" table:default-cell-style-name="Default"/>
        <table:table-column table:style-name="co2" table:default-cell-style-name="Default"/>
        <table:table-column table:style-name="co16" table:default-cell-style-name="ce21"/>
        <table:table-column table:style-name="co27" table:default-cell-style-name="ce32"/>
        <table:table-column table:style-name="co31" table:default-cell-style-name="Default"/>
        <table:table-column table:style-name="co3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3" table:number-columns-repeated="4" table:default-cell-style-name="Default"/>
        <table:table-column table:style-name="co15" table:number-columns-repeated="16368"/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" office:value-type="string" calcext:value-type="string">
            <text:p>NOV</text:p>
          </table:table-cell>
          <table:table-cell table:style-name="ce13" office:value-type="string" calcext:value-type="string">
            <text:p>entradas</text:p>
          </table:table-cell>
          <table:table-cell table:style-name="ce26" office:value-type="string" calcext:value-type="string">
            <text:p>valor</text:p>
          </table:table-cell>
          <table:table-cell table:style-name="ce13"/>
          <table:table-cell table:style-name="ce7" office:value-type="string" calcext:value-type="string">
            <text:p>Saldo mensal</text:p>
          </table:table-cell>
          <table:table-cell/>
          <table:table-cell table:style-name="ce50" table:number-columns-spanned="4" table:number-rows-spanned="1"/>
          <table:covered-table-cell table:number-columns-repeated="3" table:style-name="ce59"/>
          <table:table-cell table:number-columns-repeated="5"/>
          <table:table-cell table:style-name="Default" table:number-columns-repeated="16368"/>
        </table:table-row>
        <table:table-row table:style-name="ro1">
          <table:table-cell/>
          <table:table-cell table:style-name="ce2" office:value-type="string" calcext:value-type="string">
            <text:p>salário</text:p>
          </table:table-cell>
          <table:table-cell table:style-name="ce14"/>
          <table:table-cell table:style-name="ce27"/>
          <table:table-cell table:style-name="ce36" office:value-type="string" office:string-value="entradas" calcext:value-type="string">
            <text:p><text:s/>entradas </text:p>
          </table:table-cell>
          <table:table-cell table:style-name="ce41" table:formula="of:=SUM([.D3];[.D5];[.D6];[.D7];[.D4])" office:value-type="float" office:value="657.7" calcext:value-type="float">
            <text:p><text:s/>R$ 657,70 </text:p>
          </table:table-cell>
          <table:table-cell table:number-columns-repeated="2"/>
          <table:table-cell table:style-name="ce1" office:value-type="string" calcext:value-type="string">
            <text:p>data</text:p>
          </table:table-cell>
          <table:table-cell/>
          <table:table-cell table:style-name="ce66" office:value-type="string" calcext:value-type="string">
            <text:p>dinheiro guardado</text:p>
          </table:table-cell>
          <table:table-cell table:style-name="ce71"/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3" office:value-type="string" calcext:value-type="string">
            <text:p>Fotografia</text:p>
          </table:table-cell>
          <table:table-cell table:style-name="ce15"/>
          <table:table-cell table:style-name="ce28" table:formula="of:=SUM([.P10:.P25])" office:value-type="float" office:value="0" calcext:value-type="float">
            <text:p><text:s/>R$ -   </text:p>
          </table:table-cell>
          <table:table-cell table:style-name="ce37" office:value-type="string" office:string-value="gastos variados" calcext:value-type="string">
            <text:p><text:s/>gastos variados </text:p>
          </table:table-cell>
          <table:table-cell table:style-name="ce42" table:formula="of:=SUM([.F11:.F32])" office:value-type="float" office:value="0" calcext:value-type="float">
            <text:p><text:s/>R$ -   </text:p>
          </table:table-cell>
          <table:table-cell table:number-columns-repeated="2"/>
          <table:table-cell table:style-name="ce60" table:formula="of:=TODAY()" office:value-type="date" office:date-value="2026-06-21" calcext:value-type="date">
            <text:p>21/6/2026</text:p>
          </table:table-cell>
          <table:table-cell/>
          <table:table-cell table:style-name="ce66" office:value-type="string" calcext:value-type="string">
            <text:p>dinheiro para inestimento futuro</text:p>
          </table:table-cell>
          <table:table-cell table:style-name="ce71"/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4" office:value-type="string" calcext:value-type="string">
            <text:p>extra 2</text:p>
          </table:table-cell>
          <table:table-cell table:style-name="ce16"/>
          <table:table-cell table:style-name="ce29"/>
          <table:table-cell table:style-name="ce38" office:value-type="string" office:string-value="entradas fotografia" calcext:value-type="string">
            <text:p><text:s/>entradas fotografia </text:p>
          </table:table-cell>
          <table:table-cell table:style-name="ce43" table:formula="of:=[.D4]" office:value-type="float" office:value="0" calcext:value-type="float">
            <text:p><text:s/>R$ -   </text:p>
          </table:table-cell>
          <table:table-cell table:number-columns-repeated="2"/>
          <table:table-cell table:style-name="ce61" office:value-type="string" calcext:value-type="string">
            <text:p>ultimo update</text:p>
          </table:table-cell>
          <table:table-cell/>
          <table:table-cell table:style-name="ce66" office:value-type="string" calcext:value-type="string">
            <text:p>dinheiro para lente</text:p>
          </table:table-cell>
          <table:table-cell table:style-name="ce71" table:formula="of:=SUM([.P10:.P25])" office:value-type="float" office:value="0" calcext:value-type="float">
            <text:p><text:s/>R$ -   </text:p>
          </table:table-cell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4" office:value-type="string" calcext:value-type="string">
            <text:p>extra 3</text:p>
          </table:table-cell>
          <table:table-cell table:style-name="ce16"/>
          <table:table-cell table:style-name="ce29"/>
          <table:table-cell table:style-name="ce39" office:value-type="string" office:string-value="saidas fixas" calcext:value-type="string">
            <text:p><text:s/>saidas fixas </text:p>
          </table:table-cell>
          <table:table-cell table:style-name="ce44" table:formula="of:=SUM([.K11:.K22])" office:value-type="float" office:value="0" calcext:value-type="float">
            <text:p><text:s/>R$ -   </text:p>
          </table:table-cell>
          <table:table-cell table:number-columns-repeated="2"/>
          <table:table-cell table:style-name="ce62" office:value-type="date" office:date-value="2025-07-09" calcext:value-type="date">
            <text:p>9/7/2025</text:p>
          </table:table-cell>
          <table:table-cell/>
          <table:table-cell table:style-name="ce67" office:value-type="string" calcext:value-type="string">
            <text:p>para passar o mês, tenho =&gt;</text:p>
          </table:table-cell>
          <table:table-cell table:style-name="ce72"/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5" office:value-type="string" calcext:value-type="string">
            <text:p>Saldo</text:p>
          </table:table-cell>
          <table:table-cell table:style-name="ce17"/>
          <table:table-cell table:style-name="ce30" table:formula="of:=[$Out.F7]" office:value-type="float" office:value="657.7" calcext:value-type="float">
            <text:p><text:s/>R$ 657,70 </text:p>
          </table:table-cell>
          <table:table-cell table:style-name="ce40" office:value-type="string" office:string-value="saldo" calcext:value-type="string">
            <text:p><text:s/>saldo </text:p>
          </table:table-cell>
          <table:table-cell table:style-name="ce45" table:formula="of:=[.F3]-[.F4]-[.F6]" office:value-type="float" office:value="657.7" calcext:value-type="float">
            <text:p><text:s/>R$ 657,70 </text:p>
          </table:table-cell>
          <table:table-cell table:number-columns-repeated="10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Variados</text:p>
          </table:table-cell>
          <table:covered-table-cell table:number-columns-repeated="3" table:style-name="ce18"/>
          <table:covered-table-cell table:style-name="ce46"/>
          <table:table-cell/>
          <table:table-cell table:style-name="ce52" office:value-type="string" calcext:value-type="string" table:number-columns-spanned="4" table:number-rows-spanned="1">
            <text:p>Fixos</text:p>
          </table:table-cell>
          <table:covered-table-cell table:number-columns-repeated="3" table:style-name="ce52"/>
          <table:table-cell/>
          <table:table-cell table:style-name="ce73" office:value-type="string" calcext:value-type="string">
            <text:p>Eventos</text:p>
          </table:table-cell>
          <table:table-cell table:style-name="ce76" office:value-type="string" calcext:value-type="string">
            <text:p>Data</text:p>
          </table:table-cell>
          <table:table-cell table:style-name="ce80" office:value-type="string" calcext:value-type="string">
            <text:p>Descrição</text:p>
          </table:table-cell>
          <table:table-cell table:style-name="ce84" office:value-type="string" calcext:value-type="string">
            <text:p>Entradas</text:p>
          </table:table-cell>
          <table:table-cell table:style-name="Default" table:number-columns-repeated="16368"/>
        </table:table-row>
        <table:table-row table:style-name="ro1">
          <table:table-cell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topico</text:p>
          </table:table-cell>
          <table:table-cell table:style-name="ce7" office:value-type="string" calcext:value-type="string">
            <text:p>sub-tópico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valor</text:p>
          </table:table-cell>
          <table:table-cell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Topico</text:p>
          </table:table-cell>
          <table:table-cell table:style-name="ce7" office:value-type="string" calcext:value-type="string">
            <text:p>sub-tópico</text:p>
          </table:table-cell>
          <table:table-cell table:style-name="ce7" office:value-type="string" calcext:value-type="string">
            <text:p>valor</text:p>
          </table:table-cell>
          <table:table-cell/>
          <table:table-cell table:style-name="ce74"/>
          <table:table-cell table:style-name="ce77"/>
          <table:table-cell table:style-name="ce81"/>
          <table:table-cell table:style-name="ce68"/>
          <table:table-cell table:style-name="Default" table:number-columns-repeated="16368"/>
        </table:table-row>
        <table:table-row table:style-name="ro1">
          <table:table-cell/>
          <table:table-cell table:style-name="ce8"/>
          <table:table-cell table:style-name="ce19" table:content-validation-name="val7"/>
          <table:table-cell table:style-name="ce19" table:content-validation-name="val2"/>
          <table:table-cell table:style-name="ce19"/>
          <table:table-cell table:style-name="ce47"/>
          <table:table-cell/>
          <table:table-cell table:style-name="ce53"/>
          <table:table-cell table:style-name="ce63" table:content-validation-name="val3"/>
          <table:table-cell table:style-name="ce63"/>
          <table:table-cell table:style-name="ce68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 table:number-rows-repeated="10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/>
          <table:table-cell table:style-name="ce54"/>
          <table:table-cell table:style-name="ce63" table:content-validation-name="val3"/>
          <table:table-cell table:style-name="ce65"/>
          <table:table-cell table:style-name="ce69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/>
          <table:table-cell table:style-name="ce55"/>
          <table:table-cell table:style-name="ce64" table:content-validation-name="val3"/>
          <table:table-cell table:style-name="ce64"/>
          <table:table-cell table:style-name="ce70"/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 table:number-columns-repeated="4"/>
          <table:table-cell table:style-name="ce51" table:formula="of:=SUM([.K11:.K22])" office:value-type="float" office:value="0" calcext:value-type="float">
            <text:p><text:s/>R$ -   </text:p>
          </table:table-cell>
          <table:table-cell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 table:number-columns-repeated="6"/>
          <table:table-cell table:style-name="ce75"/>
          <table:table-cell table:style-name="ce78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 table:number-columns-repeated="6"/>
          <table:table-cell table:style-name="ce25"/>
          <table:table-cell table:style-name="ce79"/>
          <table:table-cell table:style-name="ce83"/>
          <table:table-cell table:style-name="ce70"/>
          <table:table-cell table:style-name="Default" table:number-columns-repeated="16368"/>
        </table:table-row>
        <table:table-row table:style-name="ro1" table:number-rows-repeated="6">
          <table:table-cell/>
          <table:table-cell table:style-name="ce9"/>
          <table:table-cell table:style-name="ce15" table:content-validation-name="val7"/>
          <table:table-cell table:style-name="ce15" table:content-validation-name="val2"/>
          <table:table-cell table:style-name="ce15"/>
          <table:table-cell table:style-name="ce48"/>
          <table:table-cell table:number-columns-repeated="10"/>
          <table:table-cell table:style-name="Default" table:number-columns-repeated="16368"/>
        </table:table-row>
        <table:table-row table:style-name="ro1">
          <table:table-cell/>
          <table:table-cell table:style-name="ce10"/>
          <table:table-cell table:style-name="ce17" table:content-validation-name="val7"/>
          <table:table-cell table:style-name="ce17" table:content-validation-name="val2"/>
          <table:table-cell table:style-name="ce17"/>
          <table:table-cell table:style-name="ce49"/>
          <table:table-cell table:number-columns-repeated="10"/>
          <table:table-cell table:style-name="Default" table:number-columns-repeated="16368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Alimentação</text:p>
          </table:table-cell>
          <table:table-cell table:style-name="ce20" office:value-type="string" calcext:value-type="string">
            <text:p>Doces</text:p>
          </table:table-cell>
          <table:table-cell table:style-name="ce31" table:formula="of:=SUMIF([.$D$11:.$D$32];[.C35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6" office:value-type="string" calcext:value-type="string">
            <text:p>Internet</text:p>
          </table:table-cell>
          <table:table-cell table:style-name="ce31" table:formula="of:=SUMIF([.$I$11:.$I$22];[.H35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35:.D39])" office:value-type="float" office:value="0" calcext:value-type="float">
            <text:p><text:s/>R$ -   </text:p>
          </table:table-cell>
          <table:table-cell office:value-type="string" calcext:value-type="string">
            <text:p>Padaria </text:p>
          </table:table-cell>
          <table:table-cell table:formula="of:=SUMIF([.$D$11:.$D$32];[.C36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Planos/assinaturas</text:p>
          </table:table-cell>
          <table:table-cell table:style-name="ce32" table:formula="of:=SUMIF([.$I$11:.$I$22];[.H36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<text:s/>Almoço fora</text:p>
          </table:table-cell>
          <table:table-cell table:formula="of:=SUMIF([.$D$11:.$D$32];[.C37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Agua</text:p>
          </table:table-cell>
          <table:table-cell table:style-name="ce32" table:formula="of:=SUMIF([.$I$11:.$I$22];[.H37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Lanches / Snacks</text:p>
          </table:table-cell>
          <table:table-cell table:formula="of:=SUMIF([.$D$11:.$D$32];[.C38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Luz</text:p>
          </table:table-cell>
          <table:table-cell table:style-name="ce32" table:formula="of:=SUMIF([.$I$11:.$I$22];[.H38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2"/>
          <table:table-cell table:style-name="ce33" table:formula="of:=SUMIF([.$D$11:.$D$32];[.C39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Gasolina</text:p>
          </table:table-cell>
          <table:table-cell table:style-name="ce32" table:formula="of:=SUMIF([.$I$11:.$I$22];[.H39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3"/>
          <table:table-cell table:style-name="ce34"/>
          <table:table-cell table:number-columns-repeated="3"/>
          <table:table-cell table:style-name="ce57" office:value-type="string" calcext:value-type="string">
            <text:p>Dizimos</text:p>
          </table:table-cell>
          <table:table-cell table:style-name="ce32" table:formula="of:=SUMIF([.$I$11:.$I$22];[.H40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Lazer</text:p>
          </table:table-cell>
          <table:table-cell table:style-name="ce20" office:value-type="string" calcext:value-type="string">
            <text:p>Delivery (iFood, etc)</text:p>
          </table:table-cell>
          <table:table-cell table:style-name="ce31" table:formula="of:=SUMIF([.$D$11:.$D$32];[.C41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Ofertas</text:p>
          </table:table-cell>
          <table:table-cell table:style-name="ce32" table:formula="of:=SUMIF([.$I$11:.$I$22];[.H41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2" table:formula="of:=SUBTOTAL(9;[.D41:.D48])" office:value-type="float" office:value="0" calcext:value-type="float">
            <text:p><text:s/>R$ -   </text:p>
          </table:table-cell>
          <table:table-cell office:value-type="string" calcext:value-type="string">
            <text:p>Cinema / Shows</text:p>
          </table:table-cell>
          <table:table-cell table:formula="of:=SUMIF([.$D$11:.$D$32];[.C42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Parcelas</text:p>
          </table:table-cell>
          <table:table-cell table:style-name="ce32" table:formula="of:=SUMIF([.$I$11:.$I$22];[.H42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asseios / Viagens</text:p>
          </table:table-cell>
          <table:table-cell table:formula="of:=SUMIF([.$D$11:.$D$32];[.C43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Saúde</text:p>
          </table:table-cell>
          <table:table-cell table:style-name="ce32" table:formula="of:=SUMIF([.$I$11:.$I$22];[.H43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Compras por impulso (não essenciais)</text:p>
          </table:table-cell>
          <table:table-cell table:formula="of:=SUMIF([.$D$11:.$D$32];[.C44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Investimento</text:p>
          </table:table-cell>
          <table:table-cell table:style-name="ce32" table:formula="of:=SUMIF([.$I$11:.$I$22];[.H44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<text:s/>Jogos / Games / Aplicativos pagos</text:p>
          </table:table-cell>
          <table:table-cell table:formula="of:=SUMIF([.$D$11:.$D$32];[.C45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8"/>
          <table:table-cell table:style-name="ce33" table:formula="of:=SUMIF([.$I$11:.$I$22];[.H45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Saídas com amigos</text:p>
          </table:table-cell>
          <table:table-cell table:formula="of:=SUMIF([.$D$11:.$D$32];[.C4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4"/>
          <table:table-cell table:style-name="ce35" table:formula="of:=SUMIF([.$D$11:.$D$32];[.C4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2"/>
          <table:table-cell table:style-name="ce33" table:formula="of:=SUMIF([.$D$11:.$D$32];[.C4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Despesas</text:p>
          </table:table-cell>
          <table:table-cell table:style-name="ce20" office:value-type="string" calcext:value-type="string">
            <text:p>Presentes e datas comemorativas</text:p>
          </table:table-cell>
          <table:table-cell table:style-name="ce31" table:formula="of:=SUMIF([.$D$11:.$D$32];[.C5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50:.D56])" office:value-type="float" office:value="0" calcext:value-type="float">
            <text:p><text:s/>R$ -   </text:p>
          </table:table-cell>
          <table:table-cell office:value-type="string" calcext:value-type="string">
            <text:p>Doações / Contribuições</text:p>
          </table:table-cell>
          <table:table-cell table:formula="of:=SUMIF([.$D$11:.$D$32];[.C51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Taxas bancárias / Pix por engano</text:p>
          </table:table-cell>
          <table:table-cell table:formula="of:=SUMIF([.$D$11:.$D$32];[.C5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Compras online aleatórias</text:p>
          </table:table-cell>
          <table:table-cell table:formula="of:=SUMIF([.$D$11:.$D$32];[.C53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anutenção da casa (lâmpada, pilha, etc)</text:p>
          </table:table-cell>
          <table:table-cell table:formula="of:=SUMIF([.$D$11:.$D$32];[.C5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Gastos pessoais (roupas, acessórios)</text:p>
          </table:table-cell>
          <table:table-cell table:formula="of:=SUMIF([.$D$11:.$D$32];[.C55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5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Transporte</text:p>
          </table:table-cell>
          <table:table-cell table:style-name="ce20" office:value-type="string" calcext:value-type="string">
            <text:p>Acessório</text:p>
          </table:table-cell>
          <table:table-cell table:style-name="ce31" table:formula="of:=SUMIF([.$D$11:.$D$32];[.C5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58:.D64])" office:value-type="float" office:value="0" calcext:value-type="float">
            <text:p><text:s/>R$ -   </text:p>
          </table:table-cell>
          <table:table-cell office:value-type="string" calcext:value-type="string">
            <text:p>Uber / Táxi</text:p>
          </table:table-cell>
          <table:table-cell table:formula="of:=SUMIF([.$D$11:.$D$32];[.C59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Ônibus / Metrô</text:p>
          </table:table-cell>
          <table:table-cell table:formula="of:=SUMIF([.$D$11:.$D$32];[.C6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Estacionamento</text:p>
          </table:table-cell>
          <table:table-cell table:formula="of:=SUMIF([.$D$11:.$D$32];[.C61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anutenção (óleo, pneu, etc)</text:p>
          </table:table-cell>
          <table:table-cell table:formula="of:=SUMIF([.$D$11:.$D$32];[.C6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ultas / Documentação</text:p>
          </table:table-cell>
          <table:table-cell table:formula="of:=SUMIF([.$D$11:.$D$32];[.C63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6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Educação</text:p>
          </table:table-cell>
          <table:table-cell table:style-name="ce20" office:value-type="string" calcext:value-type="string">
            <text:p>Livros </text:p>
          </table:table-cell>
          <table:table-cell table:style-name="ce31" table:formula="of:=SUMIF([.$D$11:.$D$32];[.C6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66:.D72])" office:value-type="float" office:value="0" calcext:value-type="float">
            <text:p><text:s/>R$ -   </text:p>
          </table:table-cell>
          <table:table-cell office:value-type="string" calcext:value-type="string">
            <text:p>Cursos online (Udemy, Alura, etc)</text:p>
          </table:table-cell>
          <table:table-cell table:formula="of:=SUMIF([.$D$11:.$D$32];[.C6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Material escolar / didático</text:p>
          </table:table-cell>
          <table:table-cell table:formula="of:=SUMIF([.$D$11:.$D$32];[.C6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Apostilas</text:p>
          </table:table-cell>
          <table:table-cell table:formula="of:=SUMIF([.$D$11:.$D$32];[.C69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Internet dedicada para estudos</text:p>
          </table:table-cell>
          <table:table-cell table:formula="of:=SUMIF([.$D$11:.$D$32];[.C7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lataformas de aprendizado </text:p>
          </table:table-cell>
          <table:table-cell table:formula="of:=SUMIF([.$D$11:.$D$32];[.C71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7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Saúde</text:p>
          </table:table-cell>
          <table:table-cell table:style-name="ce20" office:value-type="string" calcext:value-type="string">
            <text:p>Medicamentos</text:p>
          </table:table-cell>
          <table:table-cell table:style-name="ce31" table:formula="of:=SUMIF([.$D$11:.$D$32];[.C7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74:.D80])" office:value-type="float" office:value="0" calcext:value-type="float">
            <text:p><text:s/>R$ -   </text:p>
          </table:table-cell>
          <table:table-cell office:value-type="string" calcext:value-type="string">
            <text:p>Consultas médicas / exames</text:p>
          </table:table-cell>
          <table:table-cell table:formula="of:=SUMIF([.$D$11:.$D$32];[.C75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Óculos / lentes</text:p>
          </table:table-cell>
          <table:table-cell table:formula="of:=SUMIF([.$D$11:.$D$32];[.C7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rodutos de higiene e cuidados pessoais</text:p>
          </table:table-cell>
          <table:table-cell table:formula="of:=SUMIF([.$D$11:.$D$32];[.C7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3"/>
          <table:table-cell table:formula="of:=SUMIF([.$D$11:.$D$32];[.C7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3"/>
          <table:table-cell table:formula="of:=SUMIF([.$D$11:.$D$32];[.C79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8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Imprevistos</text:p>
          </table:table-cell>
          <table:table-cell table:style-name="ce20" office:value-type="string" calcext:value-type="string">
            <text:p>Emergência médica ou odontológica</text:p>
          </table:table-cell>
          <table:table-cell table:style-name="ce31" table:formula="of:=SUMIF([.$D$11:.$D$32];[.C8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82:.D88])" office:value-type="float" office:value="0" calcext:value-type="float">
            <text:p><text:s/>R$ -   </text:p>
          </table:table-cell>
          <table:table-cell office:value-type="string" calcext:value-type="string">
            <text:p>Equipamento quebrado (celular, notebook)</text:p>
          </table:table-cell>
          <table:table-cell table:formula="of:=SUMIF([.$D$11:.$D$32];[.C83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erda de documentos / taxas</text:p>
          </table:table-cell>
          <table:table-cell table:formula="of:=SUMIF([.$D$11:.$D$32];[.C8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Atrasos em contas com juros</text:p>
          </table:table-cell>
          <table:table-cell table:formula="of:=SUMIF([.$D$11:.$D$32];[.C85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Conserto urgente (casa, carro, etc)</text:p>
          </table:table-cell>
          <table:table-cell table:formula="of:=SUMIF([.$D$11:.$D$32];[.C8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Ajuda financeira a alguém (urgente)</text:p>
          </table:table-cell>
          <table:table-cell table:formula="of:=SUMIF([.$D$11:.$D$32];[.C8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8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Investimento</text:p>
          </table:table-cell>
          <table:table-cell table:style-name="ce20"/>
          <table:table-cell table:style-name="ce31" table:formula="of:=SUMIF([.C11:.C32];[.B90];[.F11:.F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</table:table>
      <table:table table:name="Dez" table:style-name="ta1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49" table:default-cell-style-name="ce92"/>
        <table:table-column table:style-name="co13" table:default-cell-style-name="Default"/>
        <table:table-column table:style-name="co50" table:default-cell-style-name="Default"/>
        <table:table-column table:style-name="co15" table:number-columns-repeated="16368"/>
        <table:table-row table:style-name="ro1">
          <table:table-cell table:number-columns-repeated="16"/>
          <table:table-cell table:style-name="Default" table:number-columns-repeated="16368"/>
        </table:table-row>
        <table:table-row table:style-name="ro1">
          <table:table-cell/>
          <table:table-cell table:style-name="ce1" office:value-type="string" calcext:value-type="string">
            <text:p>DEZ</text:p>
          </table:table-cell>
          <table:table-cell table:style-name="ce13" office:value-type="string" calcext:value-type="string">
            <text:p>entradas</text:p>
          </table:table-cell>
          <table:table-cell table:style-name="ce26" office:value-type="string" calcext:value-type="string">
            <text:p>valor</text:p>
          </table:table-cell>
          <table:table-cell table:style-name="ce13"/>
          <table:table-cell table:style-name="ce7" office:value-type="string" calcext:value-type="string">
            <text:p>Saldo mensal</text:p>
          </table:table-cell>
          <table:table-cell/>
          <table:table-cell table:style-name="ce50" table:number-columns-spanned="4" table:number-rows-spanned="1"/>
          <table:covered-table-cell table:number-columns-repeated="3" table:style-name="ce59"/>
          <table:table-cell table:number-columns-repeated="5"/>
          <table:table-cell table:style-name="Default" table:number-columns-repeated="16368"/>
        </table:table-row>
        <table:table-row table:style-name="ro1">
          <table:table-cell/>
          <table:table-cell table:style-name="ce2" office:value-type="string" calcext:value-type="string">
            <text:p>salário</text:p>
          </table:table-cell>
          <table:table-cell table:style-name="ce14"/>
          <table:table-cell table:style-name="ce27"/>
          <table:table-cell table:style-name="ce36" office:value-type="string" office:string-value="entradas" calcext:value-type="string">
            <text:p><text:s/>entradas </text:p>
          </table:table-cell>
          <table:table-cell table:style-name="ce41" table:formula="of:=SUM([.D3];[.D5];[.D6];[.D7];[.D4])" office:value-type="float" office:value="657.7" calcext:value-type="float">
            <text:p><text:s/>R$ 657,70 </text:p>
          </table:table-cell>
          <table:table-cell table:number-columns-repeated="2"/>
          <table:table-cell table:style-name="ce1" office:value-type="string" calcext:value-type="string">
            <text:p>data</text:p>
          </table:table-cell>
          <table:table-cell/>
          <table:table-cell table:style-name="ce66" office:value-type="string" calcext:value-type="string">
            <text:p>dinheiro guardado</text:p>
          </table:table-cell>
          <table:table-cell table:style-name="ce71"/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3" office:value-type="string" calcext:value-type="string">
            <text:p>Fotografia</text:p>
          </table:table-cell>
          <table:table-cell table:style-name="ce15"/>
          <table:table-cell table:style-name="ce28" table:formula="of:=SUM([.P10:.P25])" office:value-type="float" office:value="0" calcext:value-type="float">
            <text:p><text:s/>R$ -   </text:p>
          </table:table-cell>
          <table:table-cell table:style-name="ce37" office:value-type="string" office:string-value="gastos variados" calcext:value-type="string">
            <text:p><text:s/>gastos variados </text:p>
          </table:table-cell>
          <table:table-cell table:style-name="ce42" table:formula="of:=SUM([.F11:.F32])" office:value-type="float" office:value="0" calcext:value-type="float">
            <text:p><text:s/>R$ -   </text:p>
          </table:table-cell>
          <table:table-cell table:number-columns-repeated="2"/>
          <table:table-cell table:style-name="ce60" table:formula="of:=TODAY()" office:value-type="date" office:date-value="2026-06-21" calcext:value-type="date">
            <text:p>21/6/2026</text:p>
          </table:table-cell>
          <table:table-cell/>
          <table:table-cell table:style-name="ce66" office:value-type="string" calcext:value-type="string">
            <text:p>dinheiro para inestimento futuro</text:p>
          </table:table-cell>
          <table:table-cell table:style-name="ce71"/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4" office:value-type="string" calcext:value-type="string">
            <text:p>extra 2</text:p>
          </table:table-cell>
          <table:table-cell table:style-name="ce16"/>
          <table:table-cell table:style-name="ce29"/>
          <table:table-cell table:style-name="ce38" office:value-type="string" office:string-value="entradas fotografia" calcext:value-type="string">
            <text:p><text:s/>entradas fotografia </text:p>
          </table:table-cell>
          <table:table-cell table:style-name="ce43" table:formula="of:=[.D4]" office:value-type="float" office:value="0" calcext:value-type="float">
            <text:p><text:s/>R$ -   </text:p>
          </table:table-cell>
          <table:table-cell table:number-columns-repeated="2"/>
          <table:table-cell table:style-name="ce61" office:value-type="string" calcext:value-type="string">
            <text:p>ultimo update</text:p>
          </table:table-cell>
          <table:table-cell/>
          <table:table-cell table:style-name="ce66" office:value-type="string" calcext:value-type="string">
            <text:p>dinheiro para lente</text:p>
          </table:table-cell>
          <table:table-cell table:style-name="ce71" table:formula="of:=SUM([.P10:.P25])" office:value-type="float" office:value="0" calcext:value-type="float">
            <text:p><text:s/>R$ -   </text:p>
          </table:table-cell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4" office:value-type="string" calcext:value-type="string">
            <text:p>extra 3</text:p>
          </table:table-cell>
          <table:table-cell table:style-name="ce16"/>
          <table:table-cell table:style-name="ce29"/>
          <table:table-cell table:style-name="ce39" office:value-type="string" office:string-value="saidas fixas" calcext:value-type="string">
            <text:p><text:s/>saidas fixas </text:p>
          </table:table-cell>
          <table:table-cell table:style-name="ce44" table:formula="of:=SUM([.K11:.K22])" office:value-type="float" office:value="0" calcext:value-type="float">
            <text:p><text:s/>R$ -   </text:p>
          </table:table-cell>
          <table:table-cell table:number-columns-repeated="2"/>
          <table:table-cell table:style-name="ce62" office:value-type="date" office:date-value="2025-12-11" calcext:value-type="date">
            <text:p>11/12/2025</text:p>
          </table:table-cell>
          <table:table-cell/>
          <table:table-cell table:style-name="ce67" office:value-type="string" calcext:value-type="string">
            <text:p>para passar o mês, tenho =&gt;</text:p>
          </table:table-cell>
          <table:table-cell table:style-name="ce72"/>
          <table:table-cell table:number-columns-repeated="4"/>
          <table:table-cell table:style-name="Default" table:number-columns-repeated="16368"/>
        </table:table-row>
        <table:table-row table:style-name="ro1">
          <table:table-cell/>
          <table:table-cell table:style-name="ce5" office:value-type="string" calcext:value-type="string">
            <text:p>Saldo</text:p>
          </table:table-cell>
          <table:table-cell table:style-name="ce17"/>
          <table:table-cell table:style-name="ce30" table:formula="of:=[$Nov.F7]" office:value-type="float" office:value="657.7" calcext:value-type="float">
            <text:p><text:s/>R$ 657,70 </text:p>
          </table:table-cell>
          <table:table-cell table:style-name="ce40" office:value-type="string" office:string-value="saldo" calcext:value-type="string">
            <text:p><text:s/>saldo </text:p>
          </table:table-cell>
          <table:table-cell table:style-name="ce45" table:formula="of:=[.F3]-[.F4]-[.F6]" office:value-type="float" office:value="657.7" calcext:value-type="float">
            <text:p><text:s/>R$ 657,70 </text:p>
          </table:table-cell>
          <table:table-cell table:number-columns-repeated="10"/>
          <table:table-cell table:style-name="Default" table:number-columns-repeated="16368"/>
        </table:table-row>
        <table:table-row table:style-name="ro1">
          <table:table-cell table:number-columns-repeated="16"/>
          <table:table-cell table:style-name="Default" table:number-columns-repeated="16368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Variados</text:p>
          </table:table-cell>
          <table:covered-table-cell table:number-columns-repeated="3" table:style-name="ce18"/>
          <table:covered-table-cell table:style-name="ce46"/>
          <table:table-cell/>
          <table:table-cell table:style-name="ce52" office:value-type="string" calcext:value-type="string" table:number-columns-spanned="4" table:number-rows-spanned="1">
            <text:p>Fixos</text:p>
          </table:table-cell>
          <table:covered-table-cell table:number-columns-repeated="3" table:style-name="ce52"/>
          <table:table-cell/>
          <table:table-cell table:style-name="ce73" office:value-type="string" calcext:value-type="string">
            <text:p>Eventos</text:p>
          </table:table-cell>
          <table:table-cell table:style-name="ce76" office:value-type="string" calcext:value-type="string">
            <text:p>Data</text:p>
          </table:table-cell>
          <table:table-cell table:style-name="ce80" office:value-type="string" calcext:value-type="string">
            <text:p>Descrição</text:p>
          </table:table-cell>
          <table:table-cell table:style-name="ce84" office:value-type="string" calcext:value-type="string">
            <text:p>Entradas</text:p>
          </table:table-cell>
          <table:table-cell table:style-name="Default" table:number-columns-repeated="16368"/>
        </table:table-row>
        <table:table-row table:style-name="ro1">
          <table:table-cell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topico</text:p>
          </table:table-cell>
          <table:table-cell table:style-name="ce7" office:value-type="string" calcext:value-type="string">
            <text:p>sub-tópico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valor</text:p>
          </table:table-cell>
          <table:table-cell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Topico</text:p>
          </table:table-cell>
          <table:table-cell table:style-name="ce7" office:value-type="string" calcext:value-type="string">
            <text:p>sub-tópico</text:p>
          </table:table-cell>
          <table:table-cell table:style-name="ce7" office:value-type="string" calcext:value-type="string">
            <text:p>valor</text:p>
          </table:table-cell>
          <table:table-cell/>
          <table:table-cell table:style-name="ce74"/>
          <table:table-cell table:style-name="ce93"/>
          <table:table-cell table:style-name="ce81"/>
          <table:table-cell table:style-name="ce68"/>
          <table:table-cell table:style-name="Default" table:number-columns-repeated="16368"/>
        </table:table-row>
        <table:table-row table:style-name="ro1">
          <table:table-cell/>
          <table:table-cell table:style-name="ce8"/>
          <table:table-cell table:style-name="ce19" table:content-validation-name="val9"/>
          <table:table-cell table:style-name="ce19" table:content-validation-name="val10"/>
          <table:table-cell table:style-name="ce19"/>
          <table:table-cell table:style-name="ce47"/>
          <table:table-cell/>
          <table:table-cell table:style-name="ce53"/>
          <table:table-cell table:style-name="ce63" table:content-validation-name="val11"/>
          <table:table-cell table:style-name="ce63"/>
          <table:table-cell table:style-name="ce68"/>
          <table:table-cell/>
          <table:table-cell table:style-name="ce75"/>
          <table:table-cell table:style-name="ce94"/>
          <table:table-cell table:style-name="ce82">
            <office:annotation draw:style-name="gr1" draw:text-style-name="P1" svg:width="3.385cm" svg:height="2.274cm" svg:x="39.298cm" svg:y="5.001cm" draw:caption-point-x="12.291cm" draw:caption-point-y="0.301cm">
              <dc:creator>55319</dc:creator>
              <meta:date-string/>
              <text:p>Preciso melhorar:</text:p>
              <text:p>Abordagem</text:p>
              <text:p>Venda</text:p>
              <text:p>Preço </text:p>
              <text:p>Iluminação</text:p>
            </office:annotation>
          </table:table-cell>
          <table:table-cell table:style-name="ce69"/>
          <table:table-cell table:style-name="Default" table:number-columns-repeated="16368"/>
        </table:table-row>
        <table:table-row table:style-name="ro1" table:number-rows-repeated="10">
          <table:table-cell/>
          <table:table-cell table:style-name="ce9"/>
          <table:table-cell table:style-name="ce15" table:content-validation-name="val9"/>
          <table:table-cell table:style-name="ce15" table:content-validation-name="val10"/>
          <table:table-cell table:style-name="ce15"/>
          <table:table-cell table:style-name="ce48"/>
          <table:table-cell/>
          <table:table-cell table:style-name="ce54"/>
          <table:table-cell table:style-name="ce63" table:content-validation-name="val11"/>
          <table:table-cell table:style-name="ce65"/>
          <table:table-cell table:style-name="ce69"/>
          <table:table-cell/>
          <table:table-cell table:style-name="ce75"/>
          <table:table-cell table:style-name="ce94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9"/>
          <table:table-cell table:style-name="ce15" table:content-validation-name="val10"/>
          <table:table-cell table:style-name="ce15"/>
          <table:table-cell table:style-name="ce48"/>
          <table:table-cell/>
          <table:table-cell table:style-name="ce55"/>
          <table:table-cell table:style-name="ce64" table:content-validation-name="val11"/>
          <table:table-cell table:style-name="ce64"/>
          <table:table-cell table:style-name="ce70"/>
          <table:table-cell/>
          <table:table-cell table:style-name="ce75"/>
          <table:table-cell table:style-name="ce94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9"/>
          <table:table-cell table:style-name="ce15" table:content-validation-name="val10"/>
          <table:table-cell table:style-name="ce15"/>
          <table:table-cell table:style-name="ce48"/>
          <table:table-cell table:number-columns-repeated="4"/>
          <table:table-cell table:style-name="ce51" table:formula="of:=SUM([.K11:.K22])" office:value-type="float" office:value="0" calcext:value-type="float">
            <text:p><text:s/>R$ -   </text:p>
          </table:table-cell>
          <table:table-cell/>
          <table:table-cell table:style-name="ce75"/>
          <table:table-cell table:style-name="ce94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9"/>
          <table:table-cell table:style-name="ce15" table:content-validation-name="val10"/>
          <table:table-cell table:style-name="ce15"/>
          <table:table-cell table:style-name="ce48"/>
          <table:table-cell table:number-columns-repeated="6"/>
          <table:table-cell table:style-name="ce75"/>
          <table:table-cell table:style-name="ce94"/>
          <table:table-cell table:style-name="ce82"/>
          <table:table-cell table:style-name="ce69"/>
          <table:table-cell table:style-name="Default" table:number-columns-repeated="16368"/>
        </table:table-row>
        <table:table-row table:style-name="ro1">
          <table:table-cell/>
          <table:table-cell table:style-name="ce9"/>
          <table:table-cell table:style-name="ce15" table:content-validation-name="val9"/>
          <table:table-cell table:style-name="ce15" table:content-validation-name="val10"/>
          <table:table-cell table:style-name="ce15"/>
          <table:table-cell table:style-name="ce48"/>
          <table:table-cell table:number-columns-repeated="6"/>
          <table:table-cell table:style-name="ce25"/>
          <table:table-cell table:style-name="ce95"/>
          <table:table-cell table:style-name="ce83"/>
          <table:table-cell table:style-name="ce70"/>
          <table:table-cell table:style-name="Default" table:number-columns-repeated="16368"/>
        </table:table-row>
        <table:table-row table:style-name="ro1" table:number-rows-repeated="6">
          <table:table-cell/>
          <table:table-cell table:style-name="ce9"/>
          <table:table-cell table:style-name="ce15" table:content-validation-name="val9"/>
          <table:table-cell table:style-name="ce15" table:content-validation-name="val10"/>
          <table:table-cell table:style-name="ce15"/>
          <table:table-cell table:style-name="ce48"/>
          <table:table-cell table:number-columns-repeated="10"/>
          <table:table-cell table:style-name="Default" table:number-columns-repeated="16368"/>
        </table:table-row>
        <table:table-row table:style-name="ro1">
          <table:table-cell/>
          <table:table-cell table:style-name="ce10"/>
          <table:table-cell table:style-name="ce17" table:content-validation-name="val9"/>
          <table:table-cell table:style-name="ce17" table:content-validation-name="val10"/>
          <table:table-cell table:style-name="ce17"/>
          <table:table-cell table:style-name="ce49"/>
          <table:table-cell table:number-columns-repeated="10"/>
          <table:table-cell table:style-name="Default" table:number-columns-repeated="16368"/>
        </table:table-row>
        <table:table-row table:style-name="ro1" table:number-rows-repeated="2">
          <table:table-cell table:number-columns-repeated="16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Alimentação</text:p>
          </table:table-cell>
          <table:table-cell table:style-name="ce20" office:value-type="string" calcext:value-type="string">
            <text:p>Doces</text:p>
          </table:table-cell>
          <table:table-cell table:style-name="ce31" table:formula="of:=SUMIF([.$D$11:.$D$32];[.C35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6" office:value-type="string" calcext:value-type="string">
            <text:p>Internet</text:p>
          </table:table-cell>
          <table:table-cell table:style-name="ce31" table:formula="of:=SUMIF([.$I$11:.$I$22];[.H35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35:.D39])" office:value-type="float" office:value="0" calcext:value-type="float">
            <text:p><text:s/>R$ -   </text:p>
          </table:table-cell>
          <table:table-cell table:style-name="ce21" office:value-type="string" calcext:value-type="string">
            <text:p>Padaria </text:p>
          </table:table-cell>
          <table:table-cell table:style-name="ce32" table:formula="of:=SUMIF([.$D$11:.$D$32];[.C36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Planos/assinaturas</text:p>
          </table:table-cell>
          <table:table-cell table:style-name="ce32" table:formula="of:=SUMIF([.$I$11:.$I$22];[.H36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1" office:value-type="string" calcext:value-type="string">
            <text:p><text:s/>Almoço fora</text:p>
          </table:table-cell>
          <table:table-cell table:style-name="ce32" table:formula="of:=SUMIF([.$D$11:.$D$32];[.C37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Agua</text:p>
          </table:table-cell>
          <table:table-cell table:style-name="ce32" table:formula="of:=SUMIF([.$I$11:.$I$22];[.H37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1" office:value-type="string" calcext:value-type="string">
            <text:p>Lanches / Snacks</text:p>
          </table:table-cell>
          <table:table-cell table:style-name="ce32" table:formula="of:=SUMIF([.$D$11:.$D$32];[.C38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Luz</text:p>
          </table:table-cell>
          <table:table-cell table:style-name="ce32" table:formula="of:=SUMIF([.$I$11:.$I$22];[.H38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2"/>
          <table:table-cell table:style-name="ce33" table:formula="of:=SUMIF([.$D$11:.$D$32];[.C39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Gasolina</text:p>
          </table:table-cell>
          <table:table-cell table:style-name="ce32" table:formula="of:=SUMIF([.$I$11:.$I$22];[.H39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3"/>
          <table:table-cell table:style-name="ce34"/>
          <table:table-cell table:number-columns-repeated="3"/>
          <table:table-cell table:style-name="ce57" office:value-type="string" calcext:value-type="string">
            <text:p>Dizimos</text:p>
          </table:table-cell>
          <table:table-cell table:style-name="ce32" table:formula="of:=SUMIF([.$I$11:.$I$22];[.H40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Lazer</text:p>
          </table:table-cell>
          <table:table-cell table:style-name="ce20" office:value-type="string" calcext:value-type="string">
            <text:p>Delivery (iFood, etc)</text:p>
          </table:table-cell>
          <table:table-cell table:style-name="ce31" table:formula="of:=SUMIF([.$D$11:.$D$32];[.C41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Ofertas</text:p>
          </table:table-cell>
          <table:table-cell table:style-name="ce32" table:formula="of:=SUMIF([.$I$11:.$I$22];[.H41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/>
          <table:table-cell table:style-name="ce12" table:formula="of:=SUBTOTAL(9;[.D41:.D48])" office:value-type="float" office:value="0" calcext:value-type="float">
            <text:p><text:s/>R$ -   </text:p>
          </table:table-cell>
          <table:table-cell table:style-name="ce21" office:value-type="string" calcext:value-type="string">
            <text:p>Cinema / Shows</text:p>
          </table:table-cell>
          <table:table-cell table:style-name="ce32" table:formula="of:=SUMIF([.$D$11:.$D$32];[.C42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Parcelas</text:p>
          </table:table-cell>
          <table:table-cell table:style-name="ce32" table:formula="of:=SUMIF([.$I$11:.$I$22];[.H42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1" office:value-type="string" calcext:value-type="string">
            <text:p>Passeios / Viagens</text:p>
          </table:table-cell>
          <table:table-cell table:style-name="ce32" table:formula="of:=SUMIF([.$D$11:.$D$32];[.C43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Saúde</text:p>
          </table:table-cell>
          <table:table-cell table:style-name="ce32" table:formula="of:=SUMIF([.$I$11:.$I$22];[.H43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1" office:value-type="string" calcext:value-type="string">
            <text:p>Compras por impulso (não essenciais)</text:p>
          </table:table-cell>
          <table:table-cell table:style-name="ce32" table:formula="of:=SUMIF([.$D$11:.$D$32];[.C44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7" office:value-type="string" calcext:value-type="string">
            <text:p>Investimento</text:p>
          </table:table-cell>
          <table:table-cell table:style-name="ce32" table:formula="of:=SUMIF([.$I$11:.$I$22];[.H44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1" office:value-type="string" calcext:value-type="string">
            <text:p><text:s/>Jogos / Games / Aplicativos pagos</text:p>
          </table:table-cell>
          <table:table-cell table:style-name="ce32" table:formula="of:=SUMIF([.$D$11:.$D$32];[.C45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58"/>
          <table:table-cell table:style-name="ce33" table:formula="of:=SUMIF([.$I$11:.$I$22];[.H45];[.$K$11:.$K$22])" office:value-type="float" office:value="0" calcext:value-type="float">
            <text:p><text:s/>R$ -  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1" office:value-type="string" calcext:value-type="string">
            <text:p>Saídas com amigos</text:p>
          </table:table-cell>
          <table:table-cell table:style-name="ce32" table:formula="of:=SUMIF([.$D$11:.$D$32];[.C4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4"/>
          <table:table-cell table:style-name="ce35" table:formula="of:=SUMIF([.$D$11:.$D$32];[.C4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2"/>
          <table:table-cell table:style-name="ce33" table:formula="of:=SUMIF([.$D$11:.$D$32];[.C4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3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Despesas</text:p>
          </table:table-cell>
          <table:table-cell table:style-name="ce20" office:value-type="string" calcext:value-type="string">
            <text:p>Presentes e datas comemorativas</text:p>
          </table:table-cell>
          <table:table-cell table:style-name="ce31" table:formula="of:=SUMIF([.$D$11:.$D$32];[.C5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50:.D56])" office:value-type="float" office:value="0" calcext:value-type="float">
            <text:p><text:s/>R$ -   </text:p>
          </table:table-cell>
          <table:table-cell table:style-name="ce21" office:value-type="string" calcext:value-type="string">
            <text:p>Doações / Contribuições</text:p>
          </table:table-cell>
          <table:table-cell table:style-name="ce32" table:formula="of:=SUMIF([.$D$11:.$D$32];[.C51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1" office:value-type="string" calcext:value-type="string">
            <text:p>Taxas bancárias / Pix por engano</text:p>
          </table:table-cell>
          <table:table-cell table:style-name="ce32" table:formula="of:=SUMIF([.$D$11:.$D$32];[.C5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1" office:value-type="string" calcext:value-type="string">
            <text:p>Compras online aleatórias</text:p>
          </table:table-cell>
          <table:table-cell table:style-name="ce32" table:formula="of:=SUMIF([.$D$11:.$D$32];[.C53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1" office:value-type="string" calcext:value-type="string">
            <text:p>Manutenção da casa (lâmpada, pilha, etc)</text:p>
          </table:table-cell>
          <table:table-cell table:style-name="ce32" table:formula="of:=SUMIF([.$D$11:.$D$32];[.C5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1" office:value-type="string" calcext:value-type="string">
            <text:p>Gastos pessoais (roupas, acessórios)</text:p>
          </table:table-cell>
          <table:table-cell table:style-name="ce32" table:formula="of:=SUMIF([.$D$11:.$D$32];[.C55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5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3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Transporte</text:p>
          </table:table-cell>
          <table:table-cell table:style-name="ce20" office:value-type="string" calcext:value-type="string">
            <text:p>Acessório</text:p>
          </table:table-cell>
          <table:table-cell table:style-name="ce31" table:formula="of:=SUMIF([.$D$11:.$D$32];[.C5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58:.D64])" office:value-type="float" office:value="0" calcext:value-type="float">
            <text:p><text:s/>R$ -   </text:p>
          </table:table-cell>
          <table:table-cell table:style-name="ce21" office:value-type="string" calcext:value-type="string">
            <text:p>Uber / Táxi</text:p>
          </table:table-cell>
          <table:table-cell table:style-name="ce32" table:formula="of:=SUMIF([.$D$11:.$D$32];[.C59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1" office:value-type="string" calcext:value-type="string">
            <text:p>Ônibus / Metrô</text:p>
          </table:table-cell>
          <table:table-cell table:style-name="ce32" table:formula="of:=SUMIF([.$D$11:.$D$32];[.C6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1" office:value-type="string" calcext:value-type="string">
            <text:p>Estacionamento</text:p>
          </table:table-cell>
          <table:table-cell table:style-name="ce32" table:formula="of:=SUMIF([.$D$11:.$D$32];[.C61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1" office:value-type="string" calcext:value-type="string">
            <text:p>Manutenção (óleo, pneu, etc)</text:p>
          </table:table-cell>
          <table:table-cell table:style-name="ce32" table:formula="of:=SUMIF([.$D$11:.$D$32];[.C6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1" office:value-type="string" calcext:value-type="string">
            <text:p>Multas / Documentação</text:p>
          </table:table-cell>
          <table:table-cell table:style-name="ce32" table:formula="of:=SUMIF([.$D$11:.$D$32];[.C63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6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3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Educação</text:p>
          </table:table-cell>
          <table:table-cell table:style-name="ce20" office:value-type="string" calcext:value-type="string">
            <text:p>Livros </text:p>
          </table:table-cell>
          <table:table-cell table:style-name="ce31" table:formula="of:=SUMIF([.$D$11:.$D$32];[.C6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66:.D72])" office:value-type="float" office:value="0" calcext:value-type="float">
            <text:p><text:s/>R$ -   </text:p>
          </table:table-cell>
          <table:table-cell table:style-name="ce21" office:value-type="string" calcext:value-type="string">
            <text:p>Cursos online (Udemy, Alura, etc)</text:p>
          </table:table-cell>
          <table:table-cell table:style-name="ce32" table:formula="of:=SUMIF([.$D$11:.$D$32];[.C6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1" office:value-type="string" calcext:value-type="string">
            <text:p>Material escolar / didático</text:p>
          </table:table-cell>
          <table:table-cell table:style-name="ce32" table:formula="of:=SUMIF([.$D$11:.$D$32];[.C6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1" office:value-type="string" calcext:value-type="string">
            <text:p>Apostilas</text:p>
          </table:table-cell>
          <table:table-cell table:style-name="ce32" table:formula="of:=SUMIF([.$D$11:.$D$32];[.C69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1" office:value-type="string" calcext:value-type="string">
            <text:p>Internet dedicada para estudos</text:p>
          </table:table-cell>
          <table:table-cell table:style-name="ce32" table:formula="of:=SUMIF([.$D$11:.$D$32];[.C7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1" office:value-type="string" calcext:value-type="string">
            <text:p>Plataformas de aprendizado </text:p>
          </table:table-cell>
          <table:table-cell table:style-name="ce32" table:formula="of:=SUMIF([.$D$11:.$D$32];[.C71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7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3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Saúde</text:p>
          </table:table-cell>
          <table:table-cell table:style-name="ce20" office:value-type="string" calcext:value-type="string">
            <text:p>Medicamentos</text:p>
          </table:table-cell>
          <table:table-cell table:style-name="ce31" table:formula="of:=SUMIF([.$D$11:.$D$32];[.C7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74:.D80])" office:value-type="float" office:value="0" calcext:value-type="float">
            <text:p><text:s/>R$ -   </text:p>
          </table:table-cell>
          <table:table-cell table:style-name="ce21" office:value-type="string" calcext:value-type="string">
            <text:p>Consultas médicas / exames</text:p>
          </table:table-cell>
          <table:table-cell table:style-name="ce32" table:formula="of:=SUMIF([.$D$11:.$D$32];[.C75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1" office:value-type="string" calcext:value-type="string">
            <text:p>Óculos / lentes</text:p>
          </table:table-cell>
          <table:table-cell table:style-name="ce32" table:formula="of:=SUMIF([.$D$11:.$D$32];[.C7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1" office:value-type="string" calcext:value-type="string">
            <text:p>Produtos de higiene e cuidados pessoais</text:p>
          </table:table-cell>
          <table:table-cell table:style-name="ce32" table:formula="of:=SUMIF([.$D$11:.$D$32];[.C7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1"/>
          <table:table-cell table:style-name="ce32" table:formula="of:=SUMIF([.$D$11:.$D$32];[.C7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1"/>
          <table:table-cell table:style-name="ce32" table:formula="of:=SUMIF([.$D$11:.$D$32];[.C79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80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3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Imprevistos</text:p>
          </table:table-cell>
          <table:table-cell table:style-name="ce20" office:value-type="string" calcext:value-type="string">
            <text:p>Emergência médica ou odontológica</text:p>
          </table:table-cell>
          <table:table-cell table:style-name="ce31" table:formula="of:=SUMIF([.$D$11:.$D$32];[.C82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/>
          <table:table-cell table:style-name="ce12" table:formula="of:=SUM([.D82:.D88])" office:value-type="float" office:value="0" calcext:value-type="float">
            <text:p><text:s/>R$ -   </text:p>
          </table:table-cell>
          <table:table-cell table:style-name="ce21" office:value-type="string" calcext:value-type="string">
            <text:p>Equipamento quebrado (celular, notebook)</text:p>
          </table:table-cell>
          <table:table-cell table:style-name="ce32" table:formula="of:=SUMIF([.$D$11:.$D$32];[.C83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1" office:value-type="string" calcext:value-type="string">
            <text:p>Perda de documentos / taxas</text:p>
          </table:table-cell>
          <table:table-cell table:style-name="ce32" table:formula="of:=SUMIF([.$D$11:.$D$32];[.C84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1" office:value-type="string" calcext:value-type="string">
            <text:p>Atrasos em contas com juros</text:p>
          </table:table-cell>
          <table:table-cell table:style-name="ce32" table:formula="of:=SUMIF([.$D$11:.$D$32];[.C85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1" office:value-type="string" calcext:value-type="string">
            <text:p>Conserto urgente (casa, carro, etc)</text:p>
          </table:table-cell>
          <table:table-cell table:style-name="ce32" table:formula="of:=SUMIF([.$D$11:.$D$32];[.C86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1" office:value-type="string" calcext:value-type="string">
            <text:p>Ajuda financeira a alguém (urgente)</text:p>
          </table:table-cell>
          <table:table-cell table:style-name="ce32" table:formula="of:=SUMIF([.$D$11:.$D$32];[.C87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25"/>
          <table:table-cell table:style-name="ce33" table:formula="of:=SUMIF([.$D$11:.$D$32];[.C88];[.$F$11:.$F$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16"/>
          <table:table-cell table:style-name="Default" table:number-columns-repeated="16368"/>
        </table:table-row>
        <table:table-row table:style-name="ro1">
          <table:table-cell/>
          <table:table-cell table:style-name="ce11" office:value-type="string" calcext:value-type="string">
            <text:p>Investimento</text:p>
          </table:table-cell>
          <table:table-cell table:style-name="ce20"/>
          <table:table-cell table:style-name="ce31" table:formula="of:=SUMIF([.C11:.C32];[.B90];[.F11:.F32])" office:value-type="float" office:value="0" calcext:value-type="float">
            <text:p><text:s/>R$ -   </text:p>
          </table:table-cell>
          <table:table-cell table:number-columns-repeated="12"/>
          <table:table-cell table:style-name="Default" table:number-columns-repeated="16368"/>
        </table:table-row>
        <table:table-row table:style-name="ro1" table:number-rows-repeated="1048485">
          <table:table-cell table:number-columns-repeated="16"/>
          <table:table-cell table:style-name="Default" table:number-columns-repeated="16368"/>
        </table:table-row>
        <table:table-row table:style-name="ro1">
          <table:table-cell table:number-columns-repeated="16"/>
          <table:table-cell table:style-name="Default" table:number-columns-repeated="16368"/>
        </table:table-row>
      </table:table>
      <table:table table:name="Anual" table:style-name="ta13">
        <office:forms form:automatic-focus="false" form:apply-design-mode="false"/>
        <table:table-column table:style-name="co51" table:default-cell-style-name="Default"/>
        <table:table-column table:style-name="co52" table:default-cell-style-name="ce96"/>
        <table:table-column table:style-name="co53" table:default-cell-style-name="ce106"/>
        <table:table-column table:style-name="co54" table:number-columns-repeated="2" table:default-cell-style-name="ce106"/>
        <table:table-column table:style-name="co25" table:default-cell-style-name="ce106"/>
        <table:table-column table:style-name="co55" table:default-cell-style-name="ce106"/>
        <table:table-column table:style-name="co54" table:default-cell-style-name="ce106"/>
        <table:table-column table:style-name="co56" table:default-cell-style-name="ce106"/>
        <table:table-column table:style-name="co8" table:default-cell-style-name="ce106"/>
        <table:table-column table:style-name="co54" table:default-cell-style-name="ce106"/>
        <table:table-column table:style-name="co57" table:default-cell-style-name="ce106"/>
        <table:table-column table:style-name="co31" table:default-cell-style-name="ce106"/>
        <table:table-column table:style-name="co54" table:default-cell-style-name="ce106"/>
        <table:table-column table:style-name="co58" table:default-cell-style-name="Default"/>
        <table:table-column table:style-name="co34"/>
        <table:table-column table:style-name="co20"/>
        <table:table-column table:style-name="co15" table:number-columns-repeated="16367"/>
        <table:table-row table:style-name="ro2">
          <table:table-cell table:number-columns-repeated="15"/>
          <table:table-cell table:style-name="Default" table:number-columns-repeated="16369"/>
        </table:table-row>
        <table:table-row table:style-name="ro1">
          <table:table-cell/>
          <table:table-cell table:style-name="ce97" office:value-type="string" calcext:value-type="string">
            <text:p>SUB-TOTAIS</text:p>
          </table:table-cell>
          <table:table-cell table:style-name="ce107" office:value-type="string" office:string-value="Jan" calcext:value-type="string">
            <text:p><text:s/>Jan </text:p>
          </table:table-cell>
          <table:table-cell table:style-name="ce119" office:value-type="string" office:string-value="Fev" calcext:value-type="string">
            <text:p><text:s/>Fev </text:p>
          </table:table-cell>
          <table:table-cell table:style-name="ce119" office:value-type="string" office:string-value="Mar" calcext:value-type="string">
            <text:p><text:s/>Mar </text:p>
          </table:table-cell>
          <table:table-cell table:style-name="ce119" office:value-type="string" office:string-value="Abr" calcext:value-type="string">
            <text:p><text:s/>Abr </text:p>
          </table:table-cell>
          <table:table-cell table:style-name="ce119" office:value-type="string" office:string-value="Mai" calcext:value-type="string">
            <text:p><text:s/>Mai </text:p>
          </table:table-cell>
          <table:table-cell table:style-name="ce119" office:value-type="string" office:string-value="Jun" calcext:value-type="string">
            <text:p><text:s/>Jun </text:p>
          </table:table-cell>
          <table:table-cell table:style-name="ce119" office:value-type="string" office:string-value="Jul" calcext:value-type="string">
            <text:p><text:s/>Jul </text:p>
          </table:table-cell>
          <table:table-cell table:style-name="ce119" office:value-type="string" office:string-value="Ago" calcext:value-type="string">
            <text:p><text:s/>Ago </text:p>
          </table:table-cell>
          <table:table-cell table:style-name="ce119" office:value-type="string" office:string-value="Set" calcext:value-type="string">
            <text:p><text:s/>Set </text:p>
          </table:table-cell>
          <table:table-cell table:style-name="ce119" office:value-type="string" office:string-value="Out" calcext:value-type="string">
            <text:p><text:s/>Out </text:p>
          </table:table-cell>
          <table:table-cell table:style-name="ce119" office:value-type="string" office:string-value="Nov" calcext:value-type="string">
            <text:p><text:s/>Nov </text:p>
          </table:table-cell>
          <table:table-cell table:style-name="ce145" office:value-type="string" office:string-value="Dez" calcext:value-type="string">
            <text:p><text:s/>Dez </text:p>
          </table:table-cell>
          <table:table-cell table:style-name="ce145" office:value-type="string" office:string-value="total" calcext:value-type="string">
            <text:p><text:s/>total 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98" office:value-type="string" calcext:value-type="string">
            <text:p>Entradas</text:p>
          </table:table-cell>
          <table:table-cell table:style-name="ce108" table:formula="of:=[$Jan.$F$3]" office:value-type="float" office:value="2246.57" calcext:value-type="float">
            <text:p><text:s/>R$ 2.246,57 </text:p>
          </table:table-cell>
          <table:table-cell table:style-name="ce120" table:formula="of:=[$Fev.$F$3]" office:value-type="float" office:value="2281.55" calcext:value-type="float">
            <text:p><text:s/>R$ 2.281,55 </text:p>
          </table:table-cell>
          <table:table-cell table:style-name="ce120" table:formula="of:=[$Mar.$F$3]" office:value-type="float" office:value="2080.77" calcext:value-type="float">
            <text:p><text:s/>R$ 2.080,77 </text:p>
          </table:table-cell>
          <table:table-cell table:style-name="ce120" table:formula="of:=[$Abr.$F$3]" office:value-type="float" office:value="2679.04" calcext:value-type="float">
            <text:p><text:s/>R$ 2.679,04 </text:p>
          </table:table-cell>
          <table:table-cell table:style-name="ce120" table:formula="of:=[$Mai.$F$3]" office:value-type="float" office:value="4523.74" calcext:value-type="float">
            <text:p><text:s/>R$ 4.523,74 </text:p>
          </table:table-cell>
          <table:table-cell table:style-name="ce120" table:formula="of:=[$Jun.$F$3]" office:value-type="float" office:value="2091.7" calcext:value-type="float">
            <text:p><text:s/>R$ 2.091,70 </text:p>
          </table:table-cell>
          <table:table-cell table:style-name="ce120" table:formula="of:=[$Jul.$F$3]" office:value-type="float" office:value="657.7" calcext:value-type="float">
            <text:p><text:s/>R$ 657,70 </text:p>
          </table:table-cell>
          <table:table-cell table:style-name="ce120" table:formula="of:=[$Ago.$F$3]" office:value-type="float" office:value="657.7" calcext:value-type="float">
            <text:p><text:s/>R$ 657,70 </text:p>
          </table:table-cell>
          <table:table-cell table:style-name="ce120" table:formula="of:=[$Set.$F$3]" office:value-type="float" office:value="657.7" calcext:value-type="float">
            <text:p><text:s/>R$ 657,70 </text:p>
          </table:table-cell>
          <table:table-cell table:style-name="ce120" table:formula="of:=[$Out.$F$3]" office:value-type="float" office:value="657.7" calcext:value-type="float">
            <text:p><text:s/>R$ 657,70 </text:p>
          </table:table-cell>
          <table:table-cell table:style-name="ce120" table:formula="of:=[$Nov.$F$3]" office:value-type="float" office:value="657.7" calcext:value-type="float">
            <text:p><text:s/>R$ 657,70 </text:p>
          </table:table-cell>
          <table:table-cell table:style-name="ce146" table:formula="of:=[$Dez.$F$3]" office:value-type="float" office:value="657.7" calcext:value-type="float">
            <text:p><text:s/>R$ 657,70 </text:p>
          </table:table-cell>
          <table:table-cell table:style-name="ce146" table:formula="of:=SUM([.C3:.N3])" office:value-type="float" office:value="19849.57" calcext:value-type="float">
            <text:p><text:s/>R$ 19.849,57 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99" office:value-type="string" calcext:value-type="string">
            <text:p>Saidas Variáveis</text:p>
          </table:table-cell>
          <table:table-cell table:style-name="ce109" table:formula="of:=[$Jan.$F$4]" office:value-type="float" office:value="568.02" calcext:value-type="float">
            <text:p><text:s/>R$ 568,02 </text:p>
          </table:table-cell>
          <table:table-cell table:style-name="ce109" table:formula="of:=[$Fev.$F$4]" office:value-type="float" office:value="561.58" calcext:value-type="float">
            <text:p><text:s/>R$ 561,58 </text:p>
          </table:table-cell>
          <table:table-cell table:style-name="ce109" table:formula="of:=[$Mar.$F$4]" office:value-type="float" office:value="1203.63" calcext:value-type="float">
            <text:p><text:s/>R$ 1.203,63 </text:p>
          </table:table-cell>
          <table:table-cell table:style-name="ce109" table:formula="of:=[$Abr.$F$4]" office:value-type="float" office:value="723.11" calcext:value-type="float">
            <text:p><text:s/>R$ 723,11 </text:p>
          </table:table-cell>
          <table:table-cell table:style-name="ce109" table:formula="of:=[$Mai.$F$4]" office:value-type="float" office:value="3935.01" calcext:value-type="float">
            <text:p><text:s/>R$ 3.935,01 </text:p>
          </table:table-cell>
          <table:table-cell table:style-name="ce109" table:formula="of:=[$Jun.$F$4]" office:value-type="float" office:value="350" calcext:value-type="float">
            <text:p><text:s/>R$ 350,00 </text:p>
          </table:table-cell>
          <table:table-cell table:style-name="ce109" table:formula="of:=[$Jul.$F$4]" office:value-type="float" office:value="0" calcext:value-type="float">
            <text:p><text:s/>R$ -   </text:p>
          </table:table-cell>
          <table:table-cell table:style-name="ce109" table:formula="of:=[$Ago.$F$4]" office:value-type="float" office:value="0" calcext:value-type="float">
            <text:p><text:s/>R$ -   </text:p>
          </table:table-cell>
          <table:table-cell table:style-name="ce109" table:formula="of:=[$Set.$F$4]" office:value-type="float" office:value="0" calcext:value-type="float">
            <text:p><text:s/>R$ -   </text:p>
          </table:table-cell>
          <table:table-cell table:style-name="ce109" table:formula="of:=[$Out.$F$4]" office:value-type="float" office:value="0" calcext:value-type="float">
            <text:p><text:s/>R$ -   </text:p>
          </table:table-cell>
          <table:table-cell table:style-name="ce109" table:formula="of:=[$Nov.$F$4]" office:value-type="float" office:value="0" calcext:value-type="float">
            <text:p><text:s/>R$ -   </text:p>
          </table:table-cell>
          <table:table-cell table:style-name="ce147" table:formula="of:=[$Dez.$F$4]" office:value-type="float" office:value="0" calcext:value-type="float">
            <text:p><text:s/>R$ -   </text:p>
          </table:table-cell>
          <table:table-cell table:style-name="ce147" table:formula="of:=SUM([.C4:.N4])" office:value-type="float" office:value="7341.35" calcext:value-type="float">
            <text:p><text:s/>R$ 7.341,35 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99" office:value-type="string" calcext:value-type="string">
            <text:p>Saidas Fixas</text:p>
          </table:table-cell>
          <table:table-cell table:style-name="ce110" table:formula="of:=[$Jan.$F$6]" office:value-type="float" office:value="337" calcext:value-type="float">
            <text:p><text:s/>R$ 337,00 </text:p>
          </table:table-cell>
          <table:table-cell table:style-name="ce110" table:formula="of:=[$Fev.$F$6]" office:value-type="float" office:value="362.2" calcext:value-type="float">
            <text:p><text:s/>R$ 362,20 </text:p>
          </table:table-cell>
          <table:table-cell table:style-name="ce110" table:formula="of:=[$Mar.$F$6]" office:value-type="float" office:value="434.6" calcext:value-type="float">
            <text:p><text:s/>R$ 434,60 </text:p>
          </table:table-cell>
          <table:table-cell table:style-name="ce110" table:formula="of:=[$Abr.$F$6]" office:value-type="float" office:value="516.69" calcext:value-type="float">
            <text:p><text:s/>R$ 516,69 </text:p>
          </table:table-cell>
          <table:table-cell table:style-name="ce110" table:formula="of:=[$Mai.$F$6]" office:value-type="float" office:value="597.03" calcext:value-type="float">
            <text:p><text:s/>R$ 597,03 </text:p>
          </table:table-cell>
          <table:table-cell table:style-name="ce110" table:formula="of:=[$Jun.$F$6]" office:value-type="float" office:value="1084" calcext:value-type="float">
            <text:p><text:s/>R$ 1.084,00 </text:p>
          </table:table-cell>
          <table:table-cell table:style-name="ce110" table:formula="of:=[$Jul.$F$6]" office:value-type="float" office:value="0" calcext:value-type="float">
            <text:p><text:s/>R$ -   </text:p>
          </table:table-cell>
          <table:table-cell table:style-name="ce110" table:formula="of:=[$Ago.$F$6]" office:value-type="float" office:value="0" calcext:value-type="float">
            <text:p><text:s/>R$ -   </text:p>
          </table:table-cell>
          <table:table-cell table:style-name="ce110" table:formula="of:=[$Set.$F$6]" office:value-type="float" office:value="0" calcext:value-type="float">
            <text:p><text:s/>R$ -   </text:p>
          </table:table-cell>
          <table:table-cell table:style-name="ce110" table:formula="of:=[$Out.$F$6]" office:value-type="float" office:value="0" calcext:value-type="float">
            <text:p><text:s/>R$ -   </text:p>
          </table:table-cell>
          <table:table-cell table:style-name="ce110" table:formula="of:=[$Nov.$F$6]" office:value-type="float" office:value="0" calcext:value-type="float">
            <text:p><text:s/>R$ -   </text:p>
          </table:table-cell>
          <table:table-cell table:style-name="ce148" table:formula="of:=[$Dez.$F$6]" office:value-type="float" office:value="0" calcext:value-type="float">
            <text:p><text:s/>R$ -   </text:p>
          </table:table-cell>
          <table:table-cell table:style-name="ce148" table:formula="of:=SUM([.C5:.N5])" office:value-type="float" office:value="3331.52" calcext:value-type="float">
            <text:p><text:s/>R$ 3.331,52 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99" office:value-type="string" calcext:value-type="string">
            <text:p>dinheiro guardado</text:p>
          </table:table-cell>
          <table:table-cell table:style-name="ce111" table:formula="of:=[$Jan.$L$3]" office:value-type="float" office:value="0" calcext:value-type="float">
            <text:p><text:s/>R$ -   </text:p>
          </table:table-cell>
          <table:table-cell table:style-name="ce111" table:formula="of:=[$Fev.$L$3]" office:value-type="float" office:value="0" calcext:value-type="float">
            <text:p><text:s/>R$ -   </text:p>
          </table:table-cell>
          <table:table-cell table:style-name="ce111" table:formula="of:=[$Mar.$L$3]" office:value-type="float" office:value="0" calcext:value-type="float">
            <text:p><text:s/>R$ -   </text:p>
          </table:table-cell>
          <table:table-cell table:style-name="ce111" table:formula="of:=[$Abr.$L$3]" office:value-type="float" office:value="1343" calcext:value-type="float">
            <text:p><text:s/>R$ 1.343,00 </text:p>
          </table:table-cell>
          <table:table-cell table:style-name="ce111" table:formula="of:=[$Mai.$L$3]" office:value-type="float" office:value="2503" calcext:value-type="float">
            <text:p><text:s/>R$ 2.503,00 </text:p>
          </table:table-cell>
          <table:table-cell table:style-name="ce111" table:formula="of:=[$Jun.$L$3]" office:value-type="float" office:value="2503" calcext:value-type="float">
            <text:p><text:s/>R$ 2.503,00 </text:p>
          </table:table-cell>
          <table:table-cell table:style-name="ce111" table:formula="of:=[$Jul.$L$3]" office:value-type="float" office:value="0" calcext:value-type="float">
            <text:p><text:s/>R$ -   </text:p>
          </table:table-cell>
          <table:table-cell table:style-name="ce111" table:formula="of:=[$Ago.$L$3]" office:value-type="float" office:value="0" calcext:value-type="float">
            <text:p><text:s/>R$ -   </text:p>
          </table:table-cell>
          <table:table-cell table:style-name="ce111" table:formula="of:=[$Set.$L$3]" office:value-type="float" office:value="0" calcext:value-type="float">
            <text:p><text:s/>R$ -   </text:p>
          </table:table-cell>
          <table:table-cell table:style-name="ce111" table:formula="of:=[$Out.$L$3]" office:value-type="float" office:value="0" calcext:value-type="float">
            <text:p><text:s/>R$ -   </text:p>
          </table:table-cell>
          <table:table-cell table:style-name="ce111" table:formula="of:=[$Nov.$L$3]" office:value-type="float" office:value="0" calcext:value-type="float">
            <text:p><text:s/>R$ -   </text:p>
          </table:table-cell>
          <table:table-cell table:style-name="ce149" table:formula="of:=[$Dez.$L$3]" office:value-type="float" office:value="0" calcext:value-type="float">
            <text:p><text:s/>R$ -   </text:p>
          </table:table-cell>
          <table:table-cell table:style-name="ce158" table:formula="of:=SUM([.C6:.N6])" office:value-type="float" office:value="6349" calcext:value-type="float">
            <text:p><text:s/>R$ 6.349,00 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99" office:value-type="string" calcext:value-type="string">
            <text:p>dinheiro para investimentos</text:p>
          </table:table-cell>
          <table:table-cell table:style-name="ce112" table:formula="of:=[$Jan.$L$4]" office:value-type="float" office:value="0" calcext:value-type="float">
            <text:p><text:s/>R$ -   </text:p>
          </table:table-cell>
          <table:table-cell table:style-name="ce112" table:formula="of:=[$Fev.$L$4]" office:value-type="float" office:value="0" calcext:value-type="float">
            <text:p><text:s/>R$ -   </text:p>
          </table:table-cell>
          <table:table-cell table:style-name="ce112" table:formula="of:=[$Mar.$L$4]" office:value-type="float" office:value="0" calcext:value-type="float">
            <text:p><text:s/>R$ -   </text:p>
          </table:table-cell>
          <table:table-cell table:style-name="ce112" table:formula="of:=[$Abr.$L$4]" office:value-type="float" office:value="983.93" calcext:value-type="float">
            <text:p><text:s/>R$ 983,93 </text:p>
          </table:table-cell>
          <table:table-cell table:style-name="ce112" table:formula="of:=[$Mai.$L$4]" office:value-type="float" office:value="0" calcext:value-type="float">
            <text:p><text:s/>R$ -   </text:p>
          </table:table-cell>
          <table:table-cell table:style-name="ce112" table:formula="of:=[$Jun.$L$4]" office:value-type="float" office:value="0" calcext:value-type="float">
            <text:p><text:s/>R$ -   </text:p>
          </table:table-cell>
          <table:table-cell table:style-name="ce112" table:formula="of:=[$Jul.$L$4]" office:value-type="float" office:value="0" calcext:value-type="float">
            <text:p><text:s/>R$ -   </text:p>
          </table:table-cell>
          <table:table-cell table:style-name="ce112" table:formula="of:=[$Ago.$L$4]" office:value-type="float" office:value="0" calcext:value-type="float">
            <text:p><text:s/>R$ -   </text:p>
          </table:table-cell>
          <table:table-cell table:style-name="ce112" table:formula="of:=[$Set.$L$4]" office:value-type="float" office:value="0" calcext:value-type="float">
            <text:p><text:s/>R$ -   </text:p>
          </table:table-cell>
          <table:table-cell table:style-name="ce112" table:formula="of:=[$Out.$L$4]" office:value-type="float" office:value="0" calcext:value-type="float">
            <text:p><text:s/>R$ -   </text:p>
          </table:table-cell>
          <table:table-cell table:style-name="ce112" table:formula="of:=[$Nov.$L$4]" office:value-type="float" office:value="0" calcext:value-type="float">
            <text:p><text:s/>R$ -   </text:p>
          </table:table-cell>
          <table:table-cell table:style-name="ce150" table:formula="of:=[$Dez.$L$4]" office:value-type="float" office:value="0" calcext:value-type="float">
            <text:p><text:s/>R$ -   </text:p>
          </table:table-cell>
          <table:table-cell table:style-name="ce159" table:formula="of:=SUM([.C7:.N7])" office:value-type="float" office:value="983.93" calcext:value-type="float">
            <text:p><text:s/>R$ 983,93 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99" office:value-type="string" calcext:value-type="string">
            <text:p>Saidas Totais</text:p>
          </table:table-cell>
          <table:table-cell table:style-name="ce113" table:formula="of:=[.C4]+[.C5]" office:value-type="float" office:value="905.02" calcext:value-type="float">
            <text:p><text:s/>R$ 905,02 </text:p>
          </table:table-cell>
          <table:table-cell table:style-name="ce113" table:formula="of:=[.D4]+[.D5]" office:value-type="float" office:value="923.78" calcext:value-type="float">
            <text:p><text:s/>R$ 923,78 </text:p>
          </table:table-cell>
          <table:table-cell table:style-name="ce113" table:formula="of:=[.E4]+[.E5]" office:value-type="float" office:value="1638.23" calcext:value-type="float">
            <text:p><text:s/>R$ 1.638,23 </text:p>
          </table:table-cell>
          <table:table-cell table:style-name="ce113" table:formula="of:=[.F4]+[.F5]" office:value-type="float" office:value="1239.8" calcext:value-type="float">
            <text:p><text:s/>R$ 1.239,80 </text:p>
          </table:table-cell>
          <table:table-cell table:style-name="ce113" table:formula="of:=[.G4]+[.G5]" office:value-type="float" office:value="4532.04" calcext:value-type="float">
            <text:p><text:s/>R$ 4.532,04 </text:p>
          </table:table-cell>
          <table:table-cell table:style-name="ce113" table:formula="of:=[.H4]+[.H5]" office:value-type="float" office:value="1434" calcext:value-type="float">
            <text:p><text:s/>R$ 1.434,00 </text:p>
          </table:table-cell>
          <table:table-cell table:style-name="ce113" table:formula="of:=[.I4]+[.I5]" office:value-type="float" office:value="0" calcext:value-type="float">
            <text:p><text:s/>R$ -   </text:p>
          </table:table-cell>
          <table:table-cell table:style-name="ce113" table:formula="of:=[.J4]+[.J5]" office:value-type="float" office:value="0" calcext:value-type="float">
            <text:p><text:s/>R$ -   </text:p>
          </table:table-cell>
          <table:table-cell table:style-name="ce113" table:formula="of:=[.K4]+[.K5]" office:value-type="float" office:value="0" calcext:value-type="float">
            <text:p><text:s/>R$ -   </text:p>
          </table:table-cell>
          <table:table-cell table:style-name="ce113" table:formula="of:=[.L4]+[.L5]" office:value-type="float" office:value="0" calcext:value-type="float">
            <text:p><text:s/>R$ -   </text:p>
          </table:table-cell>
          <table:table-cell table:style-name="ce113" table:formula="of:=[.M4]+[.M5]" office:value-type="float" office:value="0" calcext:value-type="float">
            <text:p><text:s/>R$ -   </text:p>
          </table:table-cell>
          <table:table-cell table:style-name="ce151" table:formula="of:=[.N4]+[.N5]" office:value-type="float" office:value="0" calcext:value-type="float">
            <text:p><text:s/>R$ -   </text:p>
          </table:table-cell>
          <table:table-cell table:style-name="ce151" table:formula="of:=SUM([.C8:.N8])" office:value-type="float" office:value="10672.87" calcext:value-type="float">
            <text:p><text:s/>R$ 10.672,87 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99" office:value-type="string" calcext:value-type="string">
            <text:p>Saldo</text:p>
          </table:table-cell>
          <table:table-cell table:style-name="ce114" table:formula="of:=[.C3]-[.C8]" office:value-type="float" office:value="1341.55" calcext:value-type="float">
            <text:p><text:s/>R$ 1.341,55 </text:p>
          </table:table-cell>
          <table:table-cell table:style-name="ce114" table:formula="of:=[.D3]-[.D8]" office:value-type="float" office:value="1357.77" calcext:value-type="float">
            <text:p><text:s/>R$ 1.357,77 </text:p>
          </table:table-cell>
          <table:table-cell table:style-name="ce114" table:formula="of:=[.E3]-[.E8]" office:value-type="float" office:value="442.54" calcext:value-type="float">
            <text:p><text:s/>R$ 442,54 </text:p>
          </table:table-cell>
          <table:table-cell table:style-name="ce114" table:formula="of:=[.F3]-[.F8]" office:value-type="float" office:value="1439.24" calcext:value-type="float">
            <text:p><text:s/>R$ 1.439,24 </text:p>
          </table:table-cell>
          <table:table-cell table:style-name="ce114" table:formula="of:=[.G3]-[.G8]" office:value-type="float" office:value="-8.30000000000018" calcext:value-type="float">
            <text:p>-R$ 8,30 </text:p>
          </table:table-cell>
          <table:table-cell table:style-name="ce114" table:formula="of:=[.H3]-[.H8]" office:value-type="float" office:value="657.7" calcext:value-type="float">
            <text:p><text:s/>R$ 657,70 </text:p>
          </table:table-cell>
          <table:table-cell table:style-name="ce114" table:formula="of:=[.I3]-[.I8]" office:value-type="float" office:value="657.7" calcext:value-type="float">
            <text:p><text:s/>R$ 657,70 </text:p>
          </table:table-cell>
          <table:table-cell table:style-name="ce114" table:formula="of:=[.J3]-[.J8]" office:value-type="float" office:value="657.7" calcext:value-type="float">
            <text:p><text:s/>R$ 657,70 </text:p>
          </table:table-cell>
          <table:table-cell table:style-name="ce114" table:formula="of:=[.K3]-[.K8]" office:value-type="float" office:value="657.7" calcext:value-type="float">
            <text:p><text:s/>R$ 657,70 </text:p>
          </table:table-cell>
          <table:table-cell table:style-name="ce114" table:formula="of:=[.L3]-[.L8]" office:value-type="float" office:value="657.7" calcext:value-type="float">
            <text:p><text:s/>R$ 657,70 </text:p>
          </table:table-cell>
          <table:table-cell table:style-name="ce114" table:formula="of:=[.M3]-[.M8]" office:value-type="float" office:value="657.7" calcext:value-type="float">
            <text:p><text:s/>R$ 657,70 </text:p>
          </table:table-cell>
          <table:table-cell table:style-name="ce152" table:formula="of:=[.N3]-[.N8]" office:value-type="float" office:value="657.7" calcext:value-type="float">
            <text:p><text:s/>R$ 657,70 </text:p>
          </table:table-cell>
          <table:table-cell table:style-name="ce152" table:formula="of:=[.N9]" office:value-type="float" office:value="657.7" calcext:value-type="float">
            <text:p><text:s/>R$ 657,70 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100" office:value-type="string" calcext:value-type="string">
            <text:p>Fotografia</text:p>
          </table:table-cell>
          <table:table-cell table:style-name="ce115" table:formula="of:=[$Jan.D4]" office:value-type="float" office:value="103.33" calcext:value-type="float">
            <text:p><text:s/>R$ 103,33 </text:p>
          </table:table-cell>
          <table:table-cell table:style-name="ce115" table:formula="of:=[$Fev.D4]" office:value-type="float" office:value="200" calcext:value-type="float">
            <text:p><text:s/>R$ 200,00 </text:p>
          </table:table-cell>
          <table:table-cell table:style-name="ce115" table:formula="of:=[$Mar.D4]" office:value-type="float" office:value="0" calcext:value-type="float">
            <text:p><text:s/>R$ -   </text:p>
          </table:table-cell>
          <table:table-cell table:style-name="ce115" table:formula="of:=[$Abr.D4]" office:value-type="float" office:value="136.5" calcext:value-type="float">
            <text:p><text:s/>R$ 136,50 </text:p>
          </table:table-cell>
          <table:table-cell table:style-name="ce115" table:formula="of:=[$Mai.D4]" office:value-type="float" office:value="20" calcext:value-type="float">
            <text:p><text:s/>R$ 20,00 </text:p>
          </table:table-cell>
          <table:table-cell table:style-name="ce115" table:formula="of:=[$Jun.D4]" office:value-type="float" office:value="0" calcext:value-type="float">
            <text:p><text:s/>R$ -   </text:p>
          </table:table-cell>
          <table:table-cell table:style-name="ce115" table:formula="of:=[$Jul.D4]" office:value-type="float" office:value="0" calcext:value-type="float">
            <text:p><text:s/>R$ -   </text:p>
          </table:table-cell>
          <table:table-cell table:style-name="ce115" table:formula="of:=[$Ago.D4]" office:value-type="float" office:value="0" calcext:value-type="float">
            <text:p><text:s/>R$ -   </text:p>
          </table:table-cell>
          <table:table-cell table:style-name="ce115" table:formula="of:=[$Set.D4]" office:value-type="float" office:value="0" calcext:value-type="float">
            <text:p><text:s/>R$ -   </text:p>
          </table:table-cell>
          <table:table-cell table:style-name="ce115" table:formula="of:=[$Out.D4]" office:value-type="float" office:value="0" calcext:value-type="float">
            <text:p><text:s/>R$ -   </text:p>
          </table:table-cell>
          <table:table-cell table:style-name="ce115" table:formula="of:=[$Nov.D4]" office:value-type="float" office:value="0" calcext:value-type="float">
            <text:p><text:s/>R$ -   </text:p>
          </table:table-cell>
          <table:table-cell table:style-name="ce153" table:formula="of:=[$Dez.D4]" office:value-type="float" office:value="0" calcext:value-type="float">
            <text:p><text:s/>R$ -   </text:p>
          </table:table-cell>
          <table:table-cell table:style-name="ce153" table:formula="of:=SUM([.C10:.N10])" office:value-type="float" office:value="459.83" calcext:value-type="float">
            <text:p><text:s/>R$ 459,83 </text:p>
          </table:table-cell>
          <table:table-cell table:style-name="Default" table:number-columns-repeated="16369"/>
        </table:table-row>
        <table:table-row table:style-name="ro1">
          <table:table-cell table:number-columns-repeated="15"/>
          <table:table-cell table:style-name="Default" table:number-columns-repeated="16369"/>
        </table:table-row>
        <table:table-row table:style-name="ro3">
          <table:table-cell table:number-columns-repeated="15"/>
          <table:table-cell table:style-name="Default" table:number-columns-repeated="16369"/>
        </table:table-row>
        <table:table-row table:style-name="ro4">
          <table:table-cell table:number-columns-repeated="11"/>
          <table:table-cell table:formula="of:=12*25.82" office:value-type="float" office:value="309.84" calcext:value-type="float">
            <text:p><text:s/>R$ 309,84 </text:p>
          </table:table-cell>
          <table:table-cell table:number-columns-repeated="3"/>
          <table:table-cell table:style-name="Default" table:number-columns-repeated="16369"/>
        </table:table-row>
        <table:table-row table:style-name="ro3">
          <table:table-cell table:number-columns-repeated="15"/>
          <table:table-cell table:style-name="Default" table:number-columns-repeated="16369"/>
        </table:table-row>
        <table:table-row table:style-name="ro1">
          <table:table-cell/>
          <table:table-cell table:style-name="ce97" office:value-type="string" calcext:value-type="string">
            <text:p>SUB-TOTAIS</text:p>
          </table:table-cell>
          <table:table-cell table:style-name="ce107" office:value-type="string" office:string-value="Jan" calcext:value-type="string">
            <text:p><text:s/>Jan </text:p>
          </table:table-cell>
          <table:table-cell table:style-name="ce119" office:value-type="string" office:string-value="Fev" calcext:value-type="string">
            <text:p><text:s/>Fev </text:p>
          </table:table-cell>
          <table:table-cell table:style-name="ce119" office:value-type="string" office:string-value="Mar" calcext:value-type="string">
            <text:p><text:s/>Mar </text:p>
          </table:table-cell>
          <table:table-cell table:style-name="ce119" office:value-type="string" office:string-value="Abr" calcext:value-type="string">
            <text:p><text:s/>Abr </text:p>
          </table:table-cell>
          <table:table-cell table:style-name="ce119" office:value-type="string" office:string-value="Mai" calcext:value-type="string">
            <text:p><text:s/>Mai </text:p>
          </table:table-cell>
          <table:table-cell table:style-name="ce119" office:value-type="string" office:string-value="Jun" calcext:value-type="string">
            <text:p><text:s/>Jun </text:p>
          </table:table-cell>
          <table:table-cell table:style-name="ce119" office:value-type="string" office:string-value="Jul" calcext:value-type="string">
            <text:p><text:s/>Jul </text:p>
          </table:table-cell>
          <table:table-cell table:style-name="ce119" office:value-type="string" office:string-value="Ago" calcext:value-type="string">
            <text:p><text:s/>Ago </text:p>
          </table:table-cell>
          <table:table-cell table:style-name="ce119" office:value-type="string" office:string-value="Set" calcext:value-type="string">
            <text:p><text:s/>Set </text:p>
          </table:table-cell>
          <table:table-cell table:style-name="ce119" office:value-type="string" office:string-value="Out" calcext:value-type="string">
            <text:p><text:s/>Out </text:p>
          </table:table-cell>
          <table:table-cell table:style-name="ce119" office:value-type="string" office:string-value="Nov" calcext:value-type="string">
            <text:p><text:s/>Nov </text:p>
          </table:table-cell>
          <table:table-cell table:style-name="ce145" office:value-type="string" office:string-value="Dez" calcext:value-type="string">
            <text:p><text:s/>Dez </text:p>
          </table:table-cell>
          <table:table-cell table:style-name="ce145" office:value-type="string" office:string-value="TOTAL" calcext:value-type="string">
            <text:p><text:s/>TOTAL 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101" office:value-type="string" calcext:value-type="string">
            <text:p>Alimentação</text:p>
          </table:table-cell>
          <table:table-cell table:style-name="ce116" table:formula="of:=[$Jan.$B$36]" office:value-type="float" office:value="0" calcext:value-type="float">
            <text:p><text:s/>R$ -   </text:p>
          </table:table-cell>
          <table:table-cell table:style-name="ce121" table:formula="of:=[$Fev.$B$36]" office:value-type="float" office:value="0" calcext:value-type="float">
            <text:p><text:s/>R$ -   </text:p>
          </table:table-cell>
          <table:table-cell table:style-name="ce116" table:formula="of:=[$Mar.$B$36]" office:value-type="float" office:value="12" calcext:value-type="float">
            <text:p><text:s/>R$ 12,00 </text:p>
          </table:table-cell>
          <table:table-cell table:style-name="ce121" table:formula="of:=[$Abr.$B$36]" office:value-type="float" office:value="79.46" calcext:value-type="float">
            <text:p><text:s/>R$ 79,46 </text:p>
          </table:table-cell>
          <table:table-cell table:style-name="ce116" table:formula="of:=[$Mai.$B$36]" office:value-type="float" office:value="0" calcext:value-type="float">
            <text:p><text:s/>R$ -   </text:p>
          </table:table-cell>
          <table:table-cell table:style-name="ce121" table:formula="of:=[$Jun.$B$36]" office:value-type="float" office:value="0" calcext:value-type="float">
            <text:p><text:s/>R$ -   </text:p>
          </table:table-cell>
          <table:table-cell table:style-name="ce116" table:formula="of:=[$Jul.$B$36]" office:value-type="float" office:value="0" calcext:value-type="float">
            <text:p><text:s/>R$ -   </text:p>
          </table:table-cell>
          <table:table-cell table:style-name="ce121" table:formula="of:=[$Ago.$B$36]" office:value-type="float" office:value="0" calcext:value-type="float">
            <text:p><text:s/>R$ -   </text:p>
          </table:table-cell>
          <table:table-cell table:style-name="ce116" table:formula="of:=[$Set.$B$36]" office:value-type="float" office:value="0" calcext:value-type="float">
            <text:p><text:s/>R$ -   </text:p>
          </table:table-cell>
          <table:table-cell table:style-name="ce121" table:formula="of:=[$Out.$B$36]" office:value-type="float" office:value="0" calcext:value-type="float">
            <text:p><text:s/>R$ -   </text:p>
          </table:table-cell>
          <table:table-cell table:style-name="ce116" table:formula="of:=[$Nov.$B$36]" office:value-type="float" office:value="0" calcext:value-type="float">
            <text:p><text:s/>R$ -   </text:p>
          </table:table-cell>
          <table:table-cell table:style-name="ce154" table:formula="of:=[$Dez.$B$36]" office:value-type="float" office:value="0" calcext:value-type="float">
            <text:p><text:s/>R$ -   </text:p>
          </table:table-cell>
          <table:table-cell table:style-name="ce160" table:formula="of:=SUM([.C16:.N16])" office:value-type="float" office:value="91.46" calcext:value-type="float">
            <text:p><text:s/>R$ 91,46 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102" office:value-type="string" calcext:value-type="string">
            <text:p>Lazer</text:p>
          </table:table-cell>
          <table:table-cell table:style-name="ce117" table:formula="of:=[$Jan.$B$42]" office:value-type="float" office:value="23.69" calcext:value-type="float">
            <text:p><text:s/>R$ 23,69 </text:p>
          </table:table-cell>
          <table:table-cell table:style-name="ce122" table:formula="of:=[$Fev.$B$42]" office:value-type="float" office:value="39" calcext:value-type="float">
            <text:p><text:s/>R$ 39,00 </text:p>
          </table:table-cell>
          <table:table-cell table:style-name="ce117" table:formula="of:=[$Mar.$B$42]" office:value-type="float" office:value="47.88" calcext:value-type="float">
            <text:p><text:s/>R$ 47,88 </text:p>
          </table:table-cell>
          <table:table-cell table:style-name="ce122" table:formula="of:=[$Abr.$B$42]" office:value-type="float" office:value="190.31" calcext:value-type="float">
            <text:p><text:s/>R$ 190,31 </text:p>
          </table:table-cell>
          <table:table-cell table:style-name="ce117" table:formula="of:=[$Mai.$B$42]" office:value-type="float" office:value="69.7" calcext:value-type="float">
            <text:p><text:s/>R$ 69,70 </text:p>
          </table:table-cell>
          <table:table-cell table:style-name="ce122" table:formula="of:=[$Jun.$B$42]" office:value-type="float" office:value="0" calcext:value-type="float">
            <text:p><text:s/>R$ -   </text:p>
          </table:table-cell>
          <table:table-cell table:style-name="ce117" table:formula="of:=[$Jul.$B$42]" office:value-type="float" office:value="0" calcext:value-type="float">
            <text:p><text:s/>R$ -   </text:p>
          </table:table-cell>
          <table:table-cell table:style-name="ce122" table:formula="of:=[$Ago.$B$42]" office:value-type="float" office:value="0" calcext:value-type="float">
            <text:p><text:s/>R$ -   </text:p>
          </table:table-cell>
          <table:table-cell table:style-name="ce117" table:formula="of:=[$Set.$B$42]" office:value-type="float" office:value="0" calcext:value-type="float">
            <text:p><text:s/>R$ -   </text:p>
          </table:table-cell>
          <table:table-cell table:style-name="ce122" table:formula="of:=[$Out.$B$42]" office:value-type="float" office:value="0" calcext:value-type="float">
            <text:p><text:s/>R$ -   </text:p>
          </table:table-cell>
          <table:table-cell table:style-name="ce117" table:formula="of:=[$Nov.$B$42]" office:value-type="float" office:value="0" calcext:value-type="float">
            <text:p><text:s/>R$ -   </text:p>
          </table:table-cell>
          <table:table-cell table:style-name="ce155" table:formula="of:=[$Dez.$B$42]" office:value-type="float" office:value="0" calcext:value-type="float">
            <text:p><text:s/>R$ -   </text:p>
          </table:table-cell>
          <table:table-cell table:style-name="ce161" table:formula="of:=SUM([.C17:.N17])" office:value-type="float" office:value="370.58" calcext:value-type="float">
            <text:p><text:s/>R$ 370,58 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102" office:value-type="string" calcext:value-type="string">
            <text:p>Despesas</text:p>
          </table:table-cell>
          <table:table-cell table:style-name="ce117" table:formula="of:=[$Jan.$B$51]" office:value-type="float" office:value="93.95" calcext:value-type="float">
            <text:p><text:s/>R$ 93,95 </text:p>
          </table:table-cell>
          <table:table-cell table:style-name="ce122" table:formula="of:=[$Fev.B51]" office:value-type="float" office:value="226.24" calcext:value-type="float">
            <text:p><text:s/>R$ 226,24 </text:p>
          </table:table-cell>
          <table:table-cell table:style-name="ce117" table:formula="of:=[$Mar.$B$51]" office:value-type="float" office:value="19.3" calcext:value-type="float">
            <text:p><text:s/>R$ 19,30 </text:p>
          </table:table-cell>
          <table:table-cell table:style-name="ce122" table:formula="of:=[$Abr.$B$51]" office:value-type="float" office:value="153.2" calcext:value-type="float">
            <text:p><text:s/>R$ 153,20 </text:p>
          </table:table-cell>
          <table:table-cell table:style-name="ce117" table:formula="of:=[$Mai.$B$51]" office:value-type="float" office:value="76.9" calcext:value-type="float">
            <text:p><text:s/>R$ 76,90 </text:p>
          </table:table-cell>
          <table:table-cell table:style-name="ce122" table:formula="of:=[$Jun.$B$51]" office:value-type="float" office:value="0" calcext:value-type="float">
            <text:p><text:s/>R$ -   </text:p>
          </table:table-cell>
          <table:table-cell table:style-name="ce117" table:formula="of:=[$Jul.$B$51]" office:value-type="float" office:value="0" calcext:value-type="float">
            <text:p><text:s/>R$ -   </text:p>
          </table:table-cell>
          <table:table-cell table:style-name="ce122" table:formula="of:=[$Ago.$B$51]" office:value-type="float" office:value="0" calcext:value-type="float">
            <text:p><text:s/>R$ -   </text:p>
          </table:table-cell>
          <table:table-cell table:style-name="ce117" table:formula="of:=[$Set.$B$51]" office:value-type="float" office:value="0" calcext:value-type="float">
            <text:p><text:s/>R$ -   </text:p>
          </table:table-cell>
          <table:table-cell table:style-name="ce122" table:formula="of:=[$Out.$B$51]" office:value-type="float" office:value="0" calcext:value-type="float">
            <text:p><text:s/>R$ -   </text:p>
          </table:table-cell>
          <table:table-cell table:style-name="ce117" table:formula="of:=[$Nov.$B$51]" office:value-type="float" office:value="0" calcext:value-type="float">
            <text:p><text:s/>R$ -   </text:p>
          </table:table-cell>
          <table:table-cell table:style-name="ce155" table:formula="of:=[$Dez.$B$51]" office:value-type="float" office:value="0" calcext:value-type="float">
            <text:p><text:s/>R$ -   </text:p>
          </table:table-cell>
          <table:table-cell table:style-name="ce161" table:formula="of:=SUM([.C18:.N18])" office:value-type="float" office:value="569.59" calcext:value-type="float">
            <text:p><text:s/>R$ 569,59 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102" office:value-type="string" calcext:value-type="string">
            <text:p>Transporte</text:p>
          </table:table-cell>
          <table:table-cell table:style-name="ce117" table:formula="of:=[$Jan.$B$59]" office:value-type="float" office:value="72" calcext:value-type="float">
            <text:p><text:s/>R$ 72,00 </text:p>
          </table:table-cell>
          <table:table-cell table:style-name="ce122" table:formula="of:=[$Fev.$B$59]" office:value-type="float" office:value="296.34" calcext:value-type="float">
            <text:p><text:s/>R$ 296,34 </text:p>
          </table:table-cell>
          <table:table-cell table:style-name="ce117" table:formula="of:=[$Mar.$B$59]" office:value-type="float" office:value="210" calcext:value-type="float">
            <text:p><text:s/>R$ 210,00 </text:p>
          </table:table-cell>
          <table:table-cell table:style-name="ce122" table:formula="of:=[$Abr.$B$59]" office:value-type="float" office:value="48.5" calcext:value-type="float">
            <text:p><text:s/>R$ 48,50 </text:p>
          </table:table-cell>
          <table:table-cell table:style-name="ce117" table:formula="of:=[$Mai.$B$59]" office:value-type="float" office:value="48" calcext:value-type="float">
            <text:p><text:s/>R$ 48,00 </text:p>
          </table:table-cell>
          <table:table-cell table:style-name="ce122" table:formula="of:=[$Jun.$B$59]" office:value-type="float" office:value="0" calcext:value-type="float">
            <text:p><text:s/>R$ -   </text:p>
          </table:table-cell>
          <table:table-cell table:style-name="ce117" table:formula="of:=[$Jul.$B$59]" office:value-type="float" office:value="0" calcext:value-type="float">
            <text:p><text:s/>R$ -   </text:p>
          </table:table-cell>
          <table:table-cell table:style-name="ce122" table:formula="of:=[$Ago.$B$59]" office:value-type="float" office:value="0" calcext:value-type="float">
            <text:p><text:s/>R$ -   </text:p>
          </table:table-cell>
          <table:table-cell table:style-name="ce117" table:formula="of:=[$Set.$B$59]" office:value-type="float" office:value="0" calcext:value-type="float">
            <text:p><text:s/>R$ -   </text:p>
          </table:table-cell>
          <table:table-cell table:style-name="ce122" table:formula="of:=[$Out.$B$59]" office:value-type="float" office:value="0" calcext:value-type="float">
            <text:p><text:s/>R$ -   </text:p>
          </table:table-cell>
          <table:table-cell table:style-name="ce117" table:formula="of:=[$Nov.$B$59]" office:value-type="float" office:value="0" calcext:value-type="float">
            <text:p><text:s/>R$ -   </text:p>
          </table:table-cell>
          <table:table-cell table:style-name="ce155" table:formula="of:=[$Dez.$B$59]" office:value-type="float" office:value="0" calcext:value-type="float">
            <text:p><text:s/>R$ -   </text:p>
          </table:table-cell>
          <table:table-cell table:style-name="ce161" table:formula="of:=SUM([.C19:.N19])" office:value-type="float" office:value="674.84" calcext:value-type="float">
            <text:p><text:s/>R$ 674,84 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102" office:value-type="string" calcext:value-type="string">
            <text:p>Educação</text:p>
          </table:table-cell>
          <table:table-cell table:style-name="ce117" table:formula="of:=[$Jan.$B$67]" office:value-type="float" office:value="0" calcext:value-type="float">
            <text:p><text:s/>R$ -   </text:p>
          </table:table-cell>
          <table:table-cell table:style-name="ce122" table:formula="of:=[$Fev.$B$67]" office:value-type="float" office:value="0" calcext:value-type="float">
            <text:p><text:s/>R$ -   </text:p>
          </table:table-cell>
          <table:table-cell table:style-name="ce117" table:formula="of:=[$Mar.$B$67]" office:value-type="float" office:value="34.45" calcext:value-type="float">
            <text:p><text:s/>R$ 34,45 </text:p>
          </table:table-cell>
          <table:table-cell table:style-name="ce122" table:formula="of:=[$Abr.$B$67]" office:value-type="float" office:value="0" calcext:value-type="float">
            <text:p><text:s/>R$ -   </text:p>
          </table:table-cell>
          <table:table-cell table:style-name="ce117" table:formula="of:=[$Mai.$B$67]" office:value-type="float" office:value="0" calcext:value-type="float">
            <text:p><text:s/>R$ -   </text:p>
          </table:table-cell>
          <table:table-cell table:style-name="ce122" table:formula="of:=[$Jun.$B$67]" office:value-type="float" office:value="0" calcext:value-type="float">
            <text:p><text:s/>R$ -   </text:p>
          </table:table-cell>
          <table:table-cell table:style-name="ce117" table:formula="of:=[$Jul.$B$67]" office:value-type="float" office:value="0" calcext:value-type="float">
            <text:p><text:s/>R$ -   </text:p>
          </table:table-cell>
          <table:table-cell table:style-name="ce122" table:formula="of:=[$Ago.$B$67]" office:value-type="float" office:value="0" calcext:value-type="float">
            <text:p><text:s/>R$ -   </text:p>
          </table:table-cell>
          <table:table-cell table:style-name="ce117" table:formula="of:=[$Set.$B$67]" office:value-type="float" office:value="0" calcext:value-type="float">
            <text:p><text:s/>R$ -   </text:p>
          </table:table-cell>
          <table:table-cell table:style-name="ce122" table:formula="of:=[$Out.$B$67]" office:value-type="float" office:value="0" calcext:value-type="float">
            <text:p><text:s/>R$ -   </text:p>
          </table:table-cell>
          <table:table-cell table:style-name="ce117" table:formula="of:=[$Nov.$B$67]" office:value-type="float" office:value="0" calcext:value-type="float">
            <text:p><text:s/>R$ -   </text:p>
          </table:table-cell>
          <table:table-cell table:style-name="ce155" table:formula="of:=[$Dez.$B$67]" office:value-type="float" office:value="0" calcext:value-type="float">
            <text:p><text:s/>R$ -   </text:p>
          </table:table-cell>
          <table:table-cell table:style-name="ce161" table:formula="of:=SUM([.C20:.N20])" office:value-type="float" office:value="34.45" calcext:value-type="float">
            <text:p><text:s/>R$ 34,45 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102" office:value-type="string" calcext:value-type="string">
            <text:p>Saúde</text:p>
          </table:table-cell>
          <table:table-cell table:style-name="ce117" table:formula="of:=[$Jan.$B$75]" office:value-type="float" office:value="0" calcext:value-type="float">
            <text:p><text:s/>R$ -   </text:p>
          </table:table-cell>
          <table:table-cell table:style-name="ce122" table:formula="of:=[$Fev.$B$75]" office:value-type="float" office:value="0" calcext:value-type="float">
            <text:p><text:s/>R$ -   </text:p>
          </table:table-cell>
          <table:table-cell table:style-name="ce117" table:formula="of:=[$Mar.$B$75]" office:value-type="float" office:value="0" calcext:value-type="float">
            <text:p><text:s/>R$ -   </text:p>
          </table:table-cell>
          <table:table-cell table:style-name="ce122" table:formula="of:=[$Abr.$B$75]" office:value-type="float" office:value="0" calcext:value-type="float">
            <text:p><text:s/>R$ -   </text:p>
          </table:table-cell>
          <table:table-cell table:style-name="ce117" table:formula="of:=[$Mai.$B$75]" office:value-type="float" office:value="0" calcext:value-type="float">
            <text:p><text:s/>R$ -   </text:p>
          </table:table-cell>
          <table:table-cell table:style-name="ce122" table:formula="of:=[$Jun.$B$75]" office:value-type="float" office:value="0" calcext:value-type="float">
            <text:p><text:s/>R$ -   </text:p>
          </table:table-cell>
          <table:table-cell table:style-name="ce117" table:formula="of:=[$Jul.$B$75]" office:value-type="float" office:value="0" calcext:value-type="float">
            <text:p><text:s/>R$ -   </text:p>
          </table:table-cell>
          <table:table-cell table:style-name="ce122" table:formula="of:=[$Ago.$B$75]" office:value-type="float" office:value="0" calcext:value-type="float">
            <text:p><text:s/>R$ -   </text:p>
          </table:table-cell>
          <table:table-cell table:style-name="ce117" table:formula="of:=[$Set.$B$75]" office:value-type="float" office:value="0" calcext:value-type="float">
            <text:p><text:s/>R$ -   </text:p>
          </table:table-cell>
          <table:table-cell table:style-name="ce122" table:formula="of:=[$Out.$B$75]" office:value-type="float" office:value="0" calcext:value-type="float">
            <text:p><text:s/>R$ -   </text:p>
          </table:table-cell>
          <table:table-cell table:style-name="ce117" table:formula="of:=[$Nov.$B$75]" office:value-type="float" office:value="0" calcext:value-type="float">
            <text:p><text:s/>R$ -   </text:p>
          </table:table-cell>
          <table:table-cell table:style-name="ce155" table:formula="of:=[$Dez.$B$75]" office:value-type="float" office:value="0" calcext:value-type="float">
            <text:p><text:s/>R$ -   </text:p>
          </table:table-cell>
          <table:table-cell table:style-name="ce161" table:formula="of:=SUM([.C21:.N21])" office:value-type="float" office:value="0" calcext:value-type="float">
            <text:p><text:s/>R$ -   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103" office:value-type="string" calcext:value-type="string">
            <text:p>Investimento</text:p>
          </table:table-cell>
          <table:table-cell table:style-name="ce117" table:formula="of:=[$Jan.$D$90]" office:value-type="float" office:value="0" calcext:value-type="float">
            <text:p><text:s/>R$ -   </text:p>
          </table:table-cell>
          <table:table-cell table:style-name="ce117" table:formula="of:=[$Fev.$D$90]" office:value-type="float" office:value="0" calcext:value-type="float">
            <text:p><text:s/>R$ -   </text:p>
          </table:table-cell>
          <table:table-cell table:style-name="ce117" table:formula="of:=[$Mar.$D$90]" office:value-type="float" office:value="0" calcext:value-type="float">
            <text:p><text:s/>R$ -   </text:p>
          </table:table-cell>
          <table:table-cell table:style-name="ce117" table:formula="of:=[$Abr.$D$90]" office:value-type="float" office:value="201.64" calcext:value-type="float">
            <text:p><text:s/>R$ 201,64 </text:p>
          </table:table-cell>
          <table:table-cell table:style-name="ce117" table:formula="of:=[$Mai.$D$90]" office:value-type="float" office:value="5340.18" calcext:value-type="float">
            <text:p><text:s/>R$ 5.340,18 </text:p>
          </table:table-cell>
          <table:table-cell table:style-name="ce117" table:formula="of:=[$Jun.$D$90]" office:value-type="float" office:value="350" calcext:value-type="float">
            <text:p><text:s/>R$ 350,00 </text:p>
          </table:table-cell>
          <table:table-cell table:style-name="ce117" table:formula="of:=[$Jul.$D$90]" office:value-type="float" office:value="0" calcext:value-type="float">
            <text:p><text:s/>R$ -   </text:p>
          </table:table-cell>
          <table:table-cell table:style-name="ce117" table:formula="of:=[$Ago.$D$90]" office:value-type="float" office:value="0" calcext:value-type="float">
            <text:p><text:s/>R$ -   </text:p>
          </table:table-cell>
          <table:table-cell table:style-name="ce117" table:formula="of:=[$Set.$D$90]" office:value-type="float" office:value="0" calcext:value-type="float">
            <text:p><text:s/>R$ -   </text:p>
          </table:table-cell>
          <table:table-cell table:style-name="ce117" table:formula="of:=[$Out.$D$90]" office:value-type="float" office:value="0" calcext:value-type="float">
            <text:p><text:s/>R$ -   </text:p>
          </table:table-cell>
          <table:table-cell table:style-name="ce117" table:formula="of:=[$Nov.$D$90]" office:value-type="float" office:value="0" calcext:value-type="float">
            <text:p><text:s/>R$ -   </text:p>
          </table:table-cell>
          <table:table-cell table:style-name="ce117" table:formula="of:=[$Dez.$D$90]" office:value-type="float" office:value="0" calcext:value-type="float">
            <text:p><text:s/>R$ -   </text:p>
          </table:table-cell>
          <table:table-cell table:style-name="ce162"/>
          <table:table-cell table:style-name="Default" table:number-columns-repeated="16369"/>
        </table:table-row>
        <table:table-row table:style-name="ro1">
          <table:table-cell/>
          <table:table-cell table:style-name="ce104" office:value-type="string" calcext:value-type="string">
            <text:p>Imprevistos</text:p>
          </table:table-cell>
          <table:table-cell table:style-name="ce118" table:formula="of:=[$Jan.$B$83]" office:value-type="float" office:value="0" calcext:value-type="float">
            <text:p><text:s/>R$ -   </text:p>
          </table:table-cell>
          <table:table-cell table:style-name="ce123" table:formula="of:=[$Fev.$B$83]" office:value-type="float" office:value="0" calcext:value-type="float">
            <text:p><text:s/>R$ -   </text:p>
          </table:table-cell>
          <table:table-cell table:style-name="ce118" table:formula="of:=[$Mar.$B$83]" office:value-type="float" office:value="880" calcext:value-type="float">
            <text:p><text:s/>R$ 880,00 </text:p>
          </table:table-cell>
          <table:table-cell table:style-name="ce123" table:formula="of:=[$Abr.$B$83]" office:value-type="float" office:value="50" calcext:value-type="float">
            <text:p><text:s/>R$ 50,00 </text:p>
          </table:table-cell>
          <table:table-cell table:style-name="ce118" table:formula="of:=[$Mai.$B$83]" office:value-type="float" office:value="0" calcext:value-type="float">
            <text:p><text:s/>R$ -   </text:p>
          </table:table-cell>
          <table:table-cell table:style-name="ce123" table:formula="of:=[$Jun.$B$83]" office:value-type="float" office:value="0" calcext:value-type="float">
            <text:p><text:s/>R$ -   </text:p>
          </table:table-cell>
          <table:table-cell table:style-name="ce118" table:formula="of:=[$Jul.$B$83]" office:value-type="float" office:value="0" calcext:value-type="float">
            <text:p><text:s/>R$ -   </text:p>
          </table:table-cell>
          <table:table-cell table:style-name="ce123" table:formula="of:=[$Ago.$B$83]" office:value-type="float" office:value="0" calcext:value-type="float">
            <text:p><text:s/>R$ -   </text:p>
          </table:table-cell>
          <table:table-cell table:style-name="ce118" table:formula="of:=[$Set.$B$83]" office:value-type="float" office:value="0" calcext:value-type="float">
            <text:p><text:s/>R$ -   </text:p>
          </table:table-cell>
          <table:table-cell table:style-name="ce123" table:formula="of:=[$Out.$B$83]" office:value-type="float" office:value="0" calcext:value-type="float">
            <text:p><text:s/>R$ -   </text:p>
          </table:table-cell>
          <table:table-cell table:style-name="ce118" table:formula="of:=[$Nov.$B$83]" office:value-type="float" office:value="0" calcext:value-type="float">
            <text:p><text:s/>R$ -   </text:p>
          </table:table-cell>
          <table:table-cell table:style-name="ce156" table:formula="of:=[$Dez.$B$83]" office:value-type="float" office:value="0" calcext:value-type="float">
            <text:p><text:s/>R$ -   </text:p>
          </table:table-cell>
          <table:table-cell table:style-name="ce163" table:formula="of:=SUM([.C23:.N23])" office:value-type="float" office:value="930" calcext:value-type="float">
            <text:p><text:s/>R$ 930,00 </text:p>
          </table:table-cell>
          <table:table-cell table:style-name="Default" table:number-columns-repeated="16369"/>
        </table:table-row>
        <table:table-row table:style-name="ro1" table:number-rows-repeated="3">
          <table:table-cell table:number-columns-repeated="15"/>
          <table:table-cell table:style-name="Default" table:number-columns-repeated="16369"/>
        </table:table-row>
        <table:table-row table:style-name="ro1">
          <table:table-cell/>
          <table:table-cell table:style-name="ce11" office:value-type="string" calcext:value-type="string">
            <text:p>Alimentação</text:p>
          </table:table-cell>
          <table:table-cell table:style-name="ce20" office:value-type="string" calcext:value-type="string">
            <text:p>Doces</text:p>
          </table:table-cell>
          <table:table-cell table:style-name="ce31" table:formula="of:=SUBTOTAL(9;[$Fev.D35];[$Fev.D35];[$Mar.D35];[$Abr.D35];[$Mai.D35];[$Jun.D35];[$Jul.D35];[$Ago.D35];[$Set.D35];[$Out.D35];[$Nov.D35];[$Dez.D35])" office:value-type="float" office:value="23.36" calcext:value-type="float">
            <text:p><text:s/>R$ 23,36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/>
          <table:table-cell table:style-name="ce12" table:formula="of:=SUM([.D27:.D31])" office:value-type="float" office:value="91.46" calcext:value-type="float">
            <text:p><text:s/>R$ 91,46 </text:p>
          </table:table-cell>
          <table:table-cell table:style-name="ce21" office:value-type="string" calcext:value-type="string">
            <text:p>Padaria </text:p>
          </table:table-cell>
          <table:table-cell table:style-name="ce32" table:formula="of:=SUBTOTAL(9;[$Fev.D36];[$Fev.D36];[$Mar.D36];[$Abr.D36];[$Mai.D36];[$Jun.D36];[$Jul.D36];[$Ago.D36];[$Set.D36];[$Out.D36];[$Nov.D36];[$Dez.D36])" office:value-type="float" office:value="68.1" calcext:value-type="float">
            <text:p><text:s/>R$ 68,10 </text:p>
          </table:table-cell>
          <table:table-cell/>
          <table:table-cell table:style-name="ce56" office:value-type="string" calcext:value-type="string">
            <text:p>Internet</text:p>
          </table:table-cell>
          <table:table-cell table:style-name="ce31" table:formula="of:=SUBTOTAL(9;[$Jan.I35];[$Fev.I35];[$Mar.I35];[$Abr.I35];[$Mai.I35];[$Jun.I35];[$Jul.I35];[$Ago.I35];[$Set.I35];[$Out.I35];[$Nov.I35];[$Dez.I35])" office:value-type="float" office:value="30" calcext:value-type="float">
            <text:p><text:s/>R$ 30,00 </text:p>
          </table:table-cell>
          <table:table-cell/>
          <table:table-cell table:style-name="ce124" office:value-type="string" office:string-value="Projeto PC" calcext:value-type="string" table:number-columns-spanned="4" table:number-rows-spanned="1">
            <text:p><text:s/>Projeto PC </text:p>
          </table:table-cell>
          <table:covered-table-cell table:number-columns-repeated="2" table:style-name="ce132"/>
          <table:covered-table-cell table:style-name="ce138"/>
          <table:table-cell table:style-name="ce141" table:formula="of:=SUM([.L30:.L43])-SUM([.K30:.K43])" office:value-type="float" office:value="3249.99" calcext:value-type="float">
            <text:p><text:s/>R$ 3.249,99 </text:p>
          </table:table-cell>
          <table:table-cell table:number-columns-repeated="2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1" office:value-type="string" calcext:value-type="string">
            <text:p><text:s/>Almoço fora</text:p>
          </table:table-cell>
          <table:table-cell table:style-name="ce32" table:formula="of:=SUBTOTAL(9;[$Fev.D37];[$Fev.D37];[$Mar.D37];[$Abr.D37];[$Mai.D37];[$Jun.D37];[$Jul.D37];[$Ago.D37];[$Set.D37];[$Out.D37];[$Nov.D37];[$Dez.D37])" office:value-type="float" office:value="0" calcext:value-type="float">
            <text:p><text:s/>R$ -   </text:p>
          </table:table-cell>
          <table:table-cell/>
          <table:table-cell table:style-name="ce57" office:value-type="string" calcext:value-type="string">
            <text:p>Planos/assinaturas</text:p>
          </table:table-cell>
          <table:table-cell table:style-name="ce32" table:formula="of:=SUBTOTAL(9;[$Jan.I36];[$Fev.I36];[$Mar.I36];[$Abr.I36];[$Mai.I36];[$Jun.I36];[$Jul.I36];[$Ago.I36];[$Set.I36];[$Out.I36];[$Nov.I36];[$Dez.I36])" office:value-type="float" office:value="336.9" calcext:value-type="float">
            <text:p><text:s/>R$ 336,90 </text:p>
          </table:table-cell>
          <table:table-cell/>
          <table:table-cell table:style-name="ce125" office:value-type="string" office:string-value="Peça" calcext:value-type="string">
            <text:p><text:s/>Peça </text:p>
          </table:table-cell>
          <table:table-cell table:style-name="ce133" office:value-type="string" office:string-value="Local da compra" calcext:value-type="string">
            <text:p><text:s/>Local da compra </text:p>
          </table:table-cell>
          <table:table-cell table:style-name="ce133" office:value-type="string" office:string-value="custo" calcext:value-type="string">
            <text:p><text:s/>custo </text:p>
          </table:table-cell>
          <table:table-cell table:style-name="ce133" office:value-type="string" office:string-value="valor cheio" calcext:value-type="string">
            <text:p><text:s/>valor cheio </text:p>
          </table:table-cell>
          <table:table-cell table:style-name="ce142" office:value-type="string" office:string-value="valor economizado" calcext:value-type="string">
            <text:p><text:s/>valor economizado </text:p>
          </table:table-cell>
          <table:table-cell table:number-columns-repeated="2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1" office:value-type="string" calcext:value-type="string">
            <text:p>Lanches / Snacks</text:p>
          </table:table-cell>
          <table:table-cell table:style-name="ce32" table:formula="of:=SUBTOTAL(9;[$Fev.D38];[$Fev.D38];[$Mar.D38];[$Abr.D38];[$Mai.D38];[$Jun.D38];[$Jul.D38];[$Ago.D38];[$Set.D38];[$Out.D38];[$Nov.D38];[$Dez.D38])" office:value-type="float" office:value="0" calcext:value-type="float">
            <text:p><text:s/>R$ -   </text:p>
          </table:table-cell>
          <table:table-cell/>
          <table:table-cell table:style-name="ce57" office:value-type="string" calcext:value-type="string">
            <text:p>Agua</text:p>
          </table:table-cell>
          <table:table-cell table:style-name="ce32" table:formula="of:=SUBTOTAL(9;[$Jan.I37];[$Fev.I37];[$Mar.I37];[$Abr.I37];[$Mai.I37];[$Jun.I37];[$Jul.I37];[$Ago.I37];[$Set.I37];[$Out.I37];[$Nov.I37];[$Dez.I37])" office:value-type="float" office:value="0" calcext:value-type="float">
            <text:p><text:s/>R$ -   </text:p>
          </table:table-cell>
          <table:table-cell/>
          <table:table-cell table:style-name="ce126" office:value-type="string" calcext:value-type="string">
            <text:p>gabinete</text:p>
          </table:table-cell>
          <table:table-cell table:style-name="ce134" office:value-type="string" office:string-value="shoope (pichau)" calcext:value-type="string">
            <text:p><text:s/>shoope (pichau) </text:p>
          </table:table-cell>
          <table:table-cell table:style-name="ce134" office:value-type="float" office:value="201.64" calcext:value-type="float">
            <text:p><text:s/>R$ 201,64 </text:p>
          </table:table-cell>
          <table:table-cell table:style-name="ce134" table:formula="of:=200.05+10+10+64" office:value-type="float" office:value="284.05" calcext:value-type="float">
            <text:p><text:s/>R$ 284,05 </text:p>
          </table:table-cell>
          <table:table-cell table:style-name="ce143" table:formula="of:=[.L30]-[.K30]" office:value-type="float" office:value="82.41" calcext:value-type="float">
            <text:p><text:s/>R$ 82,41 </text:p>
          </table:table-cell>
          <table:table-cell table:number-columns-repeated="2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1"/>
          <table:table-cell table:style-name="ce32" table:formula="of:=SUBTOTAL(9;[$Fev.D39];[$Fev.D39];[$Mar.D39];[$Abr.D39];[$Mai.D39];[$Jun.D39];[$Jul.D39];[$Ago.D39];[$Set.D39];[$Out.D39];[$Nov.D39];[$Dez.D39])" office:value-type="float" office:value="0" calcext:value-type="float">
            <text:p><text:s/>R$ -   </text:p>
          </table:table-cell>
          <table:table-cell/>
          <table:table-cell table:style-name="ce57" office:value-type="string" calcext:value-type="string">
            <text:p>Luz</text:p>
          </table:table-cell>
          <table:table-cell table:style-name="ce32" table:formula="of:=SUBTOTAL(9;[$Jan.I38];[$Fev.I38];[$Mar.I38];[$Abr.I38];[$Mai.I38];[$Jun.I38];[$Jul.I38];[$Ago.I38];[$Set.I38];[$Out.I38];[$Nov.I38];[$Dez.I38])" office:value-type="float" office:value="0" calcext:value-type="float">
            <text:p><text:s/>R$ -   </text:p>
          </table:table-cell>
          <table:table-cell/>
          <table:table-cell table:style-name="ce127" office:value-type="string" office:string-value=" placa mãe" calcext:value-type="string">
            <text:p><text:s text:c="2"/>placa mãe </text:p>
          </table:table-cell>
          <table:table-cell table:style-name="ce134" office:value-type="string" office:string-value="Terabyte" calcext:value-type="string">
            <text:p><text:s/>Terabyte </text:p>
          </table:table-cell>
          <table:table-cell table:style-name="ce134" office:value-type="float" office:value="1289.99" calcext:value-type="float">
            <text:p><text:s/>R$ 1.289,99 </text:p>
          </table:table-cell>
          <table:table-cell table:style-name="ce134" office:value-type="float" office:value="1517.64" calcext:value-type="float">
            <text:p><text:s/>R$ 1.517,64 </text:p>
          </table:table-cell>
          <table:table-cell table:style-name="ce143" table:formula="of:=[.L31]-[.K31]" office:value-type="float" office:value="227.65" calcext:value-type="float">
            <text:p><text:s/>R$ 227,65 </text:p>
          </table:table-cell>
          <table:table-cell table:number-columns-repeated="2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3" table:number-columns-repeated="2"/>
          <table:table-cell/>
          <table:table-cell table:style-name="ce57" office:value-type="string" calcext:value-type="string">
            <text:p>Gasolina</text:p>
          </table:table-cell>
          <table:table-cell table:style-name="ce32" table:formula="of:=SUBTOTAL(9;[$Jan.I39];[$Fev.I39];[$Mar.I39];[$Abr.I39];[$Mai.I39];[$Jun.I39];[$Jul.I39];[$Ago.I39];[$Set.I39];[$Out.I39];[$Nov.I39];[$Dez.I39])" office:value-type="float" office:value="358.62" calcext:value-type="float">
            <text:p><text:s/>R$ 358,62 </text:p>
          </table:table-cell>
          <table:table-cell/>
          <table:table-cell table:style-name="ce127" office:value-type="string" office:string-value="processador " calcext:value-type="string">
            <text:p><text:s/>processador <text:s/></text:p>
          </table:table-cell>
          <table:table-cell table:style-name="ce134" office:value-type="string" office:string-value="Igor" calcext:value-type="string">
            <text:p><text:s/>Igor </text:p>
          </table:table-cell>
          <table:table-cell table:style-name="ce134" office:value-type="float" office:value="700" calcext:value-type="float">
            <text:p><text:s/>R$ 700,00 </text:p>
          </table:table-cell>
          <table:table-cell table:style-name="ce134" office:value-type="float" office:value="1000" calcext:value-type="float">
            <text:p><text:s/>R$ 1.000,00 </text:p>
          </table:table-cell>
          <table:table-cell table:style-name="ce143" table:formula="of:=[.L32]-[.K32]" office:value-type="float" office:value="300" calcext:value-type="float">
            <text:p><text:s/>R$ 300,00 </text:p>
          </table:table-cell>
          <table:table-cell table:number-columns-repeated="2"/>
          <table:table-cell table:style-name="Default" table:number-columns-repeated="16369"/>
        </table:table-row>
        <table:table-row table:style-name="ro1">
          <table:table-cell/>
          <table:table-cell table:style-name="ce11" office:value-type="string" calcext:value-type="string">
            <text:p>Lazer</text:p>
          </table:table-cell>
          <table:table-cell table:style-name="ce20" office:value-type="string" calcext:value-type="string">
            <text:p>Delivery (iFood, etc)</text:p>
          </table:table-cell>
          <table:table-cell table:style-name="ce31" table:formula="of:=SUBTOTAL(9;[$Fev.D41];[$Fev.D41];[$Mar.D41];[$Abr.D41];[$Mai.D41];[$Jun.D41];[$Jul.D41];[$Ago.D41];[$Set.D41];[$Out.D41];[$Nov.D41];[$Dez.D41])" office:value-type="float" office:value="47.88" calcext:value-type="float">
            <text:p><text:s/>R$ 47,88 </text:p>
          </table:table-cell>
          <table:table-cell/>
          <table:table-cell table:style-name="ce57" office:value-type="string" calcext:value-type="string">
            <text:p>Dizimos</text:p>
          </table:table-cell>
          <table:table-cell table:style-name="ce32" table:formula="of:=SUBTOTAL(9;[$Jan.I40];[$Fev.I40];[$Mar.I40];[$Abr.I40];[$Mai.I40];[$Jun.I40];[$Jul.I40];[$Ago.I40];[$Set.I40];[$Out.I40];[$Nov.I40];[$Dez.I40])" office:value-type="float" office:value="500" calcext:value-type="float">
            <text:p><text:s/>R$ 500,00 </text:p>
          </table:table-cell>
          <table:table-cell office:value-type="string" office:string-value="pc - bruto" calcext:value-type="string">
            <text:p><text:s/>pc - bruto </text:p>
          </table:table-cell>
          <table:table-cell table:style-name="ce127" office:value-type="string" office:string-value="cooler " calcext:value-type="string">
            <text:p><text:s/>cooler <text:s/></text:p>
          </table:table-cell>
          <table:table-cell table:style-name="ce134" office:value-type="string" office:string-value="amazon" calcext:value-type="string">
            <text:p><text:s/>amazon </text:p>
          </table:table-cell>
          <table:table-cell table:style-name="ce134" office:value-type="float" office:value="128" calcext:value-type="float">
            <text:p><text:s/>R$ 128,00 </text:p>
          </table:table-cell>
          <table:table-cell table:style-name="ce134" office:value-type="float" office:value="176" calcext:value-type="float">
            <text:p><text:s/>R$ 176,00 </text:p>
          </table:table-cell>
          <table:table-cell table:style-name="ce143" table:formula="of:=[.L33]-[.K33]" office:value-type="float" office:value="48" calcext:value-type="float">
            <text:p><text:s/>R$ 48,00 </text:p>
          </table:table-cell>
          <table:table-cell table:number-columns-repeated="2"/>
          <table:table-cell table:style-name="Default" table:number-columns-repeated="16369"/>
        </table:table-row>
        <table:table-row table:style-name="ro1">
          <table:table-cell/>
          <table:table-cell table:style-name="ce12" table:formula="of:=SUM([.D33:.D40])" office:value-type="float" office:value="385.89" calcext:value-type="float">
            <text:p><text:s/>R$ 385,89 </text:p>
          </table:table-cell>
          <table:table-cell table:style-name="ce21" office:value-type="string" calcext:value-type="string">
            <text:p>Cinema / Shows</text:p>
          </table:table-cell>
          <table:table-cell table:style-name="ce32" table:formula="of:=SUBTOTAL(9;[$Fev.D42];[$Fev.D42];[$Mar.D42];[$Abr.D42];[$Mai.D42];[$Jun.D42];[$Jul.D42];[$Ago.D42];[$Set.D42];[$Out.D42];[$Nov.D42];[$Dez.D42])" office:value-type="float" office:value="155" calcext:value-type="float">
            <text:p><text:s/>R$ 155,00 </text:p>
          </table:table-cell>
          <table:table-cell/>
          <table:table-cell table:style-name="ce57" office:value-type="string" calcext:value-type="string">
            <text:p>Ofertas</text:p>
          </table:table-cell>
          <table:table-cell table:style-name="ce32" table:formula="of:=SUBTOTAL(9;[$Jan.I41];[$Fev.I41];[$Mar.I41];[$Abr.I41];[$Mai.I41];[$Jun.I41];[$Jul.I41];[$Ago.I41];[$Set.I41];[$Out.I41];[$Nov.I41];[$Dez.I41])" office:value-type="float" office:value="40" calcext:value-type="float">
            <text:p><text:s/>R$ 40,00 </text:p>
          </table:table-cell>
          <table:table-cell table:formula="of:=SUM([.K30:.K36])" office:value-type="float" office:value="5225.51" calcext:value-type="float">
            <text:p><text:s/>R$ 5.225,51 </text:p>
          </table:table-cell>
          <table:table-cell table:style-name="ce127" office:value-type="string" office:string-value="fonte " calcext:value-type="string">
            <text:p><text:s/>fonte <text:s/></text:p>
          </table:table-cell>
          <table:table-cell table:style-name="ce134" office:value-type="string" office:string-value="amazon" calcext:value-type="string">
            <text:p><text:s/>amazon </text:p>
          </table:table-cell>
          <table:table-cell table:style-name="ce134" office:value-type="float" office:value="320.74" calcext:value-type="float">
            <text:p><text:s/>R$ 320,74 </text:p>
          </table:table-cell>
          <table:table-cell table:style-name="ce134" office:value-type="float" office:value="385" calcext:value-type="float">
            <text:p><text:s/>R$ 385,00 </text:p>
          </table:table-cell>
          <table:table-cell table:style-name="ce143" table:formula="of:=[.L34]-[.K34]" office:value-type="float" office:value="64.26" calcext:value-type="float">
            <text:p><text:s/>R$ 64,26 </text:p>
          </table:table-cell>
          <table:table-cell table:number-columns-repeated="2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1" office:value-type="string" calcext:value-type="string">
            <text:p>Passeios / Viagens</text:p>
          </table:table-cell>
          <table:table-cell table:style-name="ce32" table:formula="of:=SUBTOTAL(9;[$Fev.D43];[$Fev.D43];[$Mar.D43];[$Abr.D43];[$Mai.D43];[$Jun.D43];[$Jul.D43];[$Ago.D43];[$Set.D43];[$Out.D43];[$Nov.D43];[$Dez.D43])" office:value-type="float" office:value="0" calcext:value-type="float">
            <text:p><text:s/>R$ -   </text:p>
          </table:table-cell>
          <table:table-cell/>
          <table:table-cell table:style-name="ce57" office:value-type="string" calcext:value-type="string">
            <text:p>Parcelas</text:p>
          </table:table-cell>
          <table:table-cell table:style-name="ce32" table:formula="of:=SUBTOTAL(9;[$Jan.I42];[$Fev.I42];[$Mar.I42];[$Abr.I42];[$Mai.I42];[$Jun.I42];[$Jul.I42];[$Ago.I42];[$Set.I42];[$Out.I42];[$Nov.I42];[$Dez.I42])" office:value-type="float" office:value="877" calcext:value-type="float">
            <text:p><text:s/>R$ 877,00 </text:p>
          </table:table-cell>
          <table:table-cell/>
          <table:table-cell table:style-name="ce127" office:value-type="string" office:string-value="ram" calcext:value-type="string">
            <text:p><text:s/>ram </text:p>
          </table:table-cell>
          <table:table-cell table:style-name="ce134" office:value-type="string" office:string-value="magalu" calcext:value-type="string">
            <text:p><text:s/>magalu </text:p>
          </table:table-cell>
          <table:table-cell table:style-name="ce134" office:value-type="float" office:value="1715.14" calcext:value-type="float">
            <text:p><text:s/>R$ 1.715,14 </text:p>
          </table:table-cell>
          <table:table-cell table:style-name="ce134" office:value-type="float" office:value="2017.8" calcext:value-type="float">
            <text:p><text:s/>R$ 2.017,80 </text:p>
          </table:table-cell>
          <table:table-cell table:style-name="ce143" table:formula="of:=[.L35]-[.K35]" office:value-type="float" office:value="302.66" calcext:value-type="float">
            <text:p><text:s/>R$ 302,66 </text:p>
          </table:table-cell>
          <table:table-cell table:number-columns-repeated="2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1" office:value-type="string" calcext:value-type="string">
            <text:p>Compras por impulso (não essenciais)</text:p>
          </table:table-cell>
          <table:table-cell table:style-name="ce32" table:formula="of:=SUBTOTAL(9;[$Fev.D44];[$Fev.D44];[$Mar.D44];[$Abr.D44];[$Mai.D44];[$Jun.D44];[$Jul.D44];[$Ago.D44];[$Set.D44];[$Out.D44];[$Nov.D44];[$Dez.D44])" office:value-type="float" office:value="0" calcext:value-type="float">
            <text:p><text:s/>R$ -   </text:p>
          </table:table-cell>
          <table:table-cell/>
          <table:table-cell table:style-name="ce57" office:value-type="string" calcext:value-type="string">
            <text:p>Saúde</text:p>
          </table:table-cell>
          <table:table-cell table:style-name="ce32" table:formula="of:=SUBTOTAL(9;[$Jan.I43];[$Fev.I43];[$Mar.I43];[$Abr.I43];[$Mai.I43];[$Jun.I43];[$Jul.I43];[$Ago.I43];[$Set.I43];[$Out.I43];[$Nov.I43];[$Dez.I43])" office:value-type="float" office:value="0" calcext:value-type="float">
            <text:p><text:s/>R$ -   </text:p>
          </table:table-cell>
          <table:table-cell/>
          <table:table-cell table:style-name="ce127" office:value-type="string" office:string-value="ssd" calcext:value-type="string">
            <text:p><text:s/>ssd </text:p>
          </table:table-cell>
          <table:table-cell table:style-name="ce134" office:value-type="string" office:string-value="mercado livre" calcext:value-type="string">
            <text:p><text:s/>mercado livre </text:p>
          </table:table-cell>
          <table:table-cell table:style-name="ce134" office:value-type="float" office:value="870" calcext:value-type="float">
            <text:p><text:s/>R$ 870,00 </text:p>
          </table:table-cell>
          <table:table-cell table:style-name="ce134" office:value-type="float" office:value="1000" calcext:value-type="float">
            <text:p><text:s/>R$ 1.000,00 </text:p>
          </table:table-cell>
          <table:table-cell table:style-name="ce143" table:formula="of:=[.L36]-[.K36]" office:value-type="float" office:value="130" calcext:value-type="float">
            <text:p><text:s/>R$ 130,00 </text:p>
          </table:table-cell>
          <table:table-cell table:style-name="ce157"/>
          <table:table-cell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1" office:value-type="string" calcext:value-type="string">
            <text:p><text:s/>Jogos / Games / Aplicativos pagos</text:p>
          </table:table-cell>
          <table:table-cell table:style-name="ce32" table:formula="of:=SUBTOTAL(9;[$Fev.D45];[$Fev.D45];[$Mar.D45];[$Abr.D45];[$Mai.D45];[$Jun.D45];[$Jul.D45];[$Ago.D45];[$Set.D45];[$Out.D45];[$Nov.D45];[$Dez.D45])" office:value-type="float" office:value="0" calcext:value-type="float">
            <text:p><text:s/>R$ -   </text:p>
          </table:table-cell>
          <table:table-cell/>
          <table:table-cell table:style-name="ce57" office:value-type="string" calcext:value-type="string">
            <text:p>Investimento</text:p>
          </table:table-cell>
          <table:table-cell table:style-name="ce32" table:formula="of:=SUBTOTAL(9;[.C22:.N22])" office:value-type="float" office:value="5891.82" calcext:value-type="float">
            <text:p><text:s/>R$ 5.891,82 </text:p>
          </table:table-cell>
          <table:table-cell/>
          <table:table-cell table:style-name="ce128" office:value-type="string" office:string-value="placa de video" calcext:value-type="string">
            <text:p><text:s/>placa de video </text:p>
          </table:table-cell>
          <table:table-cell table:style-name="ce117" office:value-type="string" office:string-value="mercado livre" calcext:value-type="string">
            <text:p><text:s/>mercado livre </text:p>
          </table:table-cell>
          <table:table-cell table:style-name="ce137" office:value-type="float" office:value="2378" calcext:value-type="float">
            <text:p><text:s/>R$ 2.378,00 </text:p>
          </table:table-cell>
          <table:table-cell table:style-name="ce139" office:value-type="float" office:value="3669" calcext:value-type="float">
            <text:p><text:s/>R$ 3.669,00 </text:p>
          </table:table-cell>
          <table:table-cell table:style-name="ce143" table:formula="of:=[.L37]-[.K37]" office:value-type="float" office:value="1291" calcext:value-type="float">
            <text:p><text:s/>R$ 1.291,00 </text:p>
          </table:table-cell>
          <table:table-cell table:number-columns-repeated="2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1" office:value-type="string" calcext:value-type="string">
            <text:p>Saídas com amigos</text:p>
          </table:table-cell>
          <table:table-cell table:style-name="ce32" table:formula="of:=SUBTOTAL(9;[$Fev.D46];[$Fev.D46];[$Mar.D46];[$Abr.D46];[$Mai.D46];[$Jun.D46];[$Jul.D46];[$Ago.D46];[$Set.D46];[$Out.D46];[$Nov.D46];[$Dez.D46])" office:value-type="float" office:value="183.01" calcext:value-type="float">
            <text:p><text:s/>R$ 183,01 </text:p>
          </table:table-cell>
          <table:table-cell/>
          <table:table-cell table:style-name="ce58"/>
          <table:table-cell table:style-name="ce33" table:formula="of:=SUBTOTAL(9;[$Jan.I45];[$Fev.I45];[$Mar.I45];[$Abr.I45];[$Mai.I45];[$Jun.I45];[$Jul.I45];[$Ago.I45];[$Set.I45];[$Out.I45];[$Nov.I45];[$Dez.I45])" office:value-type="float" office:value="0" calcext:value-type="float">
            <text:p><text:s/>R$ -   </text:p>
          </table:table-cell>
          <table:table-cell/>
          <table:table-cell table:style-name="ce127" office:value-type="string" office:string-value="pen drive" calcext:value-type="string">
            <text:p><text:s/>pen drive </text:p>
          </table:table-cell>
          <table:table-cell table:style-name="ce134" office:value-type="string" office:string-value="mercado livre" calcext:value-type="string">
            <text:p><text:s/>mercado livre </text:p>
          </table:table-cell>
          <table:table-cell table:style-name="ce134" office:value-type="float" office:value="78.9" calcext:value-type="float">
            <text:p><text:s/>R$ 78,90 </text:p>
          </table:table-cell>
          <table:table-cell table:style-name="ce134" office:value-type="float" office:value="93.24" calcext:value-type="float">
            <text:p><text:s/>R$ 93,24 </text:p>
          </table:table-cell>
          <table:table-cell table:style-name="ce143" table:formula="of:=[.L38]-[.K38]" office:value-type="float" office:value="14.34" calcext:value-type="float">
            <text:p><text:s/>R$ 14,34 </text:p>
          </table:table-cell>
          <table:table-cell table:number-columns-repeated="2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4"/>
          <table:table-cell table:style-name="ce35" table:formula="of:=SUBTOTAL(9;[$Fev.D47];[$Fev.D47];[$Mar.D47];[$Abr.D47];[$Mai.D47];[$Jun.D47];[$Jul.D47];[$Ago.D47];[$Set.D47];[$Out.D47];[$Nov.D47];[$Dez.D47])" office:value-type="float" office:value="0" calcext:value-type="float">
            <text:p><text:s/>R$ -   </text:p>
          </table:table-cell>
          <table:table-cell table:number-columns-repeated="4"/>
          <table:table-cell table:style-name="ce127" office:value-type="string" office:string-value="Monitor" calcext:value-type="string">
            <text:p><text:s/>Monitor </text:p>
          </table:table-cell>
          <table:table-cell table:style-name="ce134" office:value-type="string" office:string-value="Terabyte" calcext:value-type="string">
            <text:p><text:s/>Terabyte </text:p>
          </table:table-cell>
          <table:table-cell table:style-name="ce134" office:value-type="float" office:value="630" calcext:value-type="float">
            <text:p><text:s/>R$ 630,00 </text:p>
          </table:table-cell>
          <table:table-cell table:style-name="ce134" office:value-type="float" office:value="741" calcext:value-type="float">
            <text:p><text:s/>R$ 741,00 </text:p>
          </table:table-cell>
          <table:table-cell table:style-name="ce143" table:formula="of:=[.L39]-[.K39]" office:value-type="float" office:value="111" calcext:value-type="float">
            <text:p><text:s/>R$ 111,00 </text:p>
          </table:table-cell>
          <table:table-cell table:number-columns-repeated="2"/>
          <table:table-cell table:style-name="Default" table:number-columns-repeated="16369"/>
        </table:table-row>
        <table:table-row table:style-name="ro1">
          <table:table-cell/>
          <table:table-cell table:style-name="ce105"/>
          <table:table-cell table:style-name="ce25"/>
          <table:table-cell table:style-name="ce33" table:formula="of:=SUBTOTAL(9;[$Fev.D48];[$Fev.D48];[$Mar.D48];[$Abr.D48];[$Mai.D48];[$Jun.D48];[$Jul.D48];[$Ago.D48];[$Set.D48];[$Out.D48];[$Nov.D48];[$Dez.D48])" office:value-type="float" office:value="0" calcext:value-type="float">
            <text:p><text:s/>R$ -   </text:p>
          </table:table-cell>
          <table:table-cell table:number-columns-repeated="4"/>
          <table:table-cell table:style-name="ce129" office:value-type="string" office:string-value="teclado" calcext:value-type="string">
            <text:p><text:s/>teclado </text:p>
          </table:table-cell>
          <table:table-cell table:style-name="ce134" office:value-type="string" office:string-value="aliespress" calcext:value-type="string">
            <text:p><text:s/>aliespress </text:p>
          </table:table-cell>
          <table:table-cell table:style-name="ce134" office:value-type="float" office:value="394" calcext:value-type="float">
            <text:p><text:s/>R$ 394,00 </text:p>
          </table:table-cell>
          <table:table-cell table:style-name="ce134" office:value-type="float" office:value="765" calcext:value-type="float">
            <text:p><text:s/>R$ 765,00 </text:p>
          </table:table-cell>
          <table:table-cell table:style-name="ce143" table:formula="of:=[.L40]-[.K40]" office:value-type="float" office:value="371" calcext:value-type="float">
            <text:p><text:s/>R$ 371,00 </text:p>
          </table:table-cell>
          <table:table-cell table:number-columns-repeated="2"/>
          <table:table-cell table:style-name="Default" table:number-columns-repeated="16369"/>
        </table:table-row>
        <table:table-row table:style-name="ro1">
          <table:table-cell table:number-columns-repeated="8"/>
          <table:table-cell table:style-name="ce127" office:value-type="string" office:string-value="pasta termica" calcext:value-type="string">
            <text:p><text:s/>pasta termica </text:p>
          </table:table-cell>
          <table:table-cell table:style-name="ce134" office:value-type="string" office:string-value="mercado livre" calcext:value-type="string">
            <text:p><text:s/>mercado livre </text:p>
          </table:table-cell>
          <table:table-cell table:style-name="ce134" office:value-type="float" office:value="59.9" calcext:value-type="float">
            <text:p><text:s/>R$ 59,90 </text:p>
          </table:table-cell>
          <table:table-cell table:style-name="ce134" office:value-type="float" office:value="103.9" calcext:value-type="float">
            <text:p><text:s/>R$ 103,90 </text:p>
          </table:table-cell>
          <table:table-cell table:style-name="ce143" table:formula="of:=[.L41]-[.K41]" office:value-type="float" office:value="44" calcext:value-type="float">
            <text:p><text:s/>R$ 44,00 </text:p>
          </table:table-cell>
          <table:table-cell table:number-columns-repeated="2"/>
          <table:table-cell table:style-name="Default" table:number-columns-repeated="16369"/>
        </table:table-row>
        <table:table-row table:style-name="ro1">
          <table:table-cell/>
          <table:table-cell table:style-name="ce11" office:value-type="string" calcext:value-type="string">
            <text:p>Despesas</text:p>
          </table:table-cell>
          <table:table-cell table:style-name="ce20" office:value-type="string" calcext:value-type="string">
            <text:p>Presentes e datas comemorativas</text:p>
          </table:table-cell>
          <table:table-cell table:style-name="ce31" table:formula="of:=SUBTOTAL(9;[$Fev.D50];[$Fev.D50];[$Mar.D50];[$Abr.D50];[$Mai.D50];[$Jun.D50];[$Jul.D50];[$Ago.D50];[$Set.D50];[$Out.D50];[$Nov.D50];[$Dez.D50])" office:value-type="float" office:value="107.4" calcext:value-type="float">
            <text:p><text:s/>R$ 107,40 </text:p>
          </table:table-cell>
          <table:table-cell table:number-columns-repeated="3"/>
          <table:table-cell office:value-type="string" office:string-value="perifericos" calcext:value-type="string">
            <text:p><text:s/>perifericos </text:p>
          </table:table-cell>
          <table:table-cell table:style-name="ce127" office:value-type="string" office:string-value="Mouse" calcext:value-type="string">
            <text:p><text:s/>Mouse </text:p>
          </table:table-cell>
          <table:table-cell table:style-name="ce134" office:value-type="string" office:string-value="aliespress" calcext:value-type="string">
            <text:p><text:s/>aliespress </text:p>
          </table:table-cell>
          <table:table-cell table:style-name="ce134" office:value-type="float" office:value="175" calcext:value-type="float">
            <text:p><text:s/>R$ 175,00 </text:p>
          </table:table-cell>
          <table:table-cell table:style-name="ce134" office:value-type="float" office:value="373.58" calcext:value-type="float">
            <text:p><text:s/>R$ 373,58 </text:p>
          </table:table-cell>
          <table:table-cell table:style-name="ce143" table:formula="of:=[.L42]-[.K42]" office:value-type="float" office:value="198.58" calcext:value-type="float">
            <text:p><text:s/>R$ 198,58 </text:p>
          </table:table-cell>
          <table:table-cell table:number-columns-repeated="2"/>
          <table:table-cell table:style-name="Default" table:number-columns-repeated="16369"/>
        </table:table-row>
        <table:table-row table:style-name="ro1">
          <table:table-cell/>
          <table:table-cell table:style-name="ce12" table:formula="of:=SUM([.D42:.D48])" office:value-type="float" office:value="701.88" calcext:value-type="float">
            <text:p><text:s/>R$ 701,88 </text:p>
          </table:table-cell>
          <table:table-cell table:style-name="ce21" office:value-type="string" calcext:value-type="string">
            <text:p>Doações / Contribuições</text:p>
          </table:table-cell>
          <table:table-cell table:style-name="ce32" table:formula="of:=SUBTOTAL(9;[$Fev.D51];[$Fev.D51];[$Mar.D51];[$Abr.D51];[$Mai.D51];[$Jun.D51];[$Jul.D51];[$Ago.D51];[$Set.D51];[$Out.D51];[$Nov.D51];[$Dez.D51])" office:value-type="float" office:value="0" calcext:value-type="float">
            <text:p><text:s/>R$ -   </text:p>
          </table:table-cell>
          <table:table-cell table:number-columns-repeated="3"/>
          <table:table-cell table:formula="of:=SUM([.K38:.K43])" office:value-type="float" office:value="1444.56" calcext:value-type="float">
            <text:p><text:s/>R$ 1.444,56 </text:p>
          </table:table-cell>
          <table:table-cell table:style-name="ce130" office:value-type="string" office:string-value="Mouse pad" calcext:value-type="string">
            <text:p><text:s/>Mouse pad </text:p>
          </table:table-cell>
          <table:table-cell table:style-name="ce135" office:value-type="string" office:string-value="aliespress" calcext:value-type="string">
            <text:p><text:s/>aliespress </text:p>
          </table:table-cell>
          <table:table-cell table:style-name="ce135" office:value-type="float" office:value="106.76" calcext:value-type="float">
            <text:p><text:s/>R$ 106,76 </text:p>
          </table:table-cell>
          <table:table-cell table:style-name="ce135" office:value-type="float" office:value="171.85" calcext:value-type="float">
            <text:p><text:s/>R$ 171,85 </text:p>
          </table:table-cell>
          <table:table-cell table:style-name="ce144" table:formula="of:=[.L43]-[.K43]" office:value-type="float" office:value="65.09" calcext:value-type="float">
            <text:p><text:s/>R$ 65,09 </text:p>
          </table:table-cell>
          <table:table-cell table:number-columns-repeated="2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1" office:value-type="string" calcext:value-type="string">
            <text:p>Taxas bancárias / Pix por engano</text:p>
          </table:table-cell>
          <table:table-cell table:style-name="ce32" table:formula="of:=SUBTOTAL(9;[$Fev.D52];[$Fev.D52];[$Mar.D52];[$Abr.D52];[$Mai.D52];[$Jun.D52];[$Jul.D52];[$Ago.D52];[$Set.D52];[$Out.D52];[$Nov.D52];[$Dez.D52])" office:value-type="float" office:value="0" calcext:value-type="float">
            <text:p><text:s/>R$ -  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1" office:value-type="string" calcext:value-type="string">
            <text:p>Compras online aleatórias</text:p>
          </table:table-cell>
          <table:table-cell table:style-name="ce32" table:formula="of:=SUBTOTAL(9;[$Fev.D53];[$Fev.D53];[$Mar.D53];[$Abr.D53];[$Mai.D53];[$Jun.D53];[$Jul.D53];[$Ago.D53];[$Set.D53];[$Out.D53];[$Nov.D53];[$Dez.D53])" office:value-type="float" office:value="142" calcext:value-type="float">
            <text:p><text:s/>R$ 142,00 </text:p>
          </table:table-cell>
          <table:table-cell table:number-columns-repeated="4"/>
          <table:table-cell table:style-name="ce131" office:value-type="string" office:string-value="total" calcext:value-type="string" table:number-columns-spanned="3" table:number-rows-spanned="1">
            <text:p><text:s/>total </text:p>
          </table:table-cell>
          <table:covered-table-cell table:number-columns-repeated="2" table:style-name="ce136"/>
          <table:table-cell table:style-name="ce140" table:formula="of:=SUM([.H34];[.H43])" office:value-type="float" office:value="6670.07" calcext:value-type="float" table:number-columns-spanned="2" table:number-rows-spanned="1">
            <text:p><text:s/>R$ 6.670,07 </text:p>
          </table:table-cell>
          <table:covered-table-cell table:style-name="ce140"/>
          <table:table-cell table:number-columns-repeated="2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1" office:value-type="string" calcext:value-type="string">
            <text:p>Manutenção da casa (lâmpada, pilha, etc)</text:p>
          </table:table-cell>
          <table:table-cell table:style-name="ce32" table:formula="of:=SUBTOTAL(9;[$Fev.D54];[$Fev.D54];[$Mar.D54];[$Abr.D54];[$Mai.D54];[$Jun.D54];[$Jul.D54];[$Ago.D54];[$Set.D54];[$Out.D54];[$Nov.D54];[$Dez.D54])" office:value-type="float" office:value="0" calcext:value-type="float">
            <text:p><text:s/>R$ -  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1" office:value-type="string" calcext:value-type="string">
            <text:p>Gastos pessoais (roupas, acessórios)</text:p>
          </table:table-cell>
          <table:table-cell table:style-name="ce32" table:formula="of:=SUBTOTAL(9;[$Fev.D55];[$Fev.D55];[$Mar.D55];[$Abr.D55];[$Mai.D55];[$Jun.D55];[$Jul.D55];[$Ago.D55];[$Set.D55];[$Out.D55];[$Nov.D55];[$Dez.D55])" office:value-type="float" office:value="452.48" calcext:value-type="float">
            <text:p><text:s/>R$ 452,48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5"/>
          <table:table-cell table:style-name="ce33" table:formula="of:=SUBTOTAL(9;[$Fev.D56];[$Fev.D56];[$Mar.D56];[$Abr.D56];[$Mai.D56];[$Jun.D56];[$Jul.D56];[$Ago.D56];[$Set.D56];[$Out.D56];[$Nov.D56];[$Dez.D56])" office:value-type="float" office:value="0" calcext:value-type="float">
            <text:p><text:s/>R$ -  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15"/>
          <table:table-cell table:style-name="Default" table:number-columns-repeated="16369"/>
        </table:table-row>
        <table:table-row table:style-name="ro1">
          <table:table-cell/>
          <table:table-cell table:style-name="ce11" office:value-type="string" calcext:value-type="string">
            <text:p>Transporte</text:p>
          </table:table-cell>
          <table:table-cell table:style-name="ce20" office:value-type="string" calcext:value-type="string">
            <text:p>Acessório</text:p>
          </table:table-cell>
          <table:table-cell table:style-name="ce31" table:formula="of:=SUBTOTAL(9;[$Fev.D58];[$Fev.D58];[$Mar.D58];[$Abr.D58];[$Mai.D58];[$Jun.D58];[$Jul.D58];[$Ago.D58];[$Set.D58];[$Out.D58];[$Nov.D58];[$Dez.D58])" office:value-type="float" office:value="0" calcext:value-type="float">
            <text:p><text:s/>R$ -  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/>
          <table:table-cell table:style-name="ce12" table:formula="of:=SUM([.D50:.D56])" office:value-type="float" office:value="899.18" calcext:value-type="float">
            <text:p><text:s/>R$ 899,18 </text:p>
          </table:table-cell>
          <table:table-cell table:style-name="ce21" office:value-type="string" calcext:value-type="string">
            <text:p>Uber / Táxi</text:p>
          </table:table-cell>
          <table:table-cell table:style-name="ce32" table:formula="of:=SUBTOTAL(9;[$Fev.D59];[$Fev.D59];[$Mar.D59];[$Abr.D59];[$Mai.D59];[$Jun.D59];[$Jul.D59];[$Ago.D59];[$Set.D59];[$Out.D59];[$Nov.D59];[$Dez.D59])" office:value-type="float" office:value="0" calcext:value-type="float">
            <text:p><text:s/>R$ -  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1" office:value-type="string" calcext:value-type="string">
            <text:p>Ônibus / Metrô</text:p>
          </table:table-cell>
          <table:table-cell table:style-name="ce32" table:formula="of:=SUBTOTAL(9;[$Fev.D60];[$Fev.D60];[$Mar.D60];[$Abr.D60];[$Mai.D60];[$Jun.D60];[$Jul.D60];[$Ago.D60];[$Set.D60];[$Out.D60];[$Nov.D60];[$Dez.D60])" office:value-type="float" office:value="0" calcext:value-type="float">
            <text:p><text:s/>R$ -  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1" office:value-type="string" calcext:value-type="string">
            <text:p>Estacionamento</text:p>
          </table:table-cell>
          <table:table-cell table:style-name="ce32" table:formula="of:=SUBTOTAL(9;[$Fev.D61];[$Fev.D61];[$Mar.D61];[$Abr.D61];[$Mai.D61];[$Jun.D61];[$Jul.D61];[$Ago.D61];[$Set.D61];[$Out.D61];[$Nov.D61];[$Dez.D61])" office:value-type="float" office:value="0" calcext:value-type="float">
            <text:p><text:s/>R$ -  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1" office:value-type="string" calcext:value-type="string">
            <text:p>Manutenção (óleo, pneu, etc)</text:p>
          </table:table-cell>
          <table:table-cell table:style-name="ce32" table:formula="of:=SUBTOTAL(9;[$Fev.D62];[$Fev.D62];[$Mar.D62];[$Abr.D62];[$Mai.D62];[$Jun.D62];[$Jul.D62];[$Ago.D62];[$Set.D62];[$Out.D62];[$Nov.D62];[$Dez.D62])" office:value-type="float" office:value="422.34" calcext:value-type="float">
            <text:p><text:s/>R$ 422,34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1" office:value-type="string" calcext:value-type="string">
            <text:p>Multas / Documentação</text:p>
          </table:table-cell>
          <table:table-cell table:style-name="ce32" table:formula="of:=SUBTOTAL(9;[$Fev.D63];[$Fev.D63];[$Mar.D63];[$Abr.D63];[$Mai.D63];[$Jun.D63];[$Jul.D63];[$Ago.D63];[$Set.D63];[$Out.D63];[$Nov.D63];[$Dez.D63])" office:value-type="float" office:value="476.84" calcext:value-type="float">
            <text:p><text:s/>R$ 476,84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5"/>
          <table:table-cell table:style-name="ce33" table:formula="of:=SUBTOTAL(9;[$Fev.D64];[$Fev.D64];[$Mar.D64];[$Abr.D64];[$Mai.D64];[$Jun.D64];[$Jul.D64];[$Ago.D64];[$Set.D64];[$Out.D64];[$Nov.D64];[$Dez.D64])" office:value-type="float" office:value="0" calcext:value-type="float">
            <text:p><text:s/>R$ -  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15"/>
          <table:table-cell table:style-name="Default" table:number-columns-repeated="16369"/>
        </table:table-row>
        <table:table-row table:style-name="ro1">
          <table:table-cell/>
          <table:table-cell table:style-name="ce11" office:value-type="string" calcext:value-type="string">
            <text:p>Educação</text:p>
          </table:table-cell>
          <table:table-cell table:style-name="ce20" office:value-type="string" calcext:value-type="string">
            <text:p>Livros </text:p>
          </table:table-cell>
          <table:table-cell table:style-name="ce31" table:formula="of:=SUBTOTAL(9;[$Fev.D66];[$Fev.D66];[$Mar.D66];[$Abr.D66];[$Mai.D66];[$Jun.D66];[$Jul.D66];[$Ago.D66];[$Set.D66];[$Out.D66];[$Nov.D66];[$Dez.D66])" office:value-type="float" office:value="0" calcext:value-type="float">
            <text:p><text:s/>R$ -  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/>
          <table:table-cell table:style-name="ce12" table:formula="of:=SUM([.D58:.D64])" office:value-type="float" office:value="34.45" calcext:value-type="float">
            <text:p><text:s/>R$ 34,45 </text:p>
          </table:table-cell>
          <table:table-cell table:style-name="ce21" office:value-type="string" calcext:value-type="string">
            <text:p>Cursos online (Udemy, Alura, etc)</text:p>
          </table:table-cell>
          <table:table-cell table:style-name="ce32" table:formula="of:=SUBTOTAL(9;[$Fev.D67];[$Fev.D67];[$Mar.D67];[$Abr.D67];[$Mai.D67];[$Jun.D67];[$Jul.D67];[$Ago.D67];[$Set.D67];[$Out.D67];[$Nov.D67];[$Dez.D67])" office:value-type="float" office:value="0" calcext:value-type="float">
            <text:p><text:s/>R$ -  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1" office:value-type="string" calcext:value-type="string">
            <text:p>Material escolar / didático</text:p>
          </table:table-cell>
          <table:table-cell table:style-name="ce32" table:formula="of:=SUBTOTAL(9;[$Fev.D68];[$Fev.D68];[$Mar.D68];[$Abr.D68];[$Mai.D68];[$Jun.D68];[$Jul.D68];[$Ago.D68];[$Set.D68];[$Out.D68];[$Nov.D68];[$Dez.D68])" office:value-type="float" office:value="34.45" calcext:value-type="float">
            <text:p><text:s/>R$ 34,45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1" office:value-type="string" calcext:value-type="string">
            <text:p>Apostilas</text:p>
          </table:table-cell>
          <table:table-cell table:style-name="ce32" table:formula="of:=SUBTOTAL(9;[$Fev.D69];[$Fev.D69];[$Mar.D69];[$Abr.D69];[$Mai.D69];[$Jun.D69];[$Jul.D69];[$Ago.D69];[$Set.D69];[$Out.D69];[$Nov.D69];[$Dez.D69])" office:value-type="float" office:value="0" calcext:value-type="float">
            <text:p><text:s/>R$ -  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1" office:value-type="string" calcext:value-type="string">
            <text:p>Internet dedicada para estudos</text:p>
          </table:table-cell>
          <table:table-cell table:style-name="ce32" table:formula="of:=SUBTOTAL(9;[$Fev.D70];[$Fev.D70];[$Mar.D70];[$Abr.D70];[$Mai.D70];[$Jun.D70];[$Jul.D70];[$Ago.D70];[$Set.D70];[$Out.D70];[$Nov.D70];[$Dez.D70])" office:value-type="float" office:value="0" calcext:value-type="float">
            <text:p><text:s/>R$ -  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1" office:value-type="string" calcext:value-type="string">
            <text:p>Plataformas de aprendizado </text:p>
          </table:table-cell>
          <table:table-cell table:style-name="ce32" table:formula="of:=SUBTOTAL(9;[$Fev.D71];[$Fev.D71];[$Mar.D71];[$Abr.D71];[$Mai.D71];[$Jun.D71];[$Jul.D71];[$Ago.D71];[$Set.D71];[$Out.D71];[$Nov.D71];[$Dez.D71])" office:value-type="float" office:value="0" calcext:value-type="float">
            <text:p><text:s/>R$ -  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5"/>
          <table:table-cell table:style-name="ce33" table:formula="of:=SUBTOTAL(9;[$Fev.D72];[$Fev.D72];[$Mar.D72];[$Abr.D72];[$Mai.D72];[$Jun.D72];[$Jul.D72];[$Ago.D72];[$Set.D72];[$Out.D72];[$Nov.D72];[$Dez.D72])" office:value-type="float" office:value="0" calcext:value-type="float">
            <text:p><text:s/>R$ -  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15"/>
          <table:table-cell table:style-name="Default" table:number-columns-repeated="16369"/>
        </table:table-row>
        <table:table-row table:style-name="ro1">
          <table:table-cell/>
          <table:table-cell table:style-name="ce11" office:value-type="string" calcext:value-type="string">
            <text:p>Saúde</text:p>
          </table:table-cell>
          <table:table-cell table:style-name="ce20" office:value-type="string" calcext:value-type="string">
            <text:p>Medicamentos</text:p>
          </table:table-cell>
          <table:table-cell table:style-name="ce31" table:formula="of:=SUBTOTAL(9;[$Fev.D74];[$Fev.D74];[$Mar.D74];[$Abr.D74];[$Mai.D74];[$Jun.D74];[$Jul.D74];[$Ago.D74];[$Set.D74];[$Out.D74];[$Nov.D74];[$Dez.D74])" office:value-type="float" office:value="0" calcext:value-type="float">
            <text:p><text:s/>R$ -  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/>
          <table:table-cell table:style-name="ce12" table:formula="of:=SUM([.D66:.D72])" office:value-type="float" office:value="0" calcext:value-type="float">
            <text:p><text:s/>R$ -   </text:p>
          </table:table-cell>
          <table:table-cell table:style-name="ce21" office:value-type="string" calcext:value-type="string">
            <text:p>Consultas médicas / exames</text:p>
          </table:table-cell>
          <table:table-cell table:style-name="ce32" table:formula="of:=SUBTOTAL(9;[$Fev.D75];[$Fev.D75];[$Mar.D75];[$Abr.D75];[$Mai.D75];[$Jun.D75];[$Jul.D75];[$Ago.D75];[$Set.D75];[$Out.D75];[$Nov.D75];[$Dez.D75])" office:value-type="float" office:value="0" calcext:value-type="float">
            <text:p><text:s/>R$ -  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1" office:value-type="string" calcext:value-type="string">
            <text:p>Óculos / lentes</text:p>
          </table:table-cell>
          <table:table-cell table:style-name="ce32" table:formula="of:=SUBTOTAL(9;[$Fev.D76];[$Fev.D76];[$Mar.D76];[$Abr.D76];[$Mai.D76];[$Jun.D76];[$Jul.D76];[$Ago.D76];[$Set.D76];[$Out.D76];[$Nov.D76];[$Dez.D76])" office:value-type="float" office:value="0" calcext:value-type="float">
            <text:p><text:s/>R$ -  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1" office:value-type="string" calcext:value-type="string">
            <text:p>Produtos de higiene e cuidados pessoais</text:p>
          </table:table-cell>
          <table:table-cell table:style-name="ce32" table:formula="of:=SUBTOTAL(9;[$Fev.D77];[$Fev.D77];[$Mar.D77];[$Abr.D77];[$Mai.D77];[$Jun.D77];[$Jul.D77];[$Ago.D77];[$Set.D77];[$Out.D77];[$Nov.D77];[$Dez.D77])" office:value-type="float" office:value="0" calcext:value-type="float">
            <text:p><text:s/>R$ -  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1"/>
          <table:table-cell table:style-name="ce32" table:formula="of:=SUBTOTAL(9;[$Fev.D78];[$Fev.D78];[$Mar.D78];[$Abr.D78];[$Mai.D78];[$Jun.D78];[$Jul.D78];[$Ago.D78];[$Set.D78];[$Out.D78];[$Nov.D78];[$Dez.D78])" office:value-type="float" office:value="0" calcext:value-type="float">
            <text:p><text:s/>R$ -  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1"/>
          <table:table-cell table:style-name="ce32" table:formula="of:=SUBTOTAL(9;[$Fev.D79];[$Fev.D79];[$Mar.D79];[$Abr.D79];[$Mai.D79];[$Jun.D79];[$Jul.D79];[$Ago.D79];[$Set.D79];[$Out.D79];[$Nov.D79];[$Dez.D79])" office:value-type="float" office:value="0" calcext:value-type="float">
            <text:p><text:s/>R$ -  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5"/>
          <table:table-cell table:style-name="ce33" table:formula="of:=SUBTOTAL(9;[$Fev.D80];[$Fev.D80];[$Mar.D80];[$Abr.D80];[$Mai.D80];[$Jun.D80];[$Jul.D80];[$Ago.D80];[$Set.D80];[$Out.D80];[$Nov.D80];[$Dez.D80])" office:value-type="float" office:value="0" calcext:value-type="float">
            <text:p><text:s/>R$ -  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15"/>
          <table:table-cell table:style-name="Default" table:number-columns-repeated="16369"/>
        </table:table-row>
        <table:table-row table:style-name="ro1">
          <table:table-cell/>
          <table:table-cell table:style-name="ce11" office:value-type="string" calcext:value-type="string">
            <text:p>Imprevistos</text:p>
          </table:table-cell>
          <table:table-cell table:style-name="ce20" office:value-type="string" calcext:value-type="string">
            <text:p>Emergência médica ou odontológica</text:p>
          </table:table-cell>
          <table:table-cell table:style-name="ce31" table:formula="of:=SUBTOTAL(9;[$Fev.D82];[$Fev.D82];[$Mar.D82];[$Abr.D82];[$Mai.D82];[$Jun.D82];[$Jul.D82];[$Ago.D82];[$Set.D82];[$Out.D82];[$Nov.D82];[$Dez.D82])" office:value-type="float" office:value="0" calcext:value-type="float">
            <text:p><text:s/>R$ -  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/>
          <table:table-cell table:style-name="ce12" table:formula="of:=SUM([.D74:.D80])" office:value-type="float" office:value="930" calcext:value-type="float">
            <text:p><text:s/>R$ 930,00 </text:p>
          </table:table-cell>
          <table:table-cell table:style-name="ce21" office:value-type="string" calcext:value-type="string">
            <text:p>Equipamento quebrado (celular, notebook)</text:p>
          </table:table-cell>
          <table:table-cell table:style-name="ce32" table:formula="of:=SUBTOTAL(9;[$Fev.D83];[$Fev.D83];[$Mar.D83];[$Abr.D83];[$Mai.D83];[$Jun.D83];[$Jul.D83];[$Ago.D83];[$Set.D83];[$Out.D83];[$Nov.D83];[$Dez.D83])" office:value-type="float" office:value="50" calcext:value-type="float">
            <text:p><text:s/>R$ 50,00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1" office:value-type="string" calcext:value-type="string">
            <text:p>Perda de documentos / taxas</text:p>
          </table:table-cell>
          <table:table-cell table:style-name="ce32" table:formula="of:=SUBTOTAL(9;[$Fev.D84];[$Fev.D84];[$Mar.D84];[$Abr.D84];[$Mai.D84];[$Jun.D84];[$Jul.D84];[$Ago.D84];[$Set.D84];[$Out.D84];[$Nov.D84];[$Dez.D84])" office:value-type="float" office:value="0" calcext:value-type="float">
            <text:p><text:s/>R$ -  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1" office:value-type="string" calcext:value-type="string">
            <text:p>Atrasos em contas com juros</text:p>
          </table:table-cell>
          <table:table-cell table:style-name="ce32" table:formula="of:=SUBTOTAL(9;[$Fev.D85];[$Fev.D85];[$Mar.D85];[$Abr.D85];[$Mai.D85];[$Jun.D85];[$Jul.D85];[$Ago.D85];[$Set.D85];[$Out.D85];[$Nov.D85];[$Dez.D85])" office:value-type="float" office:value="0" calcext:value-type="float">
            <text:p><text:s/>R$ -  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1" office:value-type="string" calcext:value-type="string">
            <text:p>Conserto urgente (casa, carro, etc)</text:p>
          </table:table-cell>
          <table:table-cell table:style-name="ce32" table:formula="of:=SUBTOTAL(9;[$Fev.D86];[$Fev.D86];[$Mar.D86];[$Abr.D86];[$Mai.D86];[$Jun.D86];[$Jul.D86];[$Ago.D86];[$Set.D86];[$Out.D86];[$Nov.D86];[$Dez.D86])" office:value-type="float" office:value="880" calcext:value-type="float">
            <text:p><text:s/>R$ 880,00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1" office:value-type="string" calcext:value-type="string">
            <text:p>Ajuda financeira a alguém (urgente)</text:p>
          </table:table-cell>
          <table:table-cell table:style-name="ce32" table:formula="of:=SUBTOTAL(9;[$Fev.D87];[$Fev.D87];[$Mar.D87];[$Abr.D87];[$Mai.D87];[$Jun.D87];[$Jul.D87];[$Ago.D87];[$Set.D87];[$Out.D87];[$Nov.D87];[$Dez.D87])" office:value-type="float" office:value="0" calcext:value-type="float">
            <text:p><text:s/>R$ -  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25"/>
          <table:table-cell table:style-name="ce33" table:formula="of:=SUBTOTAL(9;[$Fev.D88];[$Fev.D88];[$Mar.D88];[$Abr.D88];[$Mai.D88];[$Jun.D88];[$Jul.D88];[$Ago.D88];[$Set.D88];[$Out.D88];[$Nov.D88];[$Dez.D88])" office:value-type="float" office:value="0" calcext:value-type="float">
            <text:p><text:s/>R$ -   </text:p>
          </table:table-cell>
          <table:table-cell table:number-columns-repeated="11"/>
          <table:table-cell table:style-name="Default" table:number-columns-repeated="16369"/>
        </table:table-row>
        <table:table-row table:style-name="ro1">
          <table:table-cell table:number-columns-repeated="15"/>
          <table:table-cell table:style-name="Default" table:number-columns-repeated="16369"/>
        </table:table-row>
        <table:table-row table:style-name="ro1">
          <table:table-cell/>
          <table:table-cell table:style-name="ce11" office:value-type="string" calcext:value-type="string">
            <text:p>Investimentos</text:p>
          </table:table-cell>
          <table:table-cell table:style-name="ce20" office:value-type="string" calcext:value-type="string">
            <text:p>pc</text:p>
          </table:table-cell>
          <table:table-cell table:style-name="ce31" table:formula="of:=SUBTOTAL(9;[$Fev.D90];[$Fev.D90];[$Mar.D90];[$Abr.D90];[$Mai.D90];[$Jun.D90];[$Jul.D90];[$Ago.D90];[$Set.D90];[$Out.D90];[$Nov.D90];[$Dez.D90])" office:value-type="float" office:value="5891.82" calcext:value-type="float">
            <text:p><text:s/>R$ 5.891,82 </text:p>
          </table:table-cell>
          <table:table-cell table:number-columns-repeated="11"/>
          <table:table-cell table:style-name="Default" table:number-columns-repeated="16369"/>
        </table:table-row>
        <table:table-row table:style-name="ro1" table:number-rows-repeated="1048493">
          <table:table-cell table:number-columns-repeated="15"/>
          <table:table-cell table:style-name="Default" table:number-columns-repeated="16369"/>
        </table:table-row>
        <table:table-row table:style-name="ro1">
          <table:table-cell table:number-columns-repeated="15"/>
          <table:table-cell table:style-name="Default" table:number-columns-repeated="16369"/>
        </table:table-row>
      </table:table>
      <table:table table:name="Gastos Fixos anual" table:style-name="ta14">
        <table:shapes>
          <draw:frame draw:z-index="0" draw:name="Gráfico 1" draw:style-name="gr2" draw:text-style-name="P2" svg:width="26.775cm" svg:height="16.615cm" svg:x="0cm" svg:y="0cm">
            <draw:object draw:notify-on-update-of-ranges="Anual.F28:Anual.F38 Anual.G28:Anual.G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9" table:default-cell-style-name="Default"/>
        <table:table-column table:style-name="co59" table:number-columns-repeated="16383"/>
        <table:table-row table:style-name="ro5" table:number-rows-repeated="36">
          <table:table-cell/>
          <table:table-cell table:style-name="Default" table:number-columns-repeated="16383"/>
        </table:table-row>
        <table:table-row table:style-name="ro5">
          <table:table-cell/>
          <table:table-cell table:style-name="Default" table:number-columns-repeated="16383"/>
        </table:table-row>
      </table:table>
      <table:table table:name="Modelo" table:style-name="ta15">
        <table:table-column table:style-name="co1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2" table:default-cell-style-name="ce3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5" table:default-cell-style-name="Default"/>
        <table:table-column table:style-name="co6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15" table:number-columns-repeated="16366"/>
        <table:table-row table:style-name="ro1">
          <table:table-cell table:number-columns-repeated="18"/>
          <table:table-cell table:style-name="Default" table:number-columns-repeated="16366"/>
        </table:table-row>
        <table:table-row table:style-name="ro1">
          <table:table-cell/>
          <table:table-cell table:style-name="ce1" office:value-type="string" calcext:value-type="string">
            <text:p>MÊS</text:p>
          </table:table-cell>
          <table:table-cell table:style-name="ce166" office:value-type="string" calcext:value-type="string">
            <text:p>entradas</text:p>
          </table:table-cell>
          <table:table-cell table:style-name="ce26" office:value-type="string" calcext:value-type="string">
            <text:p>valor</text:p>
          </table:table-cell>
          <table:table-cell table:style-name="ce173"/>
          <table:table-cell table:style-name="ce7" office:value-type="string" calcext:value-type="string">
            <text:p>Saldo mensal</text:p>
          </table:table-cell>
          <table:table-cell table:style-name="ce174"/>
          <table:table-cell table:style-name="ce173"/>
          <table:table-cell/>
          <table:table-cell table:style-name="ce175"/>
          <table:table-cell table:number-columns-repeated="8"/>
          <table:table-cell table:style-name="Default" table:number-columns-repeated="16366"/>
        </table:table-row>
        <table:table-row table:style-name="ro1">
          <table:table-cell/>
          <table:table-cell table:style-name="ce2" office:value-type="string" calcext:value-type="string">
            <text:p>salário</text:p>
          </table:table-cell>
          <table:table-cell table:style-name="ce167"/>
          <table:table-cell table:style-name="ce28"/>
          <table:table-cell table:style-name="ce173"/>
          <table:table-cell table:style-name="ce41" table:formula="of:=SUM([.D3:.D7])" office:value-type="float" office:value="0" calcext:value-type="float">
            <text:p><text:s/>R$ -   </text:p>
          </table:table-cell>
          <table:table-cell table:style-name="ce174"/>
          <table:table-cell table:style-name="ce173"/>
          <table:table-cell table:number-columns-repeated="4"/>
          <table:table-cell table:style-name="ce179" office:value-type="string" calcext:value-type="string">
            <text:p>Topicos</text:p>
          </table:table-cell>
          <table:table-cell table:style-name="ce179" office:value-type="string" calcext:value-type="string">
            <text:p>Sub-tópicos</text:p>
          </table:table-cell>
          <table:table-cell/>
          <table:table-cell table:style-name="ce164" office:value-type="string" calcext:value-type="string">
            <text:p>Alimentação</text:p>
          </table:table-cell>
          <table:table-cell/>
          <table:table-cell table:style-name="ce169" office:value-type="string" calcext:value-type="string">
            <text:p>Internet</text:p>
          </table:table-cell>
          <table:table-cell table:style-name="Default" table:number-columns-repeated="16366"/>
        </table:table-row>
        <table:table-row table:style-name="ro1">
          <table:table-cell/>
          <table:table-cell table:style-name="ce3" office:value-type="string" calcext:value-type="string">
            <text:p>Fotografia</text:p>
          </table:table-cell>
          <table:table-cell table:style-name="ce15"/>
          <table:table-cell table:style-name="ce29"/>
          <table:table-cell/>
          <table:table-cell table:style-name="ce42" table:formula="of:=SUM([.F11:.F32])" office:value-type="float" office:value="0" calcext:value-type="float">
            <text:p><text:s/>R$ -   </text:p>
          </table:table-cell>
          <table:table-cell table:number-columns-repeated="6"/>
          <table:table-cell table:style-name="ce164" table:formula="of:=[.P3]" office:value-type="string" office:string-value="Alimentação" calcext:value-type="string">
            <text:p>Alimentação</text:p>
          </table:table-cell>
          <table:table-cell table:style-name="ce168" office:value-type="string" calcext:value-type="string">
            <text:p>Doces</text:p>
          </table:table-cell>
          <table:table-cell/>
          <table:table-cell table:style-name="ce164" office:value-type="string" calcext:value-type="string">
            <text:p>Lazer</text:p>
          </table:table-cell>
          <table:table-cell/>
          <table:table-cell table:style-name="ce169" office:value-type="string" calcext:value-type="string">
            <text:p>Planos/assinaturas</text:p>
          </table:table-cell>
          <table:table-cell table:style-name="Default" table:number-columns-repeated="16366"/>
        </table:table-row>
        <table:table-row table:style-name="ro1">
          <table:table-cell/>
          <table:table-cell table:style-name="ce4" office:value-type="string" calcext:value-type="string">
            <text:p>extra 2</text:p>
          </table:table-cell>
          <table:table-cell table:style-name="ce16"/>
          <table:table-cell table:style-name="ce29"/>
          <table:table-cell/>
          <table:table-cell table:style-name="ce43" table:formula="of:=[.D4]" office:value-type="float" office:value="0" calcext:value-type="float">
            <text:p><text:s/>R$ -   </text:p>
          </table:table-cell>
          <table:table-cell table:number-columns-repeated="7"/>
          <table:table-cell table:style-name="ce168" office:value-type="string" calcext:value-type="string">
            <text:p>Padaria </text:p>
          </table:table-cell>
          <table:table-cell/>
          <table:table-cell table:style-name="ce164" office:value-type="string" calcext:value-type="string">
            <text:p>Despesas</text:p>
          </table:table-cell>
          <table:table-cell/>
          <table:table-cell table:style-name="ce169" office:value-type="string" calcext:value-type="string">
            <text:p>Agua</text:p>
          </table:table-cell>
          <table:table-cell table:style-name="Default" table:number-columns-repeated="16366"/>
        </table:table-row>
        <table:table-row table:style-name="ro1">
          <table:table-cell/>
          <table:table-cell table:style-name="ce4"/>
          <table:table-cell table:style-name="ce16"/>
          <table:table-cell table:style-name="ce29"/>
          <table:table-cell/>
          <table:table-cell table:style-name="ce44" table:formula="of:=SUM([.K11:.K22])" office:value-type="float" office:value="0" calcext:value-type="float">
            <text:p><text:s/>R$ -   </text:p>
          </table:table-cell>
          <table:table-cell table:number-columns-repeated="7"/>
          <table:table-cell table:style-name="ce168" office:value-type="string" calcext:value-type="string">
            <text:p>Almoço fora</text:p>
          </table:table-cell>
          <table:table-cell/>
          <table:table-cell table:style-name="ce164" office:value-type="string" calcext:value-type="string">
            <text:p>Moradia</text:p>
          </table:table-cell>
          <table:table-cell/>
          <table:table-cell table:style-name="ce169" office:value-type="string" calcext:value-type="string">
            <text:p>Luz</text:p>
          </table:table-cell>
          <table:table-cell table:style-name="Default" table:number-columns-repeated="16366"/>
        </table:table-row>
        <table:table-row table:style-name="ro1">
          <table:table-cell/>
          <table:table-cell table:style-name="ce5" office:value-type="string" calcext:value-type="string">
            <text:p>saldo</text:p>
          </table:table-cell>
          <table:table-cell table:style-name="ce17"/>
          <table:table-cell table:style-name="ce30" office:value-type="string" office:string-value="saldo do mês anterior" calcext:value-type="string">
            <text:p><text:s/>saldo do mês anterior </text:p>
          </table:table-cell>
          <table:table-cell/>
          <table:table-cell table:style-name="ce45" table:formula="of:=[.F3]-[.F4]-[.F6]" office:value-type="float" office:value="0" calcext:value-type="float">
            <text:p><text:s/>R$ -   </text:p>
          </table:table-cell>
          <table:table-cell table:number-columns-repeated="7"/>
          <table:table-cell table:style-name="ce168" office:value-type="string" calcext:value-type="string">
            <text:p>Lanches / Snacks</text:p>
          </table:table-cell>
          <table:table-cell/>
          <table:table-cell table:style-name="ce164" office:value-type="string" calcext:value-type="string">
            <text:p>Transporte</text:p>
          </table:table-cell>
          <table:table-cell/>
          <table:table-cell table:style-name="ce169" office:value-type="string" calcext:value-type="string">
            <text:p>Gasolina</text:p>
          </table:table-cell>
          <table:table-cell table:style-name="Default" table:number-columns-repeated="16366"/>
        </table:table-row>
        <table:table-row table:style-name="ro1">
          <table:table-cell table:number-columns-repeated="13"/>
          <table:table-cell table:style-name="ce168" office:value-type="string" calcext:value-type="string">
            <text:p>Supermercado</text:p>
          </table:table-cell>
          <table:table-cell/>
          <table:table-cell table:style-name="ce164" office:value-type="string" calcext:value-type="string">
            <text:p>Educação</text:p>
          </table:table-cell>
          <table:table-cell/>
          <table:table-cell table:style-name="ce169" office:value-type="string" calcext:value-type="string">
            <text:p>Dizimos</text:p>
          </table:table-cell>
          <table:table-cell table:style-name="Default" table:number-columns-repeated="16366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Variados</text:p>
          </table:table-cell>
          <table:covered-table-cell table:number-columns-repeated="3" table:style-name="ce18"/>
          <table:covered-table-cell table:style-name="ce46"/>
          <table:table-cell/>
          <table:table-cell table:style-name="ce52" office:value-type="string" calcext:value-type="string" table:number-columns-spanned="4" table:number-rows-spanned="1">
            <text:p>Fixos</text:p>
          </table:table-cell>
          <table:covered-table-cell table:number-columns-repeated="3" table:style-name="ce52"/>
          <table:table-cell table:number-columns-repeated="2"/>
          <table:table-cell table:style-name="ce23"/>
          <table:table-cell/>
          <table:table-cell table:style-name="ce164" office:value-type="string" calcext:value-type="string">
            <text:p>Saúde</text:p>
          </table:table-cell>
          <table:table-cell/>
          <table:table-cell table:style-name="ce169" office:value-type="string" calcext:value-type="string">
            <text:p>Ofertas</text:p>
          </table:table-cell>
          <table:table-cell table:style-name="Default" table:number-columns-repeated="16366"/>
        </table:table-row>
        <table:table-row table:style-name="ro1">
          <table:table-cell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topico</text:p>
          </table:table-cell>
          <table:table-cell table:style-name="ce7" office:value-type="string" calcext:value-type="string">
            <text:p>sub-tópico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valor</text:p>
          </table:table-cell>
          <table:table-cell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Topico</text:p>
          </table:table-cell>
          <table:table-cell table:style-name="ce7" office:value-type="string" calcext:value-type="string">
            <text:p>sub-tópico</text:p>
          </table:table-cell>
          <table:table-cell table:style-name="ce7" office:value-type="string" calcext:value-type="string">
            <text:p>valor</text:p>
          </table:table-cell>
          <table:table-cell/>
          <table:table-cell table:style-name="ce164" table:formula="of:=[.P4]" office:value-type="string" office:string-value="Lazer" calcext:value-type="string">
            <text:p>Lazer</text:p>
          </table:table-cell>
          <table:table-cell table:style-name="ce168" office:value-type="string" calcext:value-type="string">
            <text:p>Delivery (iFood, etc)</text:p>
          </table:table-cell>
          <table:table-cell/>
          <table:table-cell table:style-name="ce164" office:value-type="string" calcext:value-type="string">
            <text:p>Imprevistos</text:p>
          </table:table-cell>
          <table:table-cell/>
          <table:table-cell table:style-name="ce169" office:value-type="string" calcext:value-type="string">
            <text:p>Parcelas</text:p>
          </table:table-cell>
          <table:table-cell table:style-name="Default" table:number-columns-repeated="16366"/>
        </table:table-row>
        <table:table-row table:style-name="ro1">
          <table:table-cell/>
          <table:table-cell table:style-name="ce8"/>
          <table:table-cell table:style-name="ce19" table:number-columns-repeated="3"/>
          <table:table-cell table:style-name="ce47"/>
          <table:table-cell/>
          <table:table-cell table:style-name="ce53"/>
          <table:table-cell table:style-name="ce63" table:number-columns-repeated="2"/>
          <table:table-cell table:style-name="ce176"/>
          <table:table-cell table:number-columns-repeated="2"/>
          <table:table-cell table:style-name="ce168" office:value-type="string" calcext:value-type="string">
            <text:p>Cinema / Shows</text:p>
          </table:table-cell>
          <table:table-cell/>
          <table:table-cell table:style-name="ce164" office:value-type="string" calcext:value-type="string">
            <text:p>Investimento</text:p>
          </table:table-cell>
          <table:table-cell/>
          <table:table-cell table:style-name="ce169" office:value-type="string" calcext:value-type="string">
            <text:p>Saúde</text:p>
          </table:table-cell>
          <table:table-cell table:style-name="Default" table:number-columns-repeated="16366"/>
        </table:table-row>
        <table:table-row table:style-name="ro1">
          <table:table-cell/>
          <table:table-cell table:style-name="ce9"/>
          <table:table-cell table:style-name="ce15" table:number-columns-repeated="3"/>
          <table:table-cell table:style-name="ce48"/>
          <table:table-cell/>
          <table:table-cell table:style-name="ce54"/>
          <table:table-cell table:style-name="ce65" table:number-columns-repeated="2"/>
          <table:table-cell table:style-name="ce177"/>
          <table:table-cell table:number-columns-repeated="2"/>
          <table:table-cell table:style-name="ce168" office:value-type="string" calcext:value-type="string">
            <text:p>Passeios / Viagens</text:p>
          </table:table-cell>
          <table:table-cell table:number-columns-repeated="3"/>
          <table:table-cell table:style-name="ce169" office:value-type="string" calcext:value-type="string">
            <text:p>Investimento</text:p>
          </table:table-cell>
          <table:table-cell table:style-name="Default" table:number-columns-repeated="16366"/>
        </table:table-row>
        <table:table-row table:style-name="ro1">
          <table:table-cell/>
          <table:table-cell table:style-name="ce9"/>
          <table:table-cell table:style-name="ce15" table:number-columns-repeated="3"/>
          <table:table-cell table:style-name="ce48"/>
          <table:table-cell/>
          <table:table-cell table:style-name="ce54"/>
          <table:table-cell table:style-name="ce65" table:number-columns-repeated="2"/>
          <table:table-cell table:style-name="ce177"/>
          <table:table-cell table:number-columns-repeated="2"/>
          <table:table-cell table:style-name="ce168" office:value-type="string" calcext:value-type="string">
            <text:p>Jogos / Games / Aplicativos pagos</text:p>
          </table:table-cell>
          <table:table-cell table:number-columns-repeated="3"/>
          <table:table-cell table:style-name="ce169" office:value-type="string" calcext:value-type="string">
            <text:p>Barbeiro</text:p>
          </table:table-cell>
          <table:table-cell table:style-name="Default" table:number-columns-repeated="16366"/>
        </table:table-row>
        <table:table-row table:style-name="ro1">
          <table:table-cell/>
          <table:table-cell table:style-name="ce9"/>
          <table:table-cell table:style-name="ce15" table:number-columns-repeated="3"/>
          <table:table-cell table:style-name="ce48"/>
          <table:table-cell/>
          <table:table-cell table:style-name="ce54"/>
          <table:table-cell table:style-name="ce65" table:number-columns-repeated="2"/>
          <table:table-cell table:style-name="ce177"/>
          <table:table-cell table:number-columns-repeated="2"/>
          <table:table-cell table:style-name="ce168" office:value-type="string" calcext:value-type="string">
            <text:p>Saídas com amigos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table:style-name="ce9"/>
          <table:table-cell table:style-name="ce15" table:number-columns-repeated="3"/>
          <table:table-cell table:style-name="ce48"/>
          <table:table-cell/>
          <table:table-cell table:style-name="ce54"/>
          <table:table-cell table:style-name="ce65" table:number-columns-repeated="2"/>
          <table:table-cell table:style-name="ce177"/>
          <table:table-cell table:number-columns-repeated="2"/>
          <table:table-cell table:style-name="ce168" office:value-type="string" calcext:value-type="string">
            <text:p>Compras por impulso (não essenciais)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table:style-name="ce9"/>
          <table:table-cell table:style-name="ce15" table:number-columns-repeated="3"/>
          <table:table-cell table:style-name="ce48"/>
          <table:table-cell/>
          <table:table-cell table:style-name="ce54"/>
          <table:table-cell table:style-name="ce65" table:number-columns-repeated="2"/>
          <table:table-cell table:style-name="ce177"/>
          <table:table-cell table:number-columns-repeated="2"/>
          <table:table-cell table:style-name="ce180" office:value-type="string" calcext:value-type="string">
            <text:p>Esportes / saidas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table:style-name="ce9"/>
          <table:table-cell table:style-name="ce15" table:number-columns-repeated="3"/>
          <table:table-cell table:style-name="ce48"/>
          <table:table-cell/>
          <table:table-cell table:style-name="ce54"/>
          <table:table-cell table:style-name="ce65" table:number-columns-repeated="2"/>
          <table:table-cell table:style-name="ce177"/>
          <table:table-cell table:number-columns-repeated="2"/>
          <table:table-cell table:style-name="ce169"/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table:style-name="ce9"/>
          <table:table-cell table:style-name="ce15" table:number-columns-repeated="3"/>
          <table:table-cell table:style-name="ce48"/>
          <table:table-cell/>
          <table:table-cell table:style-name="ce54"/>
          <table:table-cell table:style-name="ce65" table:number-columns-repeated="2"/>
          <table:table-cell table:style-name="ce177"/>
          <table:table-cell table:number-columns-repeated="7"/>
          <table:table-cell table:style-name="Default" table:number-columns-repeated="16366"/>
        </table:table-row>
        <table:table-row table:style-name="ro1">
          <table:table-cell/>
          <table:table-cell table:style-name="ce9"/>
          <table:table-cell table:style-name="ce15" table:number-columns-repeated="3"/>
          <table:table-cell table:style-name="ce48"/>
          <table:table-cell/>
          <table:table-cell table:style-name="ce54"/>
          <table:table-cell table:style-name="ce65" table:number-columns-repeated="2"/>
          <table:table-cell table:style-name="ce177"/>
          <table:table-cell/>
          <table:table-cell table:style-name="ce164" table:formula="of:=[.P5]" office:value-type="string" office:string-value="Despesas" calcext:value-type="string">
            <text:p>Despesas</text:p>
          </table:table-cell>
          <table:table-cell table:style-name="ce168" office:value-type="string" calcext:value-type="string">
            <text:p>Presentes e datas comemorativas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table:style-name="ce9"/>
          <table:table-cell table:style-name="ce15" table:number-columns-repeated="3"/>
          <table:table-cell table:style-name="ce48"/>
          <table:table-cell/>
          <table:table-cell table:style-name="ce54"/>
          <table:table-cell table:style-name="ce65" table:number-columns-repeated="2"/>
          <table:table-cell table:style-name="ce177"/>
          <table:table-cell table:number-columns-repeated="2"/>
          <table:table-cell table:style-name="ce168" office:value-type="string" calcext:value-type="string">
            <text:p>Doações / Contribuições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table:style-name="ce9"/>
          <table:table-cell table:style-name="ce15" table:number-columns-repeated="3"/>
          <table:table-cell table:style-name="ce48"/>
          <table:table-cell/>
          <table:table-cell table:style-name="ce54"/>
          <table:table-cell table:style-name="ce65" table:number-columns-repeated="2"/>
          <table:table-cell table:style-name="ce177"/>
          <table:table-cell table:number-columns-repeated="2"/>
          <table:table-cell table:style-name="ce168" office:value-type="string" calcext:value-type="string">
            <text:p>Fotografia (equipamentos e cursos)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table:style-name="ce9"/>
          <table:table-cell table:style-name="ce15" table:number-columns-repeated="3"/>
          <table:table-cell table:style-name="ce48"/>
          <table:table-cell/>
          <table:table-cell table:style-name="ce55"/>
          <table:table-cell table:style-name="ce64" table:number-columns-repeated="2"/>
          <table:table-cell table:style-name="ce178"/>
          <table:table-cell table:number-columns-repeated="2"/>
          <table:table-cell table:style-name="ce168" office:value-type="string" calcext:value-type="string">
            <text:p>Compras online aleatórias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table:style-name="ce9"/>
          <table:table-cell table:style-name="ce15" table:number-columns-repeated="3"/>
          <table:table-cell table:style-name="ce48"/>
          <table:table-cell table:number-columns-repeated="7"/>
          <table:table-cell table:style-name="ce168" office:value-type="string" calcext:value-type="string">
            <text:p>Manutenção da casa (lâmpada, pilha, etc)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table:style-name="ce9"/>
          <table:table-cell table:style-name="ce15" table:number-columns-repeated="3"/>
          <table:table-cell table:style-name="ce48"/>
          <table:table-cell table:number-columns-repeated="7"/>
          <table:table-cell table:style-name="ce168" office:value-type="string" calcext:value-type="string">
            <text:p>Gastos pessoais (roupas, acessórios)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table:style-name="ce9"/>
          <table:table-cell table:style-name="ce15" table:number-columns-repeated="3"/>
          <table:table-cell table:style-name="ce48"/>
          <table:table-cell table:number-columns-repeated="7"/>
          <table:table-cell table:style-name="ce169"/>
          <table:table-cell table:number-columns-repeated="4"/>
          <table:table-cell table:style-name="Default" table:number-columns-repeated="16366"/>
        </table:table-row>
        <table:table-row table:style-name="ro1" table:number-rows-repeated="3">
          <table:table-cell/>
          <table:table-cell table:style-name="ce9"/>
          <table:table-cell table:style-name="ce15" table:number-columns-repeated="3"/>
          <table:table-cell table:style-name="ce48"/>
          <table:table-cell table:number-columns-repeated="12"/>
          <table:table-cell table:style-name="Default" table:number-columns-repeated="16366"/>
        </table:table-row>
        <table:table-row table:style-name="ro1">
          <table:table-cell/>
          <table:table-cell table:style-name="ce9"/>
          <table:table-cell table:style-name="ce15" table:number-columns-repeated="3"/>
          <table:table-cell table:style-name="ce48"/>
          <table:table-cell table:number-columns-repeated="6"/>
          <table:table-cell table:style-name="ce164" table:formula="of:=[.P7]" office:value-type="string" office:string-value="Transporte" calcext:value-type="string">
            <text:p>Transporte</text:p>
          </table:table-cell>
          <table:table-cell table:style-name="ce168" office:value-type="string" calcext:value-type="string">
            <text:p>Acessórios 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table:style-name="ce9"/>
          <table:table-cell table:style-name="ce15" table:number-columns-repeated="3"/>
          <table:table-cell table:style-name="ce48"/>
          <table:table-cell table:number-columns-repeated="7"/>
          <table:table-cell table:style-name="ce168" office:value-type="string" calcext:value-type="string">
            <text:p>Uber / Táxi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table:style-name="ce9"/>
          <table:table-cell table:style-name="ce15" table:number-columns-repeated="3"/>
          <table:table-cell table:style-name="ce48"/>
          <table:table-cell table:number-columns-repeated="7"/>
          <table:table-cell table:style-name="ce168" office:value-type="string" calcext:value-type="string">
            <text:p>Ônibus / Metrô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table:style-name="ce10"/>
          <table:table-cell table:style-name="ce17" table:number-columns-repeated="3"/>
          <table:table-cell table:style-name="ce49"/>
          <table:table-cell table:number-columns-repeated="7"/>
          <table:table-cell table:style-name="ce168" office:value-type="string" calcext:value-type="string">
            <text:p>Estacionamento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 table:number-columns-repeated="13"/>
          <table:table-cell table:style-name="ce168" office:value-type="string" calcext:value-type="string">
            <text:p>Manutenção (óleo, pneu, etc)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 table:number-columns-repeated="13"/>
          <table:table-cell table:style-name="ce168" office:value-type="string" calcext:value-type="string">
            <text:p>Multas / Documentação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table:style-name="ce164" office:value-type="string" calcext:value-type="string">
            <text:p>Alimentação</text:p>
          </table:table-cell>
          <table:table-cell table:style-name="ce168" office:value-type="string" calcext:value-type="string">
            <text:p>Doces</text:p>
          </table:table-cell>
          <table:table-cell table:style-name="ce172" table:formula="of:=SUMIF([.$D$11:.$D$32];[.C35];[.$F$11:.$F$32])" office:value-type="float" office:value="0" calcext:value-type="float">
            <text:p><text:s/>R$ -   </text:p>
          </table:table-cell>
          <table:table-cell table:number-columns-repeated="9"/>
          <table:table-cell table:style-name="ce169"/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table:style-name="ce165" table:formula="of:=SUBTOTAL(9;[.D35:.D39])" office:value-type="float" office:value="0" calcext:value-type="float">
            <text:p><text:s/>R$ -   </text:p>
          </table:table-cell>
          <table:table-cell table:style-name="ce168" office:value-type="string" calcext:value-type="string">
            <text:p>Padaria </text:p>
          </table:table-cell>
          <table:table-cell table:style-name="ce172" table:formula="of:=SUMIF([.$D$11:.$D$32];[.C36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73" office:value-type="string" calcext:value-type="string">
            <text:p>Eventos</text:p>
          </table:table-cell>
          <table:table-cell table:style-name="ce76" office:value-type="string" calcext:value-type="string">
            <text:p>Data</text:p>
          </table:table-cell>
          <table:table-cell table:style-name="ce80" office:value-type="string" calcext:value-type="string">
            <text:p>Descrição</text:p>
          </table:table-cell>
          <table:table-cell table:style-name="ce84" office:value-type="string" calcext:value-type="string">
            <text:p>Entradas</text:p>
          </table:table-cell>
          <table:table-cell table:number-columns-repeated="7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68" office:value-type="string" calcext:value-type="string">
            <text:p><text:s/>Almoço fora</text:p>
          </table:table-cell>
          <table:table-cell table:style-name="ce172" table:formula="of:=SUMIF([.$D$11:.$D$32];[.C37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74"/>
          <table:table-cell table:style-name="ce77"/>
          <table:table-cell table:style-name="ce81"/>
          <table:table-cell table:style-name="ce68"/>
          <table:table-cell/>
          <table:table-cell table:style-name="ce164" table:formula="of:=[.P8]" office:value-type="string" office:string-value="Educação" calcext:value-type="string">
            <text:p>Educação</text:p>
          </table:table-cell>
          <table:table-cell table:style-name="ce170" office:value-type="string" calcext:value-type="string">
            <text:p>Mensalidade de curso / escola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68" office:value-type="string" calcext:value-type="string">
            <text:p>Lanches / Snacks</text:p>
          </table:table-cell>
          <table:table-cell table:style-name="ce172" table:formula="of:=SUMIF([.$D$11:.$D$32];[.C38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75"/>
          <table:table-cell table:style-name="ce78"/>
          <table:table-cell table:style-name="ce82"/>
          <table:table-cell table:style-name="ce69"/>
          <table:table-cell table:number-columns-repeated="2"/>
          <table:table-cell table:style-name="ce170" office:value-type="string" calcext:value-type="string">
            <text:p>Cursos online (Udemy, Alura, etc)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68"/>
          <table:table-cell table:style-name="ce172" table:formula="of:=SUMIF([.$D$11:.$D$32];[.C39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75"/>
          <table:table-cell table:style-name="ce78"/>
          <table:table-cell table:style-name="ce82"/>
          <table:table-cell table:style-name="ce69"/>
          <table:table-cell table:number-columns-repeated="2"/>
          <table:table-cell table:style-name="ce170" office:value-type="string" calcext:value-type="string">
            <text:p>Material escolar / didático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23"/>
          <table:table-cell table:number-columns-repeated="4"/>
          <table:table-cell table:style-name="ce75"/>
          <table:table-cell table:style-name="ce78"/>
          <table:table-cell table:style-name="ce82"/>
          <table:table-cell table:style-name="ce69"/>
          <table:table-cell table:number-columns-repeated="2"/>
          <table:table-cell table:style-name="ce170" office:value-type="string" calcext:value-type="string">
            <text:p>Livros e apostilas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table:style-name="ce164" office:value-type="string" calcext:value-type="string">
            <text:p>Lazer</text:p>
          </table:table-cell>
          <table:table-cell table:style-name="ce168" office:value-type="string" calcext:value-type="string">
            <text:p>Delivery (iFood, etc)</text:p>
          </table:table-cell>
          <table:table-cell table:style-name="ce172" table:formula="of:=SUMIF([.$D$11:.$D$32];[.C41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75"/>
          <table:table-cell table:style-name="ce78"/>
          <table:table-cell table:style-name="ce82"/>
          <table:table-cell table:style-name="ce69"/>
          <table:table-cell table:number-columns-repeated="2"/>
          <table:table-cell table:style-name="ce170" office:value-type="string" calcext:value-type="string">
            <text:p>Internet dedicada para estudos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table:style-name="ce165" table:formula="of:=SUBTOTAL(9;[.D41:.D48])" office:value-type="float" office:value="0" calcext:value-type="float">
            <text:p><text:s/>R$ -   </text:p>
          </table:table-cell>
          <table:table-cell table:style-name="ce168" office:value-type="string" calcext:value-type="string">
            <text:p>Cinema / Shows</text:p>
          </table:table-cell>
          <table:table-cell table:style-name="ce172" table:formula="of:=SUMIF([.$D$11:.$D$32];[.C42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75"/>
          <table:table-cell table:style-name="ce78"/>
          <table:table-cell table:style-name="ce82"/>
          <table:table-cell table:style-name="ce69"/>
          <table:table-cell table:number-columns-repeated="2"/>
          <table:table-cell table:style-name="ce170" office:value-type="string" calcext:value-type="string">
            <text:p>Plataformas de aprendizado 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68" office:value-type="string" calcext:value-type="string">
            <text:p>Passeios / Viagens</text:p>
          </table:table-cell>
          <table:table-cell table:style-name="ce172" table:formula="of:=SUMIF([.$D$11:.$D$32];[.C43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75"/>
          <table:table-cell table:style-name="ce78"/>
          <table:table-cell table:style-name="ce82"/>
          <table:table-cell table:style-name="ce69"/>
          <table:table-cell table:number-columns-repeated="2"/>
          <table:table-cell table:style-name="ce171"/>
          <table:table-cell table:number-columns-repeated="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68" office:value-type="string" calcext:value-type="string">
            <text:p>Compras por impulso (não essenciais)</text:p>
          </table:table-cell>
          <table:table-cell table:style-name="ce172" table:formula="of:=SUMIF([.$D$11:.$D$32];[.C44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75"/>
          <table:table-cell table:style-name="ce78"/>
          <table:table-cell table:style-name="ce82"/>
          <table:table-cell table:style-name="ce69"/>
          <table:table-cell table:number-columns-repeated="7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68" office:value-type="string" calcext:value-type="string">
            <text:p><text:s/>Jogos / Games / Aplicativos pagos</text:p>
          </table:table-cell>
          <table:table-cell table:style-name="ce172" table:formula="of:=SUMIF([.$D$11:.$D$32];[.C45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75"/>
          <table:table-cell table:style-name="ce78"/>
          <table:table-cell table:style-name="ce82"/>
          <table:table-cell table:style-name="ce69"/>
          <table:table-cell/>
          <table:table-cell table:style-name="ce164" table:formula="of:=[.P9]" office:value-type="string" office:string-value="Saúde" calcext:value-type="string">
            <text:p>Saúde</text:p>
          </table:table-cell>
          <table:table-cell table:style-name="ce168" office:value-type="string" calcext:value-type="string">
            <text:p>Medicamentos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68" office:value-type="string" calcext:value-type="string">
            <text:p>Saídas com amigos</text:p>
          </table:table-cell>
          <table:table-cell table:style-name="ce172" table:formula="of:=SUMIF([.$D$11:.$D$32];[.C46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75"/>
          <table:table-cell table:style-name="ce78"/>
          <table:table-cell table:style-name="ce82"/>
          <table:table-cell table:style-name="ce69"/>
          <table:table-cell table:number-columns-repeated="2"/>
          <table:table-cell table:style-name="ce168" office:value-type="string" calcext:value-type="string">
            <text:p>Consultas médicas / exames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69"/>
          <table:table-cell table:style-name="ce172" table:formula="of:=SUMIF([.$D$11:.$D$32];[.C47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75"/>
          <table:table-cell table:style-name="ce78"/>
          <table:table-cell table:style-name="ce82"/>
          <table:table-cell table:style-name="ce69"/>
          <table:table-cell table:number-columns-repeated="2"/>
          <table:table-cell table:style-name="ce168" office:value-type="string" calcext:value-type="string">
            <text:p>Plano de saúde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69"/>
          <table:table-cell table:style-name="ce172" table:formula="of:=SUMIF([.$D$11:.$D$32];[.C48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75"/>
          <table:table-cell table:style-name="ce78"/>
          <table:table-cell table:style-name="ce82"/>
          <table:table-cell table:style-name="ce69"/>
          <table:table-cell table:number-columns-repeated="2"/>
          <table:table-cell table:style-name="ce168" office:value-type="string" calcext:value-type="string">
            <text:p>Óculos / lentes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 table:number-columns-repeated="7"/>
          <table:table-cell table:style-name="ce75"/>
          <table:table-cell table:style-name="ce78"/>
          <table:table-cell table:style-name="ce82"/>
          <table:table-cell table:style-name="ce69"/>
          <table:table-cell table:number-columns-repeated="2"/>
          <table:table-cell table:style-name="ce168" office:value-type="string" calcext:value-type="string">
            <text:p>Academia / Personal trainer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table:style-name="ce164" office:value-type="string" calcext:value-type="string">
            <text:p>Despesas</text:p>
          </table:table-cell>
          <table:table-cell table:style-name="ce168" office:value-type="string" calcext:value-type="string">
            <text:p>Presentes e datas comemorativas</text:p>
          </table:table-cell>
          <table:table-cell table:style-name="ce172" table:formula="of:=SUMIF([.$D$11:.$D$32];[.C50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75"/>
          <table:table-cell table:style-name="ce78"/>
          <table:table-cell table:style-name="ce82"/>
          <table:table-cell table:style-name="ce69"/>
          <table:table-cell table:number-columns-repeated="2"/>
          <table:table-cell table:style-name="ce168" office:value-type="string" calcext:value-type="string">
            <text:p>Produtos de higiene e cuidados pessoais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table:style-name="ce165" table:formula="of:=SUBTOTAL(9;[.D50:.D56])" office:value-type="float" office:value="0" calcext:value-type="float">
            <text:p><text:s/>R$ -   </text:p>
          </table:table-cell>
          <table:table-cell table:style-name="ce168" office:value-type="string" calcext:value-type="string">
            <text:p>Doações / Contribuições</text:p>
          </table:table-cell>
          <table:table-cell table:style-name="ce172" table:formula="of:=SUMIF([.$D$11:.$D$32];[.C51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75"/>
          <table:table-cell table:style-name="ce78"/>
          <table:table-cell table:style-name="ce82"/>
          <table:table-cell table:style-name="ce69"/>
          <table:table-cell table:number-columns-repeated="2"/>
          <table:table-cell table:style-name="ce169"/>
          <table:table-cell table:number-columns-repeated="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68" office:value-type="string" calcext:value-type="string">
            <text:p>Taxas bancárias / Pix por engano</text:p>
          </table:table-cell>
          <table:table-cell table:style-name="ce172" table:formula="of:=SUMIF([.$D$11:.$D$32];[.C52];[.$F$11:.$F$32])" office:value-type="float" office:value="0" calcext:value-type="float">
            <text:p><text:s/>R$ -   </text:p>
          </table:table-cell>
          <table:table-cell table:number-columns-repeated="3"/>
          <table:table-cell table:style-name="ce25"/>
          <table:table-cell table:style-name="ce79"/>
          <table:table-cell table:style-name="ce83"/>
          <table:table-cell table:style-name="ce70"/>
          <table:table-cell table:number-columns-repeated="7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68" office:value-type="string" calcext:value-type="string">
            <text:p>Compras online aleatórias</text:p>
          </table:table-cell>
          <table:table-cell table:style-name="ce172" table:formula="of:=SUMIF([.$D$11:.$D$32];[.C53];[.$F$11:.$F$32])" office:value-type="float" office:value="0" calcext:value-type="float">
            <text:p><text:s/>R$ -   </text:p>
          </table:table-cell>
          <table:table-cell table:number-columns-repeated="8"/>
          <table:table-cell table:style-name="ce164" table:formula="of:=[.P10]" office:value-type="string" office:string-value="Imprevistos" calcext:value-type="string">
            <text:p>Imprevistos</text:p>
          </table:table-cell>
          <table:table-cell table:style-name="ce168" office:value-type="string" calcext:value-type="string">
            <text:p>Emergência médica ou odontológica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68" office:value-type="string" calcext:value-type="string">
            <text:p>Manutenção da casa (lâmpada, pilha, etc)</text:p>
          </table:table-cell>
          <table:table-cell table:style-name="ce172" table:formula="of:=SUMIF([.$D$11:.$D$32];[.C54];[.$F$11:.$F$32])" office:value-type="float" office:value="0" calcext:value-type="float">
            <text:p><text:s/>R$ -   </text:p>
          </table:table-cell>
          <table:table-cell table:number-columns-repeated="9"/>
          <table:table-cell table:style-name="ce168" office:value-type="string" calcext:value-type="string">
            <text:p>Equipamento quebrado (celular, notebook)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68" office:value-type="string" calcext:value-type="string">
            <text:p>Gastos pessoais (roupas, acessórios)</text:p>
          </table:table-cell>
          <table:table-cell table:style-name="ce172" table:formula="of:=SUMIF([.$D$11:.$D$32];[.C55];[.$F$11:.$F$32])" office:value-type="float" office:value="0" calcext:value-type="float">
            <text:p><text:s/>R$ -   </text:p>
          </table:table-cell>
          <table:table-cell table:number-columns-repeated="9"/>
          <table:table-cell table:style-name="ce168" office:value-type="string" calcext:value-type="string">
            <text:p>Perda de documentos / taxas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69"/>
          <table:table-cell table:style-name="ce172" table:formula="of:=SUMIF([.$D$11:.$D$32];[.C56];[.$F$11:.$F$32])" office:value-type="float" office:value="0" calcext:value-type="float">
            <text:p><text:s/>R$ -   </text:p>
          </table:table-cell>
          <table:table-cell table:number-columns-repeated="9"/>
          <table:table-cell table:style-name="ce168" office:value-type="string" calcext:value-type="string">
            <text:p>Atrasos em contas com juros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 table:number-columns-repeated="13"/>
          <table:table-cell table:style-name="ce168" office:value-type="string" calcext:value-type="string">
            <text:p>Conserto urgente (casa, carro, etc)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table:style-name="ce164" office:value-type="string" calcext:value-type="string">
            <text:p>Transporte</text:p>
          </table:table-cell>
          <table:table-cell table:style-name="ce168" office:value-type="string" calcext:value-type="string">
            <text:p>Acessório</text:p>
          </table:table-cell>
          <table:table-cell table:style-name="ce172" table:formula="of:=SUMIF([.$D$11:.$D$32];[.C58];[.$F$11:.$F$32])" office:value-type="float" office:value="0" calcext:value-type="float">
            <text:p><text:s/>R$ -   </text:p>
          </table:table-cell>
          <table:table-cell table:number-columns-repeated="9"/>
          <table:table-cell table:style-name="ce168" office:value-type="string" calcext:value-type="string">
            <text:p>Ajuda financeira a alguém (urgente)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table:style-name="ce165" table:formula="of:=SUBTOTAL(9;[.D58:.D64])" office:value-type="float" office:value="0" calcext:value-type="float">
            <text:p><text:s/>R$ -   </text:p>
          </table:table-cell>
          <table:table-cell table:style-name="ce168" office:value-type="string" calcext:value-type="string">
            <text:p>Uber / Táxi</text:p>
          </table:table-cell>
          <table:table-cell table:style-name="ce172" table:formula="of:=SUMIF([.$D$11:.$D$32];[.C59];[.$F$11:.$F$32])" office:value-type="float" office:value="0" calcext:value-type="float">
            <text:p><text:s/>R$ -   </text:p>
          </table:table-cell>
          <table:table-cell table:number-columns-repeated="9"/>
          <table:table-cell table:style-name="ce169"/>
          <table:table-cell table:number-columns-repeated="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68" office:value-type="string" calcext:value-type="string">
            <text:p>Ônibus / Metrô</text:p>
          </table:table-cell>
          <table:table-cell table:style-name="ce172" table:formula="of:=SUMIF([.$D$11:.$D$32];[.C60];[.$F$11:.$F$32])" office:value-type="float" office:value="0" calcext:value-type="float">
            <text:p><text:s/>R$ -   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68" office:value-type="string" calcext:value-type="string">
            <text:p>Estacionamento</text:p>
          </table:table-cell>
          <table:table-cell table:style-name="ce172" table:formula="of:=SUMIF([.$D$11:.$D$32];[.C61];[.$F$11:.$F$32])" office:value-type="float" office:value="0" calcext:value-type="float">
            <text:p><text:s/>R$ -   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68" office:value-type="string" calcext:value-type="string">
            <text:p>Manutenção (óleo, pneu, etc)</text:p>
          </table:table-cell>
          <table:table-cell table:style-name="ce172" table:formula="of:=SUMIF([.$D$11:.$D$32];[.C62];[.$F$11:.$F$32])" office:value-type="float" office:value="0" calcext:value-type="float">
            <text:p><text:s/>R$ -   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68" office:value-type="string" calcext:value-type="string">
            <text:p>Multas / Documentação</text:p>
          </table:table-cell>
          <table:table-cell table:style-name="ce172" table:formula="of:=SUMIF([.$D$11:.$D$32];[.C63];[.$F$11:.$F$32])" office:value-type="float" office:value="0" calcext:value-type="float">
            <text:p><text:s/>R$ -   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69"/>
          <table:table-cell table:style-name="ce172" table:formula="of:=SUMIF([.$D$11:.$D$32];[.C64];[.$F$11:.$F$32])" office:value-type="float" office:value="0" calcext:value-type="float">
            <text:p><text:s/>R$ -   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  <table:table-row table:style-name="ro1">
          <table:table-cell/>
          <table:table-cell table:style-name="ce164" office:value-type="string" calcext:value-type="string">
            <text:p>Educação</text:p>
          </table:table-cell>
          <table:table-cell table:style-name="ce170" office:value-type="string" calcext:value-type="string">
            <text:p>Livros </text:p>
          </table:table-cell>
          <table:table-cell table:style-name="ce172" table:formula="of:=SUMIF([.$D$11:.$D$32];[.C66];[.$F$11:.$F$32])" office:value-type="float" office:value="0" calcext:value-type="float">
            <text:p><text:s/>R$ -   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/>
          <table:table-cell table:style-name="ce165" table:formula="of:=SUBTOTAL(9;[.D66:.D72])" office:value-type="float" office:value="0" calcext:value-type="float">
            <text:p><text:s/>R$ -   </text:p>
          </table:table-cell>
          <table:table-cell table:style-name="ce170" office:value-type="string" calcext:value-type="string">
            <text:p>Cursos online (Udemy, Alura, etc)</text:p>
          </table:table-cell>
          <table:table-cell table:style-name="ce172" table:formula="of:=SUMIF([.$D$11:.$D$32];[.C67];[.$F$11:.$F$32])" office:value-type="float" office:value="0" calcext:value-type="float">
            <text:p><text:s/>R$ -   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70" office:value-type="string" calcext:value-type="string">
            <text:p>Material escolar / didático</text:p>
          </table:table-cell>
          <table:table-cell table:style-name="ce172" table:formula="of:=SUMIF([.$D$11:.$D$32];[.C68];[.$F$11:.$F$32])" office:value-type="float" office:value="0" calcext:value-type="float">
            <text:p><text:s/>R$ -   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70" office:value-type="string" calcext:value-type="string">
            <text:p>Apostilas</text:p>
          </table:table-cell>
          <table:table-cell table:style-name="ce172" table:formula="of:=SUMIF([.$D$11:.$D$32];[.C69];[.$F$11:.$F$32])" office:value-type="float" office:value="0" calcext:value-type="float">
            <text:p><text:s/>R$ -   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70" office:value-type="string" calcext:value-type="string">
            <text:p>Internet dedicada para estudos</text:p>
          </table:table-cell>
          <table:table-cell table:style-name="ce172" table:formula="of:=SUMIF([.$D$11:.$D$32];[.C70];[.$F$11:.$F$32])" office:value-type="float" office:value="0" calcext:value-type="float">
            <text:p><text:s/>R$ -   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70" office:value-type="string" calcext:value-type="string">
            <text:p>Plataformas de aprendizado </text:p>
          </table:table-cell>
          <table:table-cell table:style-name="ce172" table:formula="of:=SUMIF([.$D$11:.$D$32];[.C71];[.$F$11:.$F$32])" office:value-type="float" office:value="0" calcext:value-type="float">
            <text:p><text:s/>R$ -   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71"/>
          <table:table-cell table:style-name="ce172" table:formula="of:=SUMIF([.$D$11:.$D$32];[.C72];[.$F$11:.$F$32])" office:value-type="float" office:value="0" calcext:value-type="float">
            <text:p><text:s/>R$ -   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  <table:table-row table:style-name="ro1">
          <table:table-cell/>
          <table:table-cell table:style-name="ce164" office:value-type="string" calcext:value-type="string">
            <text:p>Saúde</text:p>
          </table:table-cell>
          <table:table-cell table:style-name="ce168" office:value-type="string" calcext:value-type="string">
            <text:p>Medicamentos</text:p>
          </table:table-cell>
          <table:table-cell table:style-name="ce172" table:formula="of:=SUMIF([.$D$11:.$D$32];[.C74];[.$F$11:.$F$32])" office:value-type="float" office:value="0" calcext:value-type="float">
            <text:p><text:s/>R$ -   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/>
          <table:table-cell table:style-name="ce165" table:formula="of:=SUBTOTAL(9;[.D74:.D80])" office:value-type="float" office:value="0" calcext:value-type="float">
            <text:p><text:s/>R$ -   </text:p>
          </table:table-cell>
          <table:table-cell table:style-name="ce168" office:value-type="string" calcext:value-type="string">
            <text:p>Consultas médicas / exames</text:p>
          </table:table-cell>
          <table:table-cell table:style-name="ce172" table:formula="of:=SUMIF([.$D$11:.$D$32];[.C75];[.$F$11:.$F$32])" office:value-type="float" office:value="0" calcext:value-type="float">
            <text:p><text:s/>R$ -   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68" office:value-type="string" calcext:value-type="string">
            <text:p>Óculos / lentes</text:p>
          </table:table-cell>
          <table:table-cell table:style-name="ce172" table:formula="of:=SUMIF([.$D$11:.$D$32];[.C76];[.$F$11:.$F$32])" office:value-type="float" office:value="0" calcext:value-type="float">
            <text:p><text:s/>R$ -   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68" office:value-type="string" calcext:value-type="string">
            <text:p>Produtos de higiene e cuidados pessoais</text:p>
          </table:table-cell>
          <table:table-cell table:style-name="ce172" table:formula="of:=SUMIF([.$D$11:.$D$32];[.C77];[.$F$11:.$F$32])" office:value-type="float" office:value="0" calcext:value-type="float">
            <text:p><text:s/>R$ -   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69"/>
          <table:table-cell table:style-name="ce172" table:formula="of:=SUMIF([.$D$11:.$D$32];[.C78];[.$F$11:.$F$32])" office:value-type="float" office:value="0" calcext:value-type="float">
            <text:p><text:s/>R$ -   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69"/>
          <table:table-cell table:style-name="ce172" table:formula="of:=SUMIF([.$D$11:.$D$32];[.C79];[.$F$11:.$F$32])" office:value-type="float" office:value="0" calcext:value-type="float">
            <text:p><text:s/>R$ -   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69"/>
          <table:table-cell table:style-name="ce172" table:formula="of:=SUMIF([.$D$11:.$D$32];[.C80];[.$F$11:.$F$32])" office:value-type="float" office:value="0" calcext:value-type="float">
            <text:p><text:s/>R$ -   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  <table:table-row table:style-name="ro1">
          <table:table-cell/>
          <table:table-cell table:style-name="ce164" office:value-type="string" calcext:value-type="string">
            <text:p>Imprevistos</text:p>
          </table:table-cell>
          <table:table-cell table:style-name="ce168" office:value-type="string" calcext:value-type="string">
            <text:p>Emergência médica ou odontológica</text:p>
          </table:table-cell>
          <table:table-cell table:style-name="ce172" table:formula="of:=SUMIF([.$D$11:.$D$32];[.C82];[.$F$11:.$F$32])" office:value-type="float" office:value="0" calcext:value-type="float">
            <text:p><text:s/>R$ -   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/>
          <table:table-cell table:style-name="ce165" table:formula="of:=SUBTOTAL(9;[.D82:.D88])" office:value-type="float" office:value="0" calcext:value-type="float">
            <text:p><text:s/>R$ -   </text:p>
          </table:table-cell>
          <table:table-cell table:style-name="ce168" office:value-type="string" calcext:value-type="string">
            <text:p>Equipamento quebrado (celular, notebook)</text:p>
          </table:table-cell>
          <table:table-cell table:style-name="ce172" table:formula="of:=SUMIF([.$D$11:.$D$32];[.C83];[.$F$11:.$F$32])" office:value-type="float" office:value="0" calcext:value-type="float">
            <text:p><text:s/>R$ -   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68" office:value-type="string" calcext:value-type="string">
            <text:p>Perda de documentos / taxas</text:p>
          </table:table-cell>
          <table:table-cell table:style-name="ce172" table:formula="of:=SUMIF([.$D$11:.$D$32];[.C84];[.$F$11:.$F$32])" office:value-type="float" office:value="0" calcext:value-type="float">
            <text:p><text:s/>R$ -   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68" office:value-type="string" calcext:value-type="string">
            <text:p>Atrasos em contas com juros</text:p>
          </table:table-cell>
          <table:table-cell table:style-name="ce172" table:formula="of:=SUMIF([.$D$11:.$D$32];[.C85];[.$F$11:.$F$32])" office:value-type="float" office:value="0" calcext:value-type="float">
            <text:p><text:s/>R$ -   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68" office:value-type="string" calcext:value-type="string">
            <text:p>Conserto urgente (casa, carro, etc)</text:p>
          </table:table-cell>
          <table:table-cell table:style-name="ce172" table:formula="of:=SUMIF([.$D$11:.$D$32];[.C86];[.$F$11:.$F$32])" office:value-type="float" office:value="0" calcext:value-type="float">
            <text:p><text:s/>R$ -   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68" office:value-type="string" calcext:value-type="string">
            <text:p>Ajuda financeira a alguém (urgente)</text:p>
          </table:table-cell>
          <table:table-cell table:style-name="ce172" table:formula="of:=SUMIF([.$D$11:.$D$32];[.C87];[.$F$11:.$F$32])" office:value-type="float" office:value="0" calcext:value-type="float">
            <text:p><text:s/>R$ -   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69"/>
          <table:table-cell table:style-name="ce172" table:formula="of:=SUMIF([.$D$11:.$D$32];[.C88];[.$F$11:.$F$32])" office:value-type="float" office:value="0" calcext:value-type="float">
            <text:p><text:s/>R$ -   </text:p>
          </table:table-cell>
          <table:table-cell table:number-columns-repeated="14"/>
          <table:table-cell table:style-name="Default" table:number-columns-repeated="16366"/>
        </table:table-row>
        <table:table-row table:style-name="ro1" table:number-rows-repeated="1048487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</table:table>
      <table:named-expressions>
        <table:named-range table:name="Alimentação" table:base-cell-address="$Jan.$A$1" table:cell-range-address="$Modelo.$N$4:.$N$8"/>
        <table:named-range table:name="Despesas" table:base-cell-address="$Jan.$A$1" table:cell-range-address="$Modelo.$N$19:.$N$25"/>
        <table:named-range table:name="Educação" table:base-cell-address="$Jan.$A$1" table:cell-range-address="$Modelo.$N$37:.$N$43"/>
        <table:named-range table:name="Imprevistos" table:base-cell-address="$Jan.$A$1" table:cell-range-address="$Modelo.$N$53:.$N$59"/>
        <table:named-range table:name="Lazer" table:base-cell-address="$Jan.$A$1" table:cell-range-address="$Modelo.$N$10:.$N$17"/>
        <table:named-expression table:name="Moradia" table:base-cell-address="$Jan.$A$1" table:expression="modelo!#ref!"/>
        <table:named-range table:name="Saúde" table:base-cell-address="$Jan.$A$1" table:cell-range-address="$Modelo.$N$45:.$N$51"/>
        <table:named-range table:name="Transporte" table:base-cell-address="$Jan.$A$1" table:cell-range-address="$Modelo.$N$29:.$N$3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2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7" number:automatic-order="true" number:format-source="language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38P0" style:volatile="true">
      <number:text loext:blank-width-char="("> R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8P1" style:volatile="true">
      <number:text loext:blank-width-char="("> R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 loext:blank-width-char="("> R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32"/>
    <draw:marker draw:name="Pontas_20_das_20_setas_20_1" draw:display-name="Pontas das setas 1" svg:viewBox="0 0 20 30" svg:d="M10 0l-10 30h20z"/>
    <loext:theme loext:name="Tema do Office">
      <loext:theme-colors loext:name="Escritório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landscape" fo:margin-top="2cm" fo:margin-bottom="2cm" fo:margin-left="1.3cm" fo:margin-right="1.3cm" style:print-page-order="ttb" style:first-page-number="continue" style:scale-to-pages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ez" style:display-name="PageStyle_Dez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r" style:display-name="PageStyle_Ma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stos_20_Fixos_20_anual" style:display-name="PageStyle_Gastos Fixos anua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v" style:display-name="PageStyle_No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t" style:display-name="PageStyle_S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i" style:display-name="PageStyle_Ma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r" style:display-name="PageStyle_Ab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an" style:display-name="PageStyle_Jan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go" style:display-name="PageStyle_Ag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v" style:display-name="PageStyle_Fe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ut" style:display-name="PageStyle_Ou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un" style:display-name="PageStyle_Ju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ul" style:display-name="PageStyle_Ju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ual" style:display-name="PageStyle_Anu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delo" style:display-name="PageStyle_Model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55319</meta:initial-creator>
    <meta:creation-date>2025-07-09T15:01:32</meta:creation-date>
    <dc:date>2026-06-21T17:19:03.200168305</dc:date>
    <meta:generator>LibreOffice/26.2.4.2$Linux_X86_64 LibreOffice_project/620$Build-2</meta:generator>
    <meta:editing-duration>PT2M15S</meta:editing-duration>
    <meta:editing-cycles>1</meta:editing-cycles>
    <meta:document-statistic meta:table-count="15" meta:cell-count="3121" meta:object-count="1"/>
    <meta:user-defined meta:name="AppVersion">15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2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8P0" style:volatile="true">
      <number:text loext:blank-width-char="("> R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8P1" style:volatile="true">
      <number:text loext:blank-width-char="("> R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 loext:blank-width-char="("> R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ch1" style:family="chart">
      <style:graphic-properties draw:stroke="none" svg:stroke-width="0.026cm" draw:fill="gradient" draw:fill-gradient-name="msFillGradient_20_1"/>
    </style:style>
    <style:style style:name="ch2" style:family="chart">
      <style:graphic-properties draw:stroke="none" draw:fill="none" draw:fill-color="#d9d9d9"/>
      <style:text-properties fo:color="#d9d9d9" style:text-position="0% 100%" fo:font-family="Calibri" fo:font-size="12pt" style:font-size-asian="12pt" style:font-size-complex="12pt">
        <loext:char-complex-color loext:theme-type="light1" loext:color-type="theme">
          <loext:transformation loext:type="lummod" loext:value="8500"/>
        </loext:char-complex-color>
      </style:text-properties>
    </style:style>
    <style:style style:name="ch3" style:family="chart">
      <style:chart-properties chart:three-dimensional="true" chart:include-hidden-cells="false" chart:treat-empty-cells="leave-gap" chart:data-label-number="percentag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32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13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38">
      <style:chart-properties chart:link-data-style-to-source="true" chart:data-label-number="percentage" chart:data-label-text="false" chart:data-label-symbol="false" chart:data-label-series="false" chart:label-position="avoid-overlap">
        <chart:label-separator>
          <text:p><text:line-break/></text:p>
        </chart:label-separator>
      </style:chart-properties>
      <style:graphic-properties draw:stroke="none" svg:stroke-color="#f2f2f2" draw:fill-color="#5b9bd5" fo:wrap-option="wrap">
        <loext:stroke-complex-color loext:theme-type="light1" loext:color-type="theme">
          <loext:transformation loext:type="lummod" loext:value="9500"/>
        </loext:stroke-complex-color>
      </style:graphic-properties>
      <style:text-properties fo:color="#d9d9d9" style:text-position="0% 100%" fo:font-family="Calibri" fo:font-size="16pt" style:font-size-asian="16pt" style:font-size-complex="16pt">
        <loext:char-complex-color loext:theme-type="light1" loext:color-type="theme">
          <loext:transformation loext:type="lummod" loext:value="8500"/>
        </loext:char-complex-color>
      </style:text-properties>
    </style:style>
    <style:style style:name="ch8" style:family="chart">
      <style:chart-properties chart:solid-type="cuboid"/>
      <style:graphic-properties draw:fill="gradient" draw:fill-color="#518abd" draw:fill-gradient-name="msFillGradient_20_2"/>
    </style:style>
    <style:style style:name="ch9" style:family="chart">
      <style:chart-properties chart:solid-type="cuboid"/>
      <style:graphic-properties draw:fill="gradient" draw:fill-color="#d36f2b" draw:fill-gradient-name="msFillGradient_20_3"/>
    </style:style>
    <style:style style:name="ch10" style:family="chart">
      <style:chart-properties chart:solid-type="cuboid"/>
      <style:graphic-properties draw:fill="gradient" draw:fill-color="#929292" draw:fill-gradient-name="msFillGradient_20_4"/>
    </style:style>
    <style:style style:name="ch11" style:family="chart">
      <style:chart-properties chart:solid-type="cuboid"/>
      <style:graphic-properties draw:fill="gradient" draw:fill-color="#e3ab00" draw:fill-gradient-name="msFillGradient_20_5"/>
    </style:style>
    <style:style style:name="ch12" style:family="chart">
      <style:chart-properties chart:solid-type="cuboid"/>
      <style:graphic-properties draw:fill="gradient" draw:fill-color="#3c65ae" draw:fill-gradient-name="msFillGradient_20_6"/>
    </style:style>
    <style:style style:name="ch13" style:family="chart">
      <style:chart-properties chart:solid-type="cuboid"/>
      <style:graphic-properties draw:fill="gradient" draw:fill-color="#639a3f" draw:fill-gradient-name="msFillGradient_20_7"/>
    </style:style>
    <style:style style:name="ch14" style:family="chart">
      <style:chart-properties chart:solid-type="cuboid"/>
      <style:graphic-properties draw:fill="gradient" draw:fill-color="#98b8df" draw:fill-gradient-name="msFillGradient_20_8"/>
    </style:style>
    <style:style style:name="ch15" style:family="chart">
      <style:chart-properties chart:solid-type="cuboid"/>
      <style:graphic-properties draw:fill-color="#f63838"/>
    </style:style>
    <style:style style:name="ch16" style:family="chart">
      <style:chart-properties chart:solid-type="cuboid"/>
      <style:graphic-properties draw:fill="gradient" draw:fill-color="#bfbfbf" draw:fill-gradient-name="msFillGradient_20_9"/>
    </style:style>
    <style:style style:name="ch17" style:family="chart">
      <style:chart-properties chart:solid-type="cuboid"/>
      <style:graphic-properties draw:fill="gradient" draw:fill-color="#ffd087" draw:fill-gradient-name="msFillGradient_20_10"/>
    </style:style>
    <style:style style:name="ch18" style:family="chart">
      <style:chart-properties chart:solid-type="cuboid"/>
      <style:graphic-properties draw:fill="gradient" draw:fill-color="#90a2d3" draw:fill-gradient-name="msFillGradient_20_11"/>
    </style:style>
    <style:style style:name="ch19" style:family="chart">
      <style:graphic-properties draw:fill="solid" draw:fill-color="#d9d9d9"/>
    </style:style>
    <style:style style:name="ch20" style:family="chart">
      <style:graphic-properties draw:fill-color="#d9d9d9"/>
    </style:style>
  </office:automatic-styles>
  <office:body>
    <office:chart>
      <chart:chart svg:width="26.776cm" svg:height="16.616cm" xlink:href=".." xlink:type="simple" chart:class="chart:circle" chart:style-name="ch1">
        <chart:legend chart:legend-position="end" svg:x="21.888cm" svg:y="1.719cm" style:legend-expansion="custom" svg:width="4.218cm" svg:height="12.669cm" style:legend-expansion-aspect-ratio="0.332938669192517" chart:style-name="ch2"/>
        <chart:plot-area chart:style-name="ch3" svg:x="1.804cm" svg:y="2.628cm" svg:width="20.036cm" svg:height="11.137cm" dr3d:transform="matrix (0.906306771049824 0 -0.422620440524641 -0.39713343678943 0.342019314862106 -0.851650058207637 0.144544353514959 0.939692922321572 0.309974420889348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:coordinate-region svg:x="1.804cm" svg:y="1.697cm" svg:width="20.036cm" svg:height="13.556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Anual.F28:Anual.F38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Anual.G28:Anual.G3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 loext:hide-legend="true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string">
                <text:p>Internet</text:p>
                <draw:g>
                  <svg:desc>Anual.F28:Anual.F38</svg:desc>
                </draw:g>
              </table:table-cell>
              <table:table-cell office:value-type="float" office:value="30">
                <text:p>30</text:p>
                <draw:g>
                  <svg:desc>Anual.G28:Anual.G38</svg:desc>
                </draw:g>
              </table:table-cell>
            </table:table-row>
            <table:table-row>
              <table:table-cell office:value-type="string">
                <text:p>Planos/assinaturas</text:p>
              </table:table-cell>
              <table:table-cell office:value-type="float" office:value="336.9">
                <text:p>336.9</text:p>
              </table:table-cell>
            </table:table-row>
            <table:table-row>
              <table:table-cell office:value-type="string">
                <text:p>Agu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uz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asolina</text:p>
              </table:table-cell>
              <table:table-cell office:value-type="float" office:value="358.62">
                <text:p>358.62</text:p>
              </table:table-cell>
            </table:table-row>
            <table:table-row>
              <table:table-cell office:value-type="string">
                <text:p>Dizimos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Ofertas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Parcelas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Saúd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vestimento</text:p>
              </table:table-cell>
              <table:table-cell office:value-type="float" office:value="5891.82">
                <text:p>5891.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gradient draw:name="msFillGradient_20_1" draw:display-name="msFillGradient 1" draw:style="radial" draw:cx="50%" draw:cy="50%" draw:start-color="#262626" draw:end-color="#595959" draw:start-intensity="100%" draw:end-intensity="100%" draw:border="0%">
      <loext:gradient-stop svg:offset="0" loext:color-type="rgb" loext:color-value="#262626"/>
      <loext:gradient-stop svg:offset="1" loext:color-type="rgb" loext:color-value="#595959"/>
    </draw:gradient>
    <draw:gradient draw:name="msFillGradient_20_10" draw:display-name="msFillGradient 10" draw:style="linear" draw:start-color="#a4834b" draw:end-color="#876600" draw:start-intensity="100%" draw:end-intensity="100%" draw:angle="0deg" draw:border="0%">
      <loext:gradient-stop svg:offset="0" loext:color-type="rgb" loext:color-value="#a4834b"/>
      <loext:gradient-stop svg:offset="0.5" loext:color-type="rgb" loext:color-value="#997200"/>
      <loext:gradient-stop svg:offset="1" loext:color-type="rgb" loext:color-value="#876600"/>
    </draw:gradient>
    <draw:gradient draw:name="msFillGradient_20_11" draw:display-name="msFillGradient 11" draw:style="linear" draw:start-color="#506088" draw:end-color="#1a3a71" draw:start-intensity="100%" draw:end-intensity="100%" draw:angle="0deg" draw:border="0%">
      <loext:gradient-stop svg:offset="0" loext:color-type="rgb" loext:color-value="#506088"/>
      <loext:gradient-stop svg:offset="0.5" loext:color-type="rgb" loext:color-value="#21427c"/>
      <loext:gradient-stop svg:offset="1" loext:color-type="rgb" loext:color-value="#1a3a71"/>
    </draw:gradient>
    <draw:gradient draw:name="msFillGradient_20_2" draw:display-name="msFillGradient 2" draw:style="linear" draw:start-color="#71a6da" draw:end-color="#448ac9" draw:start-intensity="100%" draw:end-intensity="100%" draw:angle="0deg" draw:border="0%">
      <loext:gradient-stop svg:offset="0" loext:color-type="rgb" loext:color-value="#71a6da"/>
      <loext:gradient-stop svg:offset="0.5" loext:color-type="rgb" loext:color-value="#549ada"/>
      <loext:gradient-stop svg:offset="1" loext:color-type="rgb" loext:color-value="#448ac9"/>
    </draw:gradient>
    <draw:gradient draw:name="msFillGradient_20_3" draw:display-name="msFillGradient 3" draw:style="linear" draw:start-color="#f08c56" draw:end-color="#e46b19" draw:start-intensity="100%" draw:end-intensity="100%" draw:angle="0deg" draw:border="0%">
      <loext:gradient-stop svg:offset="0" loext:color-type="rgb" loext:color-value="#f08c56"/>
      <loext:gradient-stop svg:offset="0.5" loext:color-type="rgb" loext:color-value="#f57a27"/>
      <loext:gradient-stop svg:offset="1" loext:color-type="rgb" loext:color-value="#e46b19"/>
    </draw:gradient>
    <draw:gradient draw:name="msFillGradient_20_4" draw:display-name="msFillGradient 4" draw:style="linear" draw:start-color="#aeaeae" draw:end-color="#929292" draw:start-intensity="100%" draw:end-intensity="100%" draw:angle="0deg" draw:border="0%">
      <loext:gradient-stop svg:offset="0" loext:color-type="rgb" loext:color-value="#aeaeae"/>
      <loext:gradient-stop svg:offset="0.5" loext:color-type="rgb" loext:color-value="#a4a4a4"/>
      <loext:gradient-stop svg:offset="1" loext:color-type="rgb" loext:color-value="#929292"/>
    </draw:gradient>
    <draw:gradient draw:name="msFillGradient_20_5" draw:display-name="msFillGradient 5" draw:style="linear" draw:start-color="#ffc54b" draw:end-color="#e2aa00" draw:start-intensity="100%" draw:end-intensity="100%" draw:angle="0deg" draw:border="0%">
      <loext:gradient-stop svg:offset="0" loext:color-type="rgb" loext:color-value="#ffc54b"/>
      <loext:gradient-stop svg:offset="0.5" loext:color-type="rgb" loext:color-value="#ffbf00"/>
      <loext:gradient-stop svg:offset="1" loext:color-type="rgb" loext:color-value="#e2aa00"/>
    </draw:gradient>
    <draw:gradient draw:name="msFillGradient_20_6" draw:display-name="msFillGradient 6" draw:style="linear" draw:start-color="#6082ca" draw:end-color="#2f61ba" draw:start-intensity="100%" draw:end-intensity="100%" draw:angle="0deg" draw:border="0%">
      <loext:gradient-stop svg:offset="0" loext:color-type="rgb" loext:color-value="#6082ca"/>
      <loext:gradient-stop svg:offset="0.5" loext:color-type="rgb" loext:color-value="#3d6fc9"/>
      <loext:gradient-stop svg:offset="1" loext:color-type="rgb" loext:color-value="#2f61ba"/>
    </draw:gradient>
    <draw:gradient draw:name="msFillGradient_20_7" draw:display-name="msFillGradient 7" draw:style="linear" draw:start-color="#80b761" draw:end-color="#61a235" draw:start-intensity="100%" draw:end-intensity="100%" draw:angle="0deg" draw:border="0%">
      <loext:gradient-stop svg:offset="0" loext:color-type="rgb" loext:color-value="#80b761"/>
      <loext:gradient-stop svg:offset="0.5" loext:color-type="rgb" loext:color-value="#6fb142"/>
      <loext:gradient-stop svg:offset="1" loext:color-type="rgb" loext:color-value="#61a235"/>
    </draw:gradient>
    <draw:gradient draw:name="msFillGradient_20_8" draw:display-name="msFillGradient 8" draw:style="linear" draw:start-color="#50729e" draw:end-color="#17538a" draw:start-intensity="100%" draw:end-intensity="100%" draw:angle="0deg" draw:border="0%">
      <loext:gradient-stop svg:offset="0" loext:color-type="rgb" loext:color-value="#50729e"/>
      <loext:gradient-stop svg:offset="0.5" loext:color-type="rgb" loext:color-value="#205d96"/>
      <loext:gradient-stop svg:offset="1" loext:color-type="rgb" loext:color-value="#17538a"/>
    </draw:gradient>
    <draw:gradient draw:name="msFillGradient_20_9" draw:display-name="msFillGradient 9" draw:style="linear" draw:start-color="#767676" draw:end-color="#575757" draw:start-intensity="100%" draw:end-intensity="100%" draw:angle="0deg" draw:border="0%">
      <loext:gradient-stop svg:offset="0" loext:color-type="rgb" loext:color-value="#767676"/>
      <loext:gradient-stop svg:offset="0.5" loext:color-type="rgb" loext:color-value="#636363"/>
      <loext:gradient-stop svg:offset="1" loext:color-type="rgb" loext:color-value="#575757"/>
    </draw:gradient>
  </office:styles>
</office:document-styles>
</file>